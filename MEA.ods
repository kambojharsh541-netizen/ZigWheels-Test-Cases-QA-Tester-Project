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547.26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195.85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70.84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416.01pt"/>
    </style:style>
    <style:style style:name="co11" style:family="table-column">
      <style:table-column-properties fo:break-before="auto" style:column-width="195.14pt"/>
    </style:style>
    <style:style style:name="co12" style:family="table-column">
      <style:table-column-properties fo:break-before="auto" style:column-width="100.01pt"/>
    </style:style>
    <style:style style:name="co13" style:family="table-column">
      <style:table-column-properties fo:break-before="auto" style:column-width="131.95pt"/>
    </style:style>
    <style:style style:name="co14" style:family="table-column">
      <style:table-column-properties fo:break-before="auto" style:column-width="452.81pt"/>
    </style:style>
    <style:style style:name="co15" style:family="table-column">
      <style:table-column-properties fo:break-before="auto" style:column-width="177.11pt"/>
    </style:style>
    <style:style style:name="co16" style:family="table-column">
      <style:table-column-properties fo:break-before="auto" style:column-width="90.99pt"/>
    </style:style>
    <style:style style:name="co17" style:family="table-column">
      <style:table-column-properties fo:break-before="auto" style:column-width="234.06pt"/>
    </style:style>
    <style:style style:name="co18" style:family="table-column">
      <style:table-column-properties fo:break-before="auto" style:column-width="413.26pt"/>
    </style:style>
    <style:style style:name="co19" style:family="table-column">
      <style:table-column-properties fo:break-before="auto" style:column-width="191pt"/>
    </style:style>
    <style:style style:name="co20" style:family="table-column">
      <style:table-column-properties fo:break-before="auto" style:column-width="93.74pt"/>
    </style:style>
    <style:style style:name="co21" style:family="table-column">
      <style:table-column-properties fo:break-before="auto" style:column-width="230.54pt"/>
    </style:style>
    <style:style style:name="co22" style:family="table-column">
      <style:table-column-properties fo:break-before="auto" style:column-width="95.16pt"/>
    </style:style>
    <style:style style:name="co23" style:family="table-column">
      <style:table-column-properties fo:break-before="auto" style:column-width="481.29pt"/>
    </style:style>
    <style:style style:name="co24" style:family="table-column">
      <style:table-column-properties fo:break-before="auto" style:column-width="495.84pt"/>
    </style:style>
    <style:style style:name="co25" style:family="table-column">
      <style:table-column-properties fo:break-before="auto" style:column-width="138.9pt"/>
    </style:style>
    <style:style style:name="co26" style:family="table-column">
      <style:table-column-properties fo:break-before="auto" style:column-width="117.41pt"/>
    </style:style>
    <style:style style:name="co27" style:family="table-column">
      <style:table-column-properties fo:break-before="auto" style:column-width="172.94pt"/>
    </style:style>
    <style:style style:name="co28" style:family="table-column">
      <style:table-column-properties fo:break-before="auto" style:column-width="333.35pt"/>
    </style:style>
    <style:style style:name="co29" style:family="table-column">
      <style:table-column-properties fo:break-before="auto" style:column-width="209.76pt"/>
    </style:style>
    <style:style style:name="co30" style:family="table-column">
      <style:table-column-properties fo:break-before="auto" style:column-width="118.06pt"/>
    </style:style>
    <style:style style:name="co31" style:family="table-column">
      <style:table-column-properties fo:break-before="auto" style:column-width="206.96pt"/>
    </style:style>
    <style:style style:name="co32" style:family="table-column">
      <style:table-column-properties fo:break-before="auto" style:column-width="405.61pt"/>
    </style:style>
    <style:style style:name="co33" style:family="table-column">
      <style:table-column-properties fo:break-before="auto" style:column-width="157.66pt"/>
    </style:style>
    <style:style style:name="co34" style:family="table-column">
      <style:table-column-properties fo:break-before="auto" style:column-width="122.94pt"/>
    </style:style>
    <style:style style:name="co35" style:family="table-column">
      <style:table-column-properties fo:break-before="auto" style:column-width="306.96pt"/>
    </style:style>
    <style:style style:name="co36" style:family="table-column">
      <style:table-column-properties fo:break-before="auto" style:column-width="208.35pt"/>
    </style:style>
    <style:style style:name="co37" style:family="table-column">
      <style:table-column-properties fo:break-before="auto" style:column-width="97.94pt"/>
    </style:style>
    <style:style style:name="co38" style:family="table-column">
      <style:table-column-properties fo:break-before="auto" style:column-width="197.94pt"/>
    </style:style>
    <style:style style:name="co39" style:family="table-column">
      <style:table-column-properties fo:break-before="auto" style:column-width="422.96pt"/>
    </style:style>
    <style:style style:name="co40" style:family="table-column">
      <style:table-column-properties fo:break-before="auto" style:column-width="180.54pt"/>
    </style:style>
    <style:style style:name="co41" style:family="table-column">
      <style:table-column-properties fo:break-before="auto" style:column-width="106.95pt"/>
    </style:style>
    <style:style style:name="co42" style:family="table-column">
      <style:table-column-properties fo:break-before="auto" style:column-width="220.85pt"/>
    </style:style>
    <style:style style:name="co43" style:family="table-column">
      <style:table-column-properties fo:break-before="auto" style:column-width="379.9pt"/>
    </style:style>
    <style:style style:name="co44" style:family="table-column">
      <style:table-column-properties fo:break-before="auto" style:column-width="264.61pt"/>
    </style:style>
    <style:style style:name="co45" style:family="table-column">
      <style:table-column-properties fo:break-before="auto" style:column-width="245.85pt"/>
    </style:style>
    <style:style style:name="co46" style:family="table-column">
      <style:table-column-properties fo:break-before="auto" style:column-width="359.04pt"/>
    </style:style>
    <style:style style:name="co47" style:family="table-column">
      <style:table-column-properties fo:break-before="auto" style:column-width="213.19pt"/>
    </style:style>
    <style:style style:name="co48" style:family="table-column">
      <style:table-column-properties fo:break-before="auto" style:column-width="163.19pt"/>
    </style:style>
    <style:style style:name="co49" style:family="table-column">
      <style:table-column-properties fo:break-before="auto" style:column-width="380.61pt"/>
    </style:style>
    <style:style style:name="co50" style:family="table-column">
      <style:table-column-properties fo:break-before="auto" style:column-width="327.8pt"/>
    </style:style>
    <style:style style:name="co51" style:family="table-column">
      <style:table-column-properties fo:break-before="auto" style:column-width="232.64pt"/>
    </style:style>
    <style:style style:name="co52" style:family="table-column">
      <style:table-column-properties fo:break-before="auto" style:column-width="175.69pt"/>
    </style:style>
    <style:style style:name="co53" style:family="table-column">
      <style:table-column-properties fo:break-before="auto" style:column-width="375pt"/>
    </style:style>
    <style:style style:name="co54" style:family="table-column">
      <style:table-column-properties fo:break-before="auto" style:column-width="438.89pt"/>
    </style:style>
    <style:style style:name="co55" style:family="table-column">
      <style:table-column-properties fo:break-before="auto" style:column-width="142.41pt"/>
    </style:style>
    <style:style style:name="co56" style:family="table-column">
      <style:table-column-properties fo:break-before="auto" style:column-width="334.74pt"/>
    </style:style>
    <style:style style:name="co57" style:family="table-column">
      <style:table-column-properties fo:break-before="auto" style:column-width="487.56pt"/>
    </style:style>
    <style:style style:name="co58" style:family="table-column">
      <style:table-column-properties fo:break-before="auto" style:column-width="369.44pt"/>
    </style:style>
    <style:style style:name="co59" style:family="table-column">
      <style:table-column-properties fo:break-before="auto" style:column-width="322.95pt"/>
    </style:style>
    <style:style style:name="co60" style:family="table-column">
      <style:table-column-properties fo:break-before="auto" style:column-width="322.24pt"/>
    </style:style>
    <style:style style:name="co61" style:family="table-column">
      <style:table-column-properties fo:break-before="auto" style:column-width="538.24pt"/>
    </style:style>
    <style:style style:name="co62" style:family="table-column">
      <style:table-column-properties fo:break-before="auto" style:column-width="351.41pt"/>
    </style:style>
    <style:style style:name="co63" style:family="table-column">
      <style:table-column-properties fo:break-before="auto" style:column-width="298.66pt"/>
    </style:style>
    <style:style style:name="co64" style:family="table-column">
      <style:table-column-properties fo:break-before="auto" style:column-width="108.34pt"/>
    </style:style>
    <style:style style:name="co65" style:family="table-column">
      <style:table-column-properties fo:break-before="auto" style:column-width="404.19pt"/>
    </style:style>
    <style:style style:name="co66" style:family="table-column">
      <style:table-column-properties fo:break-before="auto" style:column-width="252.11pt"/>
    </style:style>
    <style:style style:name="co67" style:family="table-column">
      <style:table-column-properties fo:break-before="auto" style:column-width="123.59pt"/>
    </style:style>
    <style:style style:name="co68" style:family="table-column">
      <style:table-column-properties fo:break-before="auto" style:column-width="241.71pt"/>
    </style:style>
    <style:style style:name="co69" style:family="table-column">
      <style:table-column-properties fo:break-before="auto" style:column-width="129.15pt"/>
    </style:style>
    <style:style style:name="co70" style:family="table-column">
      <style:table-column-properties fo:break-before="auto" style:column-width="131.24pt"/>
    </style:style>
    <style:style style:name="co71" style:family="table-column">
      <style:table-column-properties fo:break-before="auto" style:column-width="567.41pt"/>
    </style:style>
    <style:style style:name="co72" style:family="table-column">
      <style:table-column-properties fo:break-before="auto" style:column-width="395.21pt"/>
    </style:style>
    <style:style style:name="co73" style:family="table-column">
      <style:table-column-properties fo:break-before="auto" style:column-width="429.9pt"/>
    </style:style>
    <style:style style:name="co74" style:family="table-column">
      <style:table-column-properties fo:break-before="auto" style:column-width="168.75pt"/>
    </style:style>
    <style:style style:name="co75" style:family="table-column">
      <style:table-column-properties fo:break-before="auto" style:column-width="137.51pt"/>
    </style:style>
    <style:style style:name="co76" style:family="table-column">
      <style:table-column-properties fo:break-before="auto" style:column-width="477.81pt"/>
    </style:style>
    <style:style style:name="co77" style:family="table-column">
      <style:table-column-properties fo:break-before="auto" style:column-width="94.45pt"/>
    </style:style>
    <style:style style:name="co78" style:family="table-column">
      <style:table-column-properties fo:break-before="auto" style:column-width="288.26pt"/>
    </style:style>
    <style:style style:name="co79" style:family="table-column">
      <style:table-column-properties fo:break-before="auto" style:column-width="214.61pt"/>
    </style:style>
    <style:style style:name="co80" style:family="table-column">
      <style:table-column-properties fo:break-before="auto" style:column-width="32.66pt"/>
    </style:style>
    <style:style style:name="co81" style:family="table-column">
      <style:table-column-properties fo:break-before="auto" style:column-width="109.05pt"/>
    </style:style>
    <style:style style:name="co82" style:family="table-column">
      <style:table-column-properties fo:break-before="auto" style:column-width="343.81pt"/>
    </style:style>
    <style:style style:name="co83" style:family="table-column">
      <style:table-column-properties fo:break-before="auto" style:column-width="294.46pt"/>
    </style:style>
    <style:style style:name="co84" style:family="table-column">
      <style:table-column-properties fo:break-before="auto" style:column-width="136.86pt"/>
    </style:style>
    <style:style style:name="co85" style:family="table-column">
      <style:table-column-properties fo:break-before="auto" style:column-width="396.54pt"/>
    </style:style>
    <style:style style:name="co86" style:family="table-column">
      <style:table-column-properties fo:break-before="auto" style:column-width="287.49pt"/>
    </style:style>
    <style:style style:name="co87" style:family="table-column">
      <style:table-column-properties fo:break-before="auto" style:column-width="421.54pt"/>
    </style:style>
    <style:style style:name="co88" style:family="table-column">
      <style:table-column-properties fo:break-before="auto" style:column-width="372.95pt"/>
    </style:style>
    <style:style style:name="co89" style:family="table-column">
      <style:table-column-properties fo:break-before="auto" style:column-width="263.25pt"/>
    </style:style>
    <style:style style:name="co90" style:family="table-column">
      <style:table-column-properties fo:break-before="auto" style:column-width="211.1pt"/>
    </style:style>
    <style:style style:name="co91" style:family="table-column">
      <style:table-column-properties fo:break-before="auto" style:column-width="290.3pt"/>
    </style:style>
    <style:style style:name="co92" style:family="table-column">
      <style:table-column-properties fo:break-before="auto" style:column-width="237.49pt"/>
    </style:style>
    <style:style style:name="co93" style:family="table-column">
      <style:table-column-properties fo:break-before="auto" style:column-width="121.55pt"/>
    </style:style>
    <style:style style:name="co94" style:family="table-column">
      <style:table-column-properties fo:break-before="auto" style:column-width="456.94pt"/>
    </style:style>
    <style:style style:name="co95" style:family="table-column">
      <style:table-column-properties fo:break-before="auto" style:column-width="233.35pt"/>
    </style:style>
    <style:style style:name="co96" style:family="table-column">
      <style:table-column-properties fo:break-before="auto" style:column-width="223.65pt"/>
    </style:style>
    <style:style style:name="co97" style:family="table-column">
      <style:table-column-properties fo:break-before="auto" style:column-width="344.44pt"/>
    </style:style>
    <style:style style:name="co98" style:family="table-column">
      <style:table-column-properties fo:break-before="auto" style:column-width="575.04pt"/>
    </style:style>
    <style:style style:name="co99" style:family="table-column">
      <style:table-column-properties fo:break-before="auto" style:column-width="210.44pt"/>
    </style:style>
    <style:style style:name="co100" style:family="table-column">
      <style:table-column-properties fo:break-before="auto" style:column-width="122.26pt"/>
    </style:style>
    <style:style style:name="co101" style:family="table-column">
      <style:table-column-properties fo:break-before="auto" style:column-width="246.56pt"/>
    </style:style>
    <style:style style:name="co102" style:family="table-column">
      <style:table-column-properties fo:break-before="auto" style:column-width="200.69pt"/>
    </style:style>
    <style:style style:name="co103" style:family="table-column">
      <style:table-column-properties fo:break-before="auto" style:column-width="472.25pt"/>
    </style:style>
    <style:style style:name="co104" style:family="table-column">
      <style:table-column-properties fo:break-before="auto" style:column-width="227.11pt"/>
    </style:style>
    <style:style style:name="co105" style:family="table-column">
      <style:table-column-properties fo:break-before="auto" style:column-width="447.25pt"/>
    </style:style>
    <style:style style:name="co106" style:family="table-column">
      <style:table-column-properties fo:break-before="auto" style:column-width="281.96pt"/>
    </style:style>
    <style:style style:name="co107" style:family="table-column">
      <style:table-column-properties fo:break-before="auto" style:column-width="477.16pt"/>
    </style:style>
    <style:style style:name="co108" style:family="table-column">
      <style:table-column-properties fo:break-before="auto" style:column-width="299.34pt"/>
    </style:style>
    <style:style style:name="co109" style:family="table-column">
      <style:table-column-properties fo:break-before="auto" style:column-width="643.1pt"/>
    </style:style>
    <style:style style:name="co110" style:family="table-column">
      <style:table-column-properties fo:break-before="auto" style:column-width="221.56pt"/>
    </style:style>
    <style:style style:name="co111" style:family="table-column">
      <style:table-column-properties fo:break-before="auto" style:column-width="83.34pt"/>
    </style:style>
    <style:style style:name="co112" style:family="table-column">
      <style:table-column-properties fo:break-before="auto" style:column-width="150.01pt"/>
    </style:style>
    <style:style style:name="co113" style:family="table-column">
      <style:table-column-properties fo:break-before="auto" style:column-width="433.36pt"/>
    </style:style>
    <style:style style:name="co114" style:family="table-column">
      <style:table-column-properties fo:break-before="auto" style:column-width="184.05pt"/>
    </style:style>
    <style:style style:name="co115" style:family="table-column">
      <style:table-column-properties fo:break-before="auto" style:column-width="218.04pt"/>
    </style:style>
    <style:style style:name="co116" style:family="table-column">
      <style:table-column-properties fo:break-before="auto" style:column-width="436.14pt"/>
    </style:style>
    <style:style style:name="co117" style:family="table-column">
      <style:table-column-properties fo:break-before="auto" style:column-width="148.59pt"/>
    </style:style>
    <style:style style:name="co118" style:family="table-column">
      <style:table-column-properties fo:break-before="auto" style:column-width="186.09pt"/>
    </style:style>
    <style:style style:name="co119" style:family="table-column">
      <style:table-column-properties fo:break-before="auto" style:column-width="448.64pt"/>
    </style:style>
    <style:style style:name="co120" style:family="table-column">
      <style:table-column-properties fo:break-before="auto" style:column-width="145.84pt"/>
    </style:style>
    <style:style style:name="co121" style:family="table-column">
      <style:table-column-properties fo:break-before="auto" style:column-width="104.91pt"/>
    </style:style>
    <style:style style:name="co122" style:family="table-column">
      <style:table-column-properties fo:break-before="auto" style:column-width="486.85pt"/>
    </style:style>
    <style:style style:name="co123" style:family="table-column">
      <style:table-column-properties fo:break-before="auto" style:column-width="166pt"/>
    </style:style>
    <style:style style:name="co124" style:family="table-column">
      <style:table-column-properties fo:break-before="auto" style:column-width="110.44pt"/>
    </style:style>
    <style:style style:name="co125" style:family="table-column">
      <style:table-column-properties fo:break-before="auto" style:column-width="257.64pt"/>
    </style:style>
    <style:style style:name="co126" style:family="table-column">
      <style:table-column-properties fo:break-before="auto" style:column-width="340.3pt"/>
    </style:style>
    <style:style style:name="co127" style:family="table-column">
      <style:table-column-properties fo:break-before="auto" style:column-width="196.55pt"/>
    </style:style>
    <style:style style:name="co128" style:family="table-column">
      <style:table-column-properties fo:break-before="auto" style:column-width="403.51pt"/>
    </style:style>
    <style:style style:name="co129" style:family="table-column">
      <style:table-column-properties fo:break-before="auto" style:column-width="155.54pt"/>
    </style:style>
    <style:style style:name="co130" style:family="table-column">
      <style:table-column-properties fo:break-before="auto" style:column-width="393.79pt"/>
    </style:style>
    <style:style style:name="co131" style:family="table-column">
      <style:table-column-properties fo:break-before="auto" style:column-width="182.64pt"/>
    </style:style>
    <style:style style:name="co132" style:family="table-column">
      <style:table-column-properties fo:break-before="auto" style:column-width="301.41pt"/>
    </style:style>
    <style:style style:name="co133" style:family="table-column">
      <style:table-column-properties fo:break-before="auto" style:column-width="441.01pt"/>
    </style:style>
    <style:style style:name="co134" style:family="table-column">
      <style:table-column-properties fo:break-before="auto" style:column-width="311.84pt"/>
    </style:style>
    <style:style style:name="co135" style:family="table-column">
      <style:table-column-properties fo:break-before="auto" style:column-width="384.75pt"/>
    </style:style>
    <style:style style:name="co136" style:family="table-column">
      <style:table-column-properties fo:break-before="auto" style:column-width="355.61pt"/>
    </style:style>
    <style:style style:name="co137" style:family="table-column">
      <style:table-column-properties fo:break-before="auto" style:column-width="295.85pt"/>
    </style:style>
    <style:style style:name="co138" style:family="table-column">
      <style:table-column-properties fo:break-before="auto" style:column-width="239.61pt"/>
    </style:style>
    <style:style style:name="co139" style:family="table-column">
      <style:table-column-properties fo:break-before="auto" style:column-width="352.09pt"/>
    </style:style>
    <style:style style:name="co140" style:family="table-column">
      <style:table-column-properties fo:break-before="auto" style:column-width="194.46pt"/>
    </style:style>
    <style:style style:name="co141" style:family="table-column">
      <style:table-column-properties fo:break-before="auto" style:column-width="191.71pt"/>
    </style:style>
    <style:style style:name="co142" style:family="table-column">
      <style:table-column-properties fo:break-before="auto" style:column-width="634.11pt"/>
    </style:style>
    <style:style style:name="co143" style:family="table-column">
      <style:table-column-properties fo:break-before="auto" style:column-width="161.09pt"/>
    </style:style>
    <style:style style:name="co144" style:family="table-column">
      <style:table-column-properties fo:break-before="auto" style:column-width="222.94pt"/>
    </style:style>
    <style:style style:name="co145" style:family="table-column">
      <style:table-column-properties fo:break-before="auto" style:column-width="200.01pt"/>
    </style:style>
    <style:style style:name="co146" style:family="table-column">
      <style:table-column-properties fo:break-before="auto" style:column-width="366.01pt"/>
    </style:style>
    <style:style style:name="co147" style:family="table-column">
      <style:table-column-properties fo:break-before="auto" style:column-width="251.4pt"/>
    </style:style>
    <style:style style:name="co148" style:family="table-column">
      <style:table-column-properties fo:break-before="auto" style:column-width="274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EB-731">
      <style:table-properties table:display="true" style:writing-mode="lr-tb"/>
    </style:style>
    <style:style style:name="ta3" style:family="table" style:master-page-name="PageStyle_5f_MEB-753">
      <style:table-properties table:display="true" style:writing-mode="lr-tb"/>
    </style:style>
    <style:style style:name="ta4" style:family="table" style:master-page-name="PageStyle_5f_MEB-755">
      <style:table-properties table:display="true" style:writing-mode="lr-tb"/>
    </style:style>
    <style:style style:name="ta5" style:family="table" style:master-page-name="PageStyle_5f_MEB-756">
      <style:table-properties table:display="true" style:writing-mode="lr-tb"/>
    </style:style>
    <style:style style:name="ta6" style:family="table" style:master-page-name="PageStyle_5f_MEB-763">
      <style:table-properties table:display="true" style:writing-mode="lr-tb"/>
    </style:style>
    <style:style style:name="ta7" style:family="table" style:master-page-name="PageStyle_5f_MEB-768">
      <style:table-properties table:display="true" style:writing-mode="lr-tb"/>
    </style:style>
    <style:style style:name="ta8" style:family="table" style:master-page-name="PageStyle_5f_MEB-705">
      <style:table-properties table:display="true" style:writing-mode="lr-tb"/>
    </style:style>
    <style:style style:name="ta9" style:family="table" style:master-page-name="PageStyle_5f_MEB-749">
      <style:table-properties table:display="true" style:writing-mode="lr-tb"/>
    </style:style>
    <style:style style:name="ta10" style:family="table" style:master-page-name="PageStyle_5f_MEB-785">
      <style:table-properties table:display="true" style:writing-mode="lr-tb"/>
    </style:style>
    <style:style style:name="ta11" style:family="table" style:master-page-name="PageStyle_5f_MEB-506">
      <style:table-properties table:display="true" style:writing-mode="lr-tb"/>
    </style:style>
    <style:style style:name="ta12" style:family="table" style:master-page-name="PageStyle_5f_MEB-627">
      <style:table-properties table:display="true" style:writing-mode="lr-tb"/>
    </style:style>
    <style:style style:name="ta13" style:family="table" style:master-page-name="PageStyle_5f_MEB-628">
      <style:table-properties table:display="true" style:writing-mode="lr-tb"/>
    </style:style>
    <style:style style:name="ta14" style:family="table" style:master-page-name="PageStyle_5f_MEB-647">
      <style:table-properties table:display="true" style:writing-mode="lr-tb"/>
    </style:style>
    <style:style style:name="ta15" style:family="table" style:master-page-name="PageStyle_5f_MEB-648">
      <style:table-properties table:display="true" style:writing-mode="lr-tb"/>
    </style:style>
    <style:style style:name="ta16" style:family="table" style:master-page-name="PageStyle_5f_MEB-652">
      <style:table-properties table:display="true" style:writing-mode="lr-tb"/>
    </style:style>
    <style:style style:name="ta17" style:family="table" style:master-page-name="PageStyle_5f_MEB-653">
      <style:table-properties table:display="true" style:writing-mode="lr-tb"/>
    </style:style>
    <style:style style:name="ta18" style:family="table" style:master-page-name="PageStyle_5f_MEB-663">
      <style:table-properties table:display="true" style:writing-mode="lr-tb"/>
    </style:style>
    <style:style style:name="ta19" style:family="table" style:master-page-name="PageStyle_5f_MEB-675">
      <style:table-properties table:display="true" style:writing-mode="lr-tb"/>
    </style:style>
    <style:style style:name="ta20" style:family="table" style:master-page-name="PageStyle_5f_MEB-683">
      <style:table-properties table:display="true" style:writing-mode="lr-tb"/>
    </style:style>
    <style:style style:name="ta21" style:family="table" style:master-page-name="PageStyle_5f_MEB-681">
      <style:table-properties table:display="true" style:writing-mode="lr-tb"/>
    </style:style>
    <style:style style:name="ta22" style:family="table" style:master-page-name="PageStyle_5f_MEB-692">
      <style:table-properties table:display="true" style:writing-mode="lr-tb"/>
    </style:style>
    <style:style style:name="ta23" style:family="table" style:master-page-name="PageStyle_5f_MEB-616">
      <style:table-properties table:display="true" style:writing-mode="lr-tb"/>
    </style:style>
    <style:style style:name="ta24" style:family="table" style:master-page-name="PageStyle_5f_MEB-563">
      <style:table-properties table:display="true" style:writing-mode="lr-tb"/>
    </style:style>
    <style:style style:name="ta25" style:family="table" style:master-page-name="PageStyle_5f_MEB-562">
      <style:table-properties table:display="true" style:writing-mode="lr-tb"/>
    </style:style>
    <style:style style:name="ta26" style:family="table" style:master-page-name="PageStyle_5f_MEB-560">
      <style:table-properties table:display="true" style:writing-mode="lr-tb"/>
    </style:style>
    <style:style style:name="ta27" style:family="table" style:master-page-name="PageStyle_5f_MEB-630">
      <style:table-properties table:display="true" style:writing-mode="lr-tb"/>
    </style:style>
    <style:style style:name="ta28" style:family="table" style:master-page-name="PageStyle_5f_MEB-535">
      <style:table-properties table:display="true" style:writing-mode="lr-tb"/>
    </style:style>
    <style:style style:name="ta29" style:family="table" style:master-page-name="PageStyle_5f_MEB-518">
      <style:table-properties table:display="true" style:writing-mode="lr-tb"/>
    </style:style>
    <style:style style:name="ta30" style:family="table" style:master-page-name="PageStyle_5f_MEB-513">
      <style:table-properties table:display="true" style:writing-mode="lr-tb"/>
    </style:style>
    <style:style style:name="ta31" style:family="table" style:master-page-name="PageStyle_5f_MEB-508">
      <style:table-properties table:display="true" style:writing-mode="lr-tb"/>
    </style:style>
    <style:style style:name="ta32" style:family="table" style:master-page-name="PageStyle_5f_MEB-502">
      <style:table-properties table:display="true" style:writing-mode="lr-tb"/>
    </style:style>
    <style:style style:name="ta33" style:family="table" style:master-page-name="PageStyle_5f_MEB-501">
      <style:table-properties table:display="true" style:writing-mode="lr-tb"/>
    </style:style>
    <style:style style:name="ta34" style:family="table" style:master-page-name="PageStyle_5f_MEB-472">
      <style:table-properties table:display="true" style:writing-mode="lr-tb"/>
    </style:style>
    <style:style style:name="ta35" style:family="table" style:master-page-name="PageStyle_5f_MEB-631">
      <style:table-properties table:display="true" style:writing-mode="lr-tb"/>
    </style:style>
    <style:style style:name="ta36" style:family="table" style:master-page-name="PageStyle_5f_MEB-613">
      <style:table-properties table:display="true" style:writing-mode="lr-tb"/>
    </style:style>
    <style:style style:name="ta37" style:family="table" style:master-page-name="PageStyle_5f_MEB-548">
      <style:table-properties table:display="true" style:writing-mode="lr-tb"/>
    </style:style>
    <style:style style:name="ta38" style:family="table" style:master-page-name="PageStyle_5f_MEB-539">
      <style:table-properties table:display="true" style:writing-mode="lr-tb"/>
    </style:style>
    <style:style style:name="ta39" style:family="table" style:master-page-name="PageStyle_5f_MEB-533">
      <style:table-properties table:display="true" style:writing-mode="lr-tb"/>
    </style:style>
    <style:style style:name="ta40" style:family="table" style:master-page-name="PageStyle_5f_MEB-532">
      <style:table-properties table:display="true" style:writing-mode="lr-tb"/>
    </style:style>
    <style:style style:name="ta41" style:family="table" style:master-page-name="PageStyle_5f_MEB-557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<text:a xlink:href="http://s.no/" xlink:type="simple">S.no</text:a>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SS</text:p>
          </table:table-cell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Expected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6" table:number-columns-repeated="2"/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6"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table:number-columns-repeated="6"/>
          <table:table-cell table:number-columns-repeated="1016"/>
        </table:table-row>
        <table:table-row table:style-name="ro1" table:number-rows-repeated="983">
          <table:table-cell table:style-name="ce3" table:number-columns-repeated="8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3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ar cards in carousels (Popular Cars, Latest Cars, Similar Cars) render with width 300px.</text:p>
          </table:table-cell>
          <table:table-cell table:style-name="ce3" office:value-type="string" calcext:value-type="string">
            <text:p>Open homepage or model page</text:p>
            <text:p>Go to Popular / Latest / Similar Cars carousel</text:p>
            <text:p>Right-click card → Inspect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ards should be 300px wid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tr=w-300 parameter is correctly applied in image URLs for car cards.</text:p>
          </table:table-cell>
          <table:table-cell table:style-name="ce3" office:value-type="string" calcext:value-type="string">
            <text:p>Ispect car image</text:p>
            <text:p/>
            <text:p> Check: URL contains w-300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URL should contain w-300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images in car card carousels are not stretched or distorted at 300px width.</text:p>
          </table:table-cell>
          <table:table-cell table:style-name="ce3" office:value-type="string" calcext:value-type="string">
            <text:p>Observe images</text:p>
            <text:p/>
            <text:p> Check: Not stretched or blurred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Images should not be distorted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arousel layout alignment remains intact after width update.</text:p>
          </table:table-cell>
          <table:table-cell table:style-name="ce3" office:value-type="string" calcext:value-type="string">
            <text:p>Look at full carousel</text:p>
            <text:p/>
            <text:p> Check: Proper alignment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Layout should remain intac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spacing between car cards remains consistent.</text:p>
          </table:table-cell>
          <table:table-cell table:style-name="ce3" office:value-type="string" calcext:value-type="string">
            <text:p>Check gap between cards</text:p>
            <text:p/>
            <text:p> Check: Equal spacing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Equal spacing between card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arousel scroll behavior works correctly after width change.</text:p>
          </table:table-cell>
          <table:table-cell table:style-name="ce3" office:value-type="string" calcext:value-type="string">
            <text:p>Scroll carousel left/right</text:p>
            <text:p/>
            <text:p> Check: Smooth scrolling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Smooth scrolling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responsiveness of car cards across different screen sizes (desktop, tablet, mobile).</text:p>
          </table:table-cell>
          <table:table-cell table:style-name="ce3" office:value-type="string" calcext:value-type="string">
            <text:p>Resize screen (desktop/tablet/mobile)</text:p>
            <text:p/>
            <text:p> Check: Cards adjust properly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ards adjust on all screen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ompare car cards in carousel render with width 260px.</text:p>
          </table:table-cell>
          <table:table-cell table:style-name="ce3" office:value-type="string" calcext:value-type="string">
            <text:p>Open compare carousel</text:p>
            <text:p>Inspect card</text:p>
            <text:p/>
            <text:p> Check: width = 260px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ards should be 260px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image URLs for compare car cards use correct transformation (e.g., w-260 if applicable).</text:p>
          </table:table-cell>
          <table:table-cell table:style-name="ce3" office:value-type="string" calcext:value-type="string">
            <text:p>Inspect image</text:p>
            <text:p/>
            <text:p> Check: correct transformation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orrect transformation applied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ompare cards do not overflow or break layout in carousel.</text:p>
          </table:table-cell>
          <table:table-cell table:style-name="ce3" office:value-type="string" calcext:value-type="string">
            <text:p>No overflow or break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No overflow or break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orrect number of compare cards visible per viewport.</text:p>
          </table:table-cell>
          <table:table-cell table:style-name="ce3" office:value-type="string" calcext:value-type="string">
            <text:p>Check number of cards per screen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orrect number per viewpor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article cards in carousel render with width 300px.</text:p>
          </table:table-cell>
          <table:table-cell table:style-name="ce3" office:value-type="string" calcext:value-type="string">
            <text:p>Inspect card → 300px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ards should be 300px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article card images maintain proper aspect ratio and clarity.</text:p>
          </table:table-cell>
          <table:table-cell table:style-name="ce3" office:value-type="string" calcext:value-type="string">
            <text:p>Check clarity and ratio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Proper aspect ratio maintained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article cards do not overlap or misalign in carousel.</text:p>
          </table:table-cell>
          <table:table-cell table:style-name="ce3" office:value-type="string" calcext:value-type="string">
            <text:p>No overlap or misalignment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No overlap or misalignmen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text content (title, description) aligns correctly with updated width.</text:p>
          </table:table-cell>
          <table:table-cell table:style-name="ce3" office:value-type="string" calcext:value-type="string">
            <text:p>No overlap or misalignment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Text should align properly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Model Page Compare Cars section cards render with width 150px.</text:p>
          </table:table-cell>
          <table:table-cell table:style-name="ce3" office:value-type="string" calcext:value-type="string">
            <text:p>open model page <text:s/>then go to compare car section cards and then check Width = 150px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ards should be 150px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images in this section are clear and not pixelated at 150px.</text:p>
          </table:table-cell>
          <table:table-cell table:style-name="ce3" office:value-type="string" calcext:value-type="string">
            <text:p>No pixelation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Images should be clear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ards fit properly within container without overflow.</text:p>
          </table:table-cell>
          <table:table-cell table:style-name="ce3" office:value-type="string" calcext:value-type="string">
            <text:p>Cards fit container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ards fit within container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number of visible cards per row is as per design.</text:p>
          </table:table-cell>
          <table:table-cell table:style-name="ce3" office:value-type="string" calcext:value-type="string">
            <text:p>As per design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As per desig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Model Page Desktop right widgets cards render with width 150px.</text:p>
          </table:table-cell>
          <table:table-cell table:style-name="ce3" office:value-type="string" calcext:value-type="string">
            <text:p>Width = 150px and aligned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Proper width and alignmen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widget layout remains intact and visually aligned.</text:p>
          </table:table-cell>
          <table:table-cell table:style-name="ce3" office:value-type="string" calcext:value-type="string">
            <text:p>Inspect → width = 500px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widget layout remain intact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Model Page Top Gallery images render with width 500px.</text:p>
          </table:table-cell>
          <table:table-cell table:style-name="ce3" office:value-type="string" calcext:value-type="string">
            <text:p>Use next/prev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Images should be 500px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gallery navigation (next/prev/thumbnail) works correctly.</text:p>
          </table:table-cell>
          <table:table-cell table:style-name="ce3" office:value-type="string" calcext:value-type="string">
            <text:p>Reload page</text:p>
            <text:p/>
            <text:p> No shifting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Navigation should work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no layout shift occurs while images load.</text:p>
          </table:table-cell>
          <table:table-cell table:style-name="ce3" office:value-type="string" calcext:value-type="string">
            <text:p>All images have correct width params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No shift during load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all image URLs correctly apply respective width transformations.</text:p>
          </table:table-cell>
          <table:table-cell table:style-name="ce3" office:value-type="string" calcext:value-type="string">
            <text:p>No broken/missing images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Correct size parameters applied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no broken images appear due to incorrect transformation parameters.</text:p>
          </table:table-cell>
          <table:table-cell table:style-name="ce3" office:value-type="string" calcext:value-type="string">
            <text:p>Reload page</text:p>
            <text:p/>
            <text:p> Check: No slowdown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No broken image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page performance is not negatively impacted by new image sizes.</text:p>
          </table:table-cell>
          <table:table-cell table:style-name="ce3" office:value-type="string" calcext:value-type="string">
            <text:p>Test in Chrome, Edge, Safari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No performance impac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ousel Card UI &amp; Image Transformation Validation</text:p>
          </table:table-cell>
          <table:table-cell table:style-name="ce3" office:value-type="string" calcext:value-type="string">
            <text:p>Verify cross-browser compatibility (Chrome, Edge, Safari).</text:p>
          </table:table-cell>
          <table:table-cell table:style-name="ce3" office:value-type="string" calcext:value-type="string">
            <text:p>Open Arabic page</text:p>
            <text:p/>
            <text:p> Check layout</text:p>
          </table:table-cell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Works on all browser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Verify RTL (Arabic) pages render carousels and cards correctly.</text:p>
          </table:table-cell>
          <table:table-cell/>
          <table:table-cell table:style-name="ce3" office:value-type="string" calcext:value-type="string">
            <text:p>Carousel UI validation</text:p>
          </table:table-cell>
          <table:table-cell table:style-name="ce3" office:value-type="string" calcext:value-type="string">
            <text:p>Layout should work in RTL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53" table:style-name="ta3"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the homepage meta title is updated to “New Cars in UAE 2026 - Prices, Offers &amp; Reviews | ZigWheels”.</text:p>
          </table:table-cell>
          <table:table-cell table:style-name="ce3" office:value-type="string" calcext:value-type="string">
            <text:p>Open homepage</text:p>
            <text:p>Right-click → View Page Source</text:p>
            <text:p>Search &lt;title&gt;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Updated meta title should be presen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the old meta title is completely removed and not present in page source.</text:p>
          </table:table-cell>
          <table:table-cell table:style-name="ce3" office:value-type="string" calcext:value-type="string">
            <text:p>In page source</text:p>
            <text:p>Search old title text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old meta should not be present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the homepage meta description is updated to the new provided content.</text:p>
          </table:table-cell>
          <table:table-cell table:style-name="ce3" office:value-type="string" calcext:value-type="string">
            <text:p>Search &lt;meta name="description"&gt;</text:p>
            <text:p/>
            <text:p> Check: Updated description is present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Updated meta description should be presen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the old meta description is not present anywhere in the page source.</text:p>
          </table:table-cell>
          <table:table-cell table:style-name="ce3" office:value-type="string" calcext:value-type="string">
            <text:p>Search old description text</text:p>
            <text:p/>
            <text:p>Check: Old description not present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Old description should not be presen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meta title and description are visible correctly in page source (&lt;head&gt; section).</text:p>
          </table:table-cell>
          <table:table-cell table:style-name="ce3" office:value-type="string" calcext:value-type="string">
            <text:p>Check inside &lt;head&gt; section</text:p>
            <text:p/>
            <text:p>\ Check: Title &amp; description exist correctly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Meta tags should be correctly placed in &lt;head&gt;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updated meta title appears correctly in browser tab.</text:p>
          </table:table-cell>
          <table:table-cell table:style-name="ce3" office:value-type="string" calcext:value-type="string">
            <text:p>Observe browser tab</text:p>
            <text:p/>
            <text:p> Check: Title is updated correctly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Updated title should appear in browser tab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no duplicate meta title or description tags exist.</text:p>
          </table:table-cell>
          <table:table-cell table:style-name="ce3" office:value-type="string" calcext:value-type="string">
            <text:p>Search multiple &lt;title&gt; or description tags</text:p>
            <text:p/>
            <text:p> Check: Only one exists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No duplicate meta tags should exis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meta tags are consistent across desktop and mobile versions.</text:p>
          </table:table-cell>
          <table:table-cell table:style-name="ce3" office:value-type="string" calcext:value-type="string">
            <text:p>Open on desktop</text:p>
            <text:p>Open on mobile / DevTools</text:p>
            <text:p/>
            <text:p> Check: Same meta tags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Meta tags should be same on all device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page Meta Tags</text:p>
          </table:table-cell>
          <table:table-cell table:style-name="ce3" office:value-type="string" calcext:value-type="string">
            <text:p>Verify content renders correctly across all browsers (Chrome, Edge, Safari).</text:p>
          </table:table-cell>
          <table:table-cell table:style-name="ce3" office:value-type="string" calcext:value-type="string">
            <text:p>Open in Chrome, Edge, Safari</text:p>
            <text:p/>
            <text:p> Check: Same content visible</text:p>
          </table:table-cell>
          <table:table-cell table:style-name="ce3" office:value-type="string" calcext:value-type="string">
            <text:p>Meta tags validation</text:p>
          </table:table-cell>
          <table:table-cell table:style-name="ce3" office:value-type="string" calcext:value-type="string">
            <text:p>Meta tags should render correctly in all browser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55" table:style-name="ta4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isSimilarTo property is present in Car schema on model and variant pages.</text:p>
          </table:table-cell>
          <table:table-cell table:style-name="ce3" office:value-type="string" calcext:value-type="string">
            <text:p>Open model/variant page</text:p>
            <text:p>Right-click → View Page Source</text:p>
            <text:p>Search isSimilarTo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isSimilarTo property should be present in Car schema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the current model is not included in its own isSimilarTo array.</text:p>
          </table:table-cell>
          <table:table-cell table:style-name="ce3" office:value-type="string" calcext:value-type="string">
            <text:p>Check values inside isSimilarTo</text:p>
            <text:p>Compare with current model name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isSimilarTo property should be present in Car schema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for Nissan Patrol, the value “Nissan Patrol” is not present inside its own isSimilarTo list.</text:p>
          </table:table-cell>
          <table:table-cell table:style-name="ce3" office:value-type="string" calcext:value-type="string">
            <text:p>Open Nissan Patrol page</text:p>
            <text:p>Search isSimilarTo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“Nissan Patrol” should not appear in its own lis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all entries in isSimilarTo represent different models only.</text:p>
          </table:table-cell>
          <table:table-cell table:style-name="ce3" office:value-type="string" calcext:value-type="string">
            <text:p>Check all entries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All entries should be different model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no duplicate models exist within the isSimilarTo array.</text:p>
          </table:table-cell>
          <table:table-cell table:style-name="ce3" office:value-type="string" calcext:value-type="string">
            <text:p>Scan list for repeated models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No duplicate models should exis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schema structure remains valid after removal of self-reference.</text:p>
          </table:table-cell>
          <table:table-cell table:style-name="ce3" office:value-type="string" calcext:value-type="string">
            <text:p>Copy page URL</text:p>
            <text:p>Test in Rich Results tool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Schema should remain valid after changes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no empty or null entries are present in isSimilarTo.</text:p>
          </table:table-cell>
          <table:table-cell table:style-name="ce3" office:value-type="string" calcext:value-type="string">
            <text:p>Inspect schema values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No empty or null values should exist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schema follows correct Schema.org format for Car type.</text:p>
          </table:table-cell>
          <table:table-cell table:style-name="ce3" office:value-type="string" calcext:value-type="string">
            <text:p>Verify @type: Car structure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Schema should follow correct Car forma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similar models displayed in UI (if mapped) are not affected incorrectly.</text:p>
          </table:table-cell>
          <table:table-cell table:style-name="ce3" office:value-type="string" calcext:value-type="string">
            <text:p>Compare Similar Cars section with schema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UI similar cars should match schema data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consistency between UI similar cars section and schema isSimilarTo.</text:p>
          </table:table-cell>
          <table:table-cell table:style-name="ce3" office:value-type="string" calcext:value-type="string">
            <text:p>Compare Similar Cars section with schema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UI similar cars should match schema data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same validation is applied across all variant pages.</text:p>
          </table:table-cell>
          <table:table-cell table:style-name="ce3" office:value-type="string" calcext:value-type="string">
            <text:p>Open variant pages</text:p>
            <text:p>Repeat checks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Same logic should apply to all variant page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caching does not show outdated schema with self-reference.</text:p>
          </table:table-cell>
          <table:table-cell table:style-name="ce3" office:value-type="string" calcext:value-type="string">
            <text:p>Hard refresh (Ctrl + Shift + R)</text:p>
            <text:p>Recheck schema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Updated schema should reflect after refresh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cross-browser compatibility (Chrome, Edge, Safari).</text:p>
          </table:table-cell>
          <table:table-cell table:style-name="ce3" office:value-type="string" calcext:value-type="string">
            <text:p>Open page in Chrome, Edge, Safari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Should work across all browser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r Schema isSimilarTo Validation</text:p>
          </table:table-cell>
          <table:table-cell table:style-name="ce3" office:value-type="string" calcext:value-type="string">
            <text:p>Verify Arabic and English pages both follow the same logic.</text:p>
          </table:table-cell>
          <table:table-cell table:style-name="ce3" office:value-type="string" calcext:value-type="string">
            <text:p>Open English page</text:p>
            <text:p>Open Arabic page</text:p>
          </table:table-cell>
          <table:table-cell table:style-name="ce3" office:value-type="string" calcext:value-type="string">
            <text:p>Similar cars schema</text:p>
          </table:table-cell>
          <table:table-cell table:style-name="ce3" office:value-type="string" calcext:value-type="string">
            <text:p>Same behavior in English and Arabic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56" table:style-name="ta5">
        <table:table-column table:style-name="co8" table:number-columns-repeated="2" table:default-cell-style-name="Default"/>
        <table:table-column table:style-name="co23" table:default-cell-style-name="Default"/>
        <table:table-column table:style-name="co8" table:number-columns-repeated="1021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view Section H2 Consolidation &amp; Heading Validation</text:p>
          </table:table-cell>
          <table:table-cell table:style-name="ce3" office:value-type="string" calcext:value-type="string">
            <text:p>Verify only one Review H2 section is present on the page after consolidation/renaming.</text:p>
          </table:table-cell>
          <table:table-cell table:style-name="ce3" office:value-type="string" calcext:value-type="string">
            <text:p>Open the page</text:p>
            <text:p>Right-click → Inspect</text:p>
            <text:p>Search &lt;h2&gt; tags</text:p>
          </table:table-cell>
          <table:table-cell table:style-name="ce3" office:value-type="string" calcext:value-type="string">
            <text:p>Review heading validation</text:p>
          </table:table-cell>
          <table:table-cell table:style-name="ce3" office:value-type="string" calcext:value-type="string">
            <text:p>Only one review-related H2 should be presen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view Section H2 Consolidation &amp; Heading Validation</text:p>
          </table:table-cell>
          <table:table-cell table:style-name="ce3" office:value-type="string" calcext:value-type="string">
            <text:p>Verify duplicate Review H2 headings are removed from the DOM.</text:p>
          </table:table-cell>
          <table:table-cell table:style-name="ce3" office:value-type="string" calcext:value-type="string">
            <text:p>In Elements tab</text:p>
            <text:p>Search for “Review” text</text:p>
          </table:table-cell>
          <table:table-cell table:style-name="ce3" office:value-type="string" calcext:value-type="string">
            <text:p>Review heading validation</text:p>
          </table:table-cell>
          <table:table-cell table:style-name="ce3" office:value-type="string" calcext:value-type="string">
            <text:p>No duplicate review H2 headings should exis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view Section H2 Consolidation &amp; Heading Validation</text:p>
          </table:table-cell>
          <table:table-cell table:style-name="ce3" office:value-type="string" calcext:value-type="string">
            <text:p>Verify the remaining/renamed H2 heading has a clear and unique title (e.g., “Expert Review” or “User Reviews”).</text:p>
          </table:table-cell>
          <table:table-cell table:style-name="ce3" office:value-type="string" calcext:value-type="string">
            <text:p>Locate the review H2</text:p>
          </table:table-cell>
          <table:table-cell table:style-name="ce3" office:value-type="string" calcext:value-type="string">
            <text:p>Review heading validation</text:p>
          </table:table-cell>
          <table:table-cell table:style-name="ce3" office:value-type="string" calcext:value-type="string">
            <text:p>H2 should have clear and unique title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view Section H2 Consolidation &amp; Heading Validation</text:p>
          </table:table-cell>
          <table:table-cell table:style-name="ce3" office:value-type="string" calcext:value-type="string">
            <text:p>Verify no two H2 tags have identical text related to reviews.</text:p>
          </table:table-cell>
          <table:table-cell table:style-name="ce3" office:value-type="string" calcext:value-type="string">
            <text:p>Scan all H2 tags</text:p>
            <text:p/>
            <text:p> Check: No two H2 have same review text</text:p>
          </table:table-cell>
          <table:table-cell table:style-name="ce3" office:value-type="string" calcext:value-type="string">
            <text:p>Review heading validation</text:p>
          </table:table-cell>
          <table:table-cell table:style-name="ce3" office:value-type="string" calcext:value-type="string">
            <text:p>No two H2 tags should have same review text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view Section H2 Consolidation &amp; Heading Validation</text:p>
          </table:table-cell>
          <table:table-cell table:style-name="ce3" office:value-type="string" calcext:value-type="string">
            <text:p>Verify content under the removed/merged section is not lost.</text:p>
          </table:table-cell>
          <table:table-cell table:style-name="ce3" office:value-type="string" calcext:value-type="string">
            <text:p>Scroll review section</text:p>
            <text:p/>
            <text:p> Check: All content is present (not lost after merge)</text:p>
          </table:table-cell>
          <table:table-cell table:style-name="ce3" office:value-type="string" calcext:value-type="string">
            <text:p>Review heading validation</text:p>
          </table:table-cell>
          <table:table-cell table:style-name="ce3" office:value-type="string" calcext:value-type="string">
            <text:p>Content should not be lost after merg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view Section H2 Consolidation &amp; Heading Validation</text:p>
          </table:table-cell>
          <table:table-cell table:style-name="ce3" office:value-type="string" calcext:value-type="string">
            <text:p>Verify updated heading is visible correctly on page UI.</text:p>
          </table:table-cell>
          <table:table-cell table:style-name="ce3" office:value-type="string" calcext:value-type="string">
            <text:p>View page normally</text:p>
            <text:p/>
            <text:p> Check: Heading displays correctly in UI</text:p>
          </table:table-cell>
          <table:table-cell table:style-name="ce3" office:value-type="string" calcext:value-type="string">
            <text:p>Review heading validation</text:p>
          </table:table-cell>
          <table:table-cell table:style-name="ce3" office:value-type="string" calcext:value-type="string">
            <text:p>Heading should display correctly on UI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63" table:style-name="ta6"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single variant car model using AE on Web.</text:p>
          </table:table-cell>
          <table:table-cell table:style-name="ce3" office:value-type="string" calcext:value-type="string">
            <text:p>Open AE website on desktop</text:p>
            <text:p>Search a car with single variant</text:p>
            <text:p>Open model page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ice answer should display correct pric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Multiple variant car model using AE on Web.</text:p>
          </table:table-cell>
          <table:table-cell table:style-name="ce3" office:value-type="string" calcext:value-type="string">
            <text:p>Open AE website</text:p>
            <text:p>Search car with multiple variants</text:p>
            <text:p>Open model page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ice range/details should be show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car model without price using AE on Web.</text:p>
          </table:table-cell>
          <table:table-cell table:style-name="ce3" office:value-type="string" calcext:value-type="string">
            <text:p>Open AE website</text:p>
            <text:p>Open car model without price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oper fallback message should appear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single variant car model using AE on Wap.</text:p>
          </table:table-cell>
          <table:table-cell table:style-name="ce3" office:value-type="string" calcext:value-type="string">
            <text:p>Open AE site on mobile</text:p>
            <text:p>Open single variant model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ice answer should be visible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Multiple variant car model using AE on Wap.</text:p>
          </table:table-cell>
          <table:table-cell table:style-name="ce3" office:value-type="string" calcext:value-type="string">
            <text:p>Open AE mobile site</text:p>
            <text:p>Open multi-variant model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Correct price info should be show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car model without price using AE on Wap.</text:p>
          </table:table-cell>
          <table:table-cell table:style-name="ce3" office:value-type="string" calcext:value-type="string">
            <text:p>Open AE mobile</text:p>
            <text:p>Open model without price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Fallback message should be show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single variant car model using KSA on Web.</text:p>
          </table:table-cell>
          <table:table-cell table:style-name="ce3" office:value-type="string" calcext:value-type="string">
            <text:p>Open KSA website on desktop</text:p>
            <text:p>Open single variant model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ice answer should display correctly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Multiple variant car model using KSA on Web.</text:p>
          </table:table-cell>
          <table:table-cell table:style-name="ce3" office:value-type="string" calcext:value-type="string">
            <text:p>Open KSA site</text:p>
            <text:p>Open multi-variant model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ice range should be correct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car model without price using KSA on Web.</text:p>
          </table:table-cell>
          <table:table-cell table:style-name="ce3" office:value-type="string" calcext:value-type="string">
            <text:p>Open KSA site</text:p>
            <text:p>Open model without price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oper message should be show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single variant car model using KSA on Wap.</text:p>
          </table:table-cell>
          <table:table-cell table:style-name="ce3" office:value-type="string" calcext:value-type="string">
            <text:p>Open KSA mobile site</text:p>
            <text:p>Open single variant model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Price should be visibl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Multiple variant car model using KSA on Wap.</text:p>
          </table:table-cell>
          <table:table-cell table:style-name="ce3" office:value-type="string" calcext:value-type="string">
            <text:p>Open KSA mobile</text:p>
            <text:p>Open multi-variant model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Correct price info should be show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tomated Price Answer Validation</text:p>
          </table:table-cell>
          <table:table-cell table:style-name="ce3" office:value-type="string" calcext:value-type="string">
            <text:p>Verified by checking if the user is able to see Automated Pirce answer for a car model without price using KSA on Wap.</text:p>
          </table:table-cell>
          <table:table-cell table:style-name="ce3" office:value-type="string" calcext:value-type="string">
            <text:p>Open KSA mobile</text:p>
            <text:p>Open model without price</text:p>
          </table:table-cell>
          <table:table-cell table:style-name="ce3" office:value-type="string" calcext:value-type="string">
            <text:p>Automated price validation</text:p>
          </table:table-cell>
          <table:table-cell table:style-name="ce3" office:value-type="string" calcext:value-type="string">
            <text:p>Fallback message should be show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68" table:style-name="ta7">
        <table:table-column table:style-name="co8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tag is added for imagecdnsa.zigwheels.ae and same for ksa</text:p>
          </table:table-cell>
          <table:table-cell table:style-name="ce3" office:value-type="string" calcext:value-type="string">
            <text:p>Open website (AE/KSA)</text:p>
            <text:p>Right-click → View Page Source</text:p>
            <text:p>Search preconnect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Preconnect tag should exist for image CDN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tag is added for Carbay CDN</text:p>
          </table:table-cell>
          <table:table-cell table:style-name="ce3" office:value-type="string" calcext:value-type="string">
            <text:p>In page source</text:p>
            <text:p>Search Carbay CDN URL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Preconnect tag should exist for Carbay CD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tags are present inside &lt;head&gt; section</text:p>
          </table:table-cell>
          <table:table-cell table:style-name="ce3" office:value-type="string" calcext:value-type="string">
            <text:p>Check &lt;head&gt; section</text:p>
            <text:p/>
            <text:p> Check: All preconnect tags are inside &lt;head&gt;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Tags should be inside &lt;head&gt;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no duplicate preconnect tags exist for the same domain</text:p>
          </table:table-cell>
          <table:table-cell table:style-name="ce3" office:value-type="string" calcext:value-type="string">
            <text:p>Search same domain multiple times</text:p>
            <text:p/>
            <text:p> Check: No duplicate preconnect tags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No duplicate preconnect tags for same domain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URLs are correct and valid</text:p>
          </table:table-cell>
          <table:table-cell table:style-name="ce3" office:value-type="string" calcext:value-type="string">
            <text:p>Check each preconnect URL</text:p>
            <text:p/>
            <text:p> Check: URLs are correct and valid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All preconnect URLs should be valid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tags are loaded before other resources</text:p>
          </table:table-cell>
          <table:table-cell table:style-name="ce3" office:value-type="string" calcext:value-type="string">
            <text:p>Inspect &lt;head&gt; order</text:p>
            <text:p/>
            <text:p> Check: Preconnect loads before other resources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Preconnect should load before other resource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CDN connection is initiated early using preconnect</text:p>
          </table:table-cell>
          <table:table-cell table:style-name="ce3" office:value-type="string" calcext:value-type="string">
            <text:p>Open DevTools → Network tab</text:p>
            <text:p>Reload page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CDN connection should initiate early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no invalid or broken preconnect links are present</text:p>
          </table:table-cell>
          <table:table-cell table:style-name="ce3" office:value-type="string" calcext:value-type="string">
            <text:p>Inspect all preconnect links</text:p>
            <text:p/>
            <text:p> Check: No broken/invalid links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No invalid or broken preconnect link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does not impact page functionality</text:p>
          </table:table-cell>
          <table:table-cell table:style-name="ce3" office:value-type="string" calcext:value-type="string">
            <text:p>Browse page normally</text:p>
            <text:p/>
            <text:p> Check: No UI/function issues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Preconnect should not affect page functionality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econnect Tag &amp; CDN Optimization Validation</text:p>
          </table:table-cell>
          <table:table-cell table:style-name="ce3" office:value-type="string" calcext:value-type="string">
            <text:p>Verify preconnect works across different browsers</text:p>
          </table:table-cell>
          <table:table-cell table:style-name="ce3" office:value-type="string" calcext:value-type="string">
            <text:p>Open in Chrome, Edge, Safari</text:p>
            <text:p/>
            <text:p> Check: Works correctly in all browsers</text:p>
          </table:table-cell>
          <table:table-cell table:style-name="ce3" office:value-type="string" calcext:value-type="string">
            <text:p>Preconnect CDN validation</text:p>
          </table:table-cell>
          <table:table-cell table:style-name="ce3" office:value-type="string" calcext:value-type="string">
            <text:p>Should work across all browser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05" table:style-name="ta8">
        <table:table-column table:style-name="co8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WebPage schema is present on the model page and follows valid Schema.org structure.</text:p>
          </table:table-cell>
          <table:table-cell table:style-name="ce3" office:value-type="string" calcext:value-type="string">
            <text:p>Open model page</text:p>
            <text:p>Right-click → View Page Source</text:p>
            <text:p>Search WebPage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WebPage schema should be present and valid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significantLink property contains only valid and accessible URLs.</text:p>
          </table:table-cell>
          <table:table-cell table:style-name="ce3" office:value-type="string" calcext:value-type="string">
            <text:p>earch significantLink in source</text:p>
            <text:p>Check URLs listed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Only valid and accessible URLs should be presen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brochure URL (/model/brochure?...) is removed from significantLink.</text:p>
          </table:table-cell>
          <table:table-cell table:style-name="ce3" office:value-type="string" calcext:value-type="string">
            <text:p>Check significantLink list</text:p>
            <text:p>Look for /brochure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Only valid and accessible URLs should be presen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significantLink includes relevant model pages:Specifications page, Price page, Images page, User reviews page,FAQs page,Dealer listing page</text:p>
          </table:table-cell>
          <table:table-cell table:style-name="ce3" office:value-type="string" calcext:value-type="string">
            <text:p>Verify links for:</text:p>
            <text:p/>
            <text:p>Specs</text:p>
            <text:p>Price</text:p>
            <text:p>Images</text:p>
            <text:p>Reviews</text:p>
            <text:p>FAQ</text:p>
            <text:p>Dealer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: All relevant model links should be included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ll URLs in significantLink return HTTP 200 status.</text:p>
          </table:table-cell>
          <table:table-cell table:style-name="ce3" office:value-type="string" calcext:value-type="string">
            <text:p>Copy URLs</text:p>
            <text:p>Open in new tab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All URLs should return 200 status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o broken or redirected URLs are present in significantLink.</text:p>
          </table:table-cell>
          <table:table-cell table:style-name="ce3" office:value-type="string" calcext:value-type="string">
            <text:p>Open URLs</text:p>
            <text:p>Check if redirect or error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broken or redirected URLs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Critic Review schema is completely removed from model page.</text:p>
          </table:table-cell>
          <table:table-cell table:style-name="ce3" office:value-type="string" calcext:value-type="string">
            <text:p>search critic review and check 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CriticReview schema should not exis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o CriticReview or similar schema exists in page source.</text:p>
          </table:table-cell>
          <table:table-cell table:style-name="ce3" office:value-type="string" calcext:value-type="string">
            <text:p>Search similar schema keywords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similar review schema should exis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uthor Name is removed from UI where Critic Review was shown.</text:p>
          </table:table-cell>
          <table:table-cell table:style-name="ce3" office:value-type="string" calcext:value-type="string">
            <text:p>Check UI where review was there 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Author name should not be visible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Overall Rating related to critic review is removed from UI.</text:p>
          </table:table-cell>
          <table:table-cell table:style-name="ce3" office:value-type="string" calcext:value-type="string">
            <text:p>Check UI where review was there 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rating should not be visible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o schema validation errors occur after removing Critic Review schema.</text:p>
          </table:table-cell>
          <table:table-cell table:style-name="ce3" office:value-type="string" calcext:value-type="string">
            <text:p>Use Rich Results Test</text:p>
            <text:p>Paste URL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validation errors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rticle schema (if present) is updated and valid.</text:p>
          </table:table-cell>
          <table:table-cell table:style-name="ce3" office:value-type="string" calcext:value-type="string">
            <text:p>Search Article</text:p>
            <text:p>Validate fields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Article schema should be valid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rticle schema fields match visible content on page.</text:p>
          </table:table-cell>
          <table:table-cell table:style-name="ce3" office:value-type="string" calcext:value-type="string">
            <text:p>Compare schema vs UI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Article schema should matches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ItemList schema is present and valid on model page.</text:p>
          </table:table-cell>
          <table:table-cell table:style-name="ce3" office:value-type="string" calcext:value-type="string">
            <text:p>Compare schema vs UI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item list should be present 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variant name in ItemList schema exactly matches UI (e.g., “Smart Two Tone AWD”).</text:p>
          </table:table-cell>
          <table:table-cell table:style-name="ce3" office:value-type="string" calcext:value-type="string">
            <text:p>Compare schema vs UI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varient name in item schema should match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prefix like “Hyundai Tucson” is removed from variant name in schema.</text:p>
          </table:table-cell>
          <table:table-cell table:style-name="ce3" office:value-type="string" calcext:value-type="string">
            <text:p>Compare schema vs UI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model prefix in variant name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ame field in schema is consistent with UI text.</text:p>
          </table:table-cell>
          <table:table-cell table:style-name="ce3" office:value-type="string" calcext:value-type="string">
            <text:p>Verify schema name field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model prefix in variant name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description field includes model + country context (KSA/UAE).</text:p>
          </table:table-cell>
          <table:table-cell table:style-name="ce3" office:value-type="string" calcext:value-type="string">
            <text:p>Verify description contains model + country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Description should include model + country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o mismatch exists between UI and schema for any variant.</text:p>
          </table:table-cell>
          <table:table-cell table:style-name="ce3" office:value-type="string" calcext:value-type="string">
            <text:p>Compare all variant data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mismatch between UI and schema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ItemList schema passes validation in Rich Results Test.</text:p>
          </table:table-cell>
          <table:table-cell table:style-name="ce3" office:value-type="string" calcext:value-type="string">
            <text:p>Test ItemList in tool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Schema should pass validation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reaServed property is added in Car/Product schema under offers.</text:p>
          </table:table-cell>
          <table:table-cell table:style-name="ce3" office:value-type="string" calcext:value-type="string">
            <text:p>Test ItemList in tool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areaServed should be presen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reaServed value is set to “Saudi Arabia” for KSA pages.</text:p>
          </table:table-cell>
          <table:table-cell table:style-name="ce3" office:value-type="string" calcext:value-type="string">
            <text:p>Search areaServed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Value should be “Saudi Arabia”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correct Schema.org structure is used for areaServed (@type: Country).</text:p>
          </table:table-cell>
          <table:table-cell table:style-name="ce3" office:value-type="string" calcext:value-type="string">
            <text:p>Check @type: Country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Should use @type: Country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reaServed appears after vehicle model year/date field.</text:p>
          </table:table-cell>
          <table:table-cell table:style-name="ce3" office:value-type="string" calcext:value-type="string">
            <text:p>Check @type: Country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Should use @type: Country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Organization schema on homepage includes areaServed.</text:p>
          </table:table-cell>
          <table:table-cell table:style-name="ce3" office:value-type="string" calcext:value-type="string">
            <text:p>Open homepage</text:p>
            <text:p>Search Organization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Organization schema should exis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Organization areaServed is set to “Saudi Arabia”.</text:p>
          </table:table-cell>
          <table:table-cell table:style-name="ce3" office:value-type="string" calcext:value-type="string">
            <text:p>Open homepage</text:p>
            <text:p>Search Organization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Organization schema should exist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utoDealer schema includes areaServed property.</text:p>
          </table:table-cell>
          <table:table-cell table:style-name="ce3" office:value-type="string" calcext:value-type="string">
            <text:p>Open dealer page</text:p>
            <text:p>Search schema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Should be “Saudi Arabia”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dealer pages reflect correct country in areaServed.</text:p>
          </table:table-cell>
          <table:table-cell table:style-name="ce3" office:value-type="string" calcext:value-type="string">
            <text:p>Verify correct country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Correct country should be shown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areaServed implementation does not break schema validation.</text:p>
          </table:table-cell>
          <table:table-cell table:style-name="ce3" office:value-type="string" calcext:value-type="string">
            <text:p>Run validation tool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validation issues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Car schema remains unchanged and valid.</text:p>
          </table:table-cell>
          <table:table-cell table:style-name="ce3" office:value-type="string" calcext:value-type="string">
            <text:p>Check Car schema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validation issues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o duplicate schema types exist after updates.</text:p>
          </table:table-cell>
          <table:table-cell table:style-name="ce3" office:value-type="string" calcext:value-type="string">
            <text:p>Search repeated schema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Car schema should remain valid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no console errors occur due to schema changes.</text:p>
          </table:table-cell>
          <table:table-cell table:style-name="ce3" office:value-type="string" calcext:value-type="string">
            <text:p>Open DevTools → Console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No console errors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schema is consistent across all model pages.</text:p>
          </table:table-cell>
          <table:table-cell table:style-name="ce3" office:value-type="string" calcext:value-type="string">
            <text:p>Open multiple model pages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Schema should be consistent across pages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(Schema) Validation</text:p>
          </table:table-cell>
          <table:table-cell table:style-name="ce3" office:value-type="string" calcext:value-type="string">
            <text:p>Verify schema works correctly for both English and Arabic pages.</text:p>
          </table:table-cell>
          <table:table-cell table:style-name="ce3" office:value-type="string" calcext:value-type="string">
            <text:p>Open English page</text:p>
            <text:p>Open Arabic page</text:p>
          </table:table-cell>
          <table:table-cell table:style-name="ce3" office:value-type="string" calcext:value-type="string">
            <text:p>Schema validation testing</text:p>
          </table:table-cell>
          <table:table-cell table:style-name="ce3" office:value-type="string" calcext:value-type="string">
            <text:p>Schema should be consistent across pages.</text:p>
          </table:table-cell>
          <table:table-cell table:style-name="ce3" office:value-type="string" calcext:value-type="string">
            <text:p>working without error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49" table:style-name="ta9">
        <table:table-column table:style-name="co8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all brands are loaded server-side in initial HTML.</text:p>
          </table:table-cell>
          <table:table-cell table:style-name="ce3" office:value-type="string" calcext:value-type="string">
            <text:p>Open KSA brands page</text:p>
            <text:p>Right-click → View Page Source</text:p>
            <text:p/>
            <text:p> Check: All brands present in HTML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All brands should be present in initial HTML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only top brands are visible in initial view.</text:p>
          </table:table-cell>
          <table:table-cell table:style-name="ce3" office:value-type="string" calcext:value-type="string">
            <text:p>Open page normally</text:p>
            <text:p/>
            <text:p> Check: Only top brands are visible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Only top brands should be visible initially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clicking View More expands brand list on same page.</text:p>
          </table:table-cell>
          <table:table-cell table:style-name="ce3" office:value-type="string" calcext:value-type="string">
            <text:p>Click View More</text:p>
            <text:p/>
            <text:p> Check: Remaining brands expand on same page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Only top brands should be visible initially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no page redirect occurs on clicking View More.</text:p>
          </table:table-cell>
          <table:table-cell table:style-name="ce3" office:value-type="string" calcext:value-type="string">
            <text:p>Click View More</text:p>
            <text:p>Observe URL</text:p>
            <text:p/>
            <text:p> Check: URL does not change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No page redirect should occur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no popup opens on clicking View More.</text:p>
          </table:table-cell>
          <table:table-cell table:style-name="ce3" office:value-type="string" calcext:value-type="string">
            <text:p>Click View More</text:p>
            <text:p/>
            <text:p> Check: No popup opens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No popup should open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brand names do not include “Saudi Arabia”.</text:p>
          </table:table-cell>
          <table:table-cell table:style-name="ce3" office:value-type="string" calcext:value-type="string">
            <text:p>Click View More</text:p>
            <text:p> Check: No popup opens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Brand names should not include “Saudi Arabia”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UI layout is not distorted after expansion.</text:p>
          </table:table-cell>
          <table:table-cell table:style-name="ce3" office:value-type="string" calcext:value-type="string">
            <text:p>Observe layout before &amp; after expand</text:p>
            <text:p/>
            <text:p> Check: No distortion or overlap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UI should remain properly aligned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functionality works correctly on desktop.</text:p>
          </table:table-cell>
          <table:table-cell table:style-name="ce3" office:value-type="string" calcext:value-type="string">
            <text:p>Test on desktop browser</text:p>
            <text:p>Click View More</text:p>
            <text:p/>
            <text:p> Check: Works correctly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UI should remain properly aligned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functionality works correctly on mobile.</text:p>
          </table:table-cell>
          <table:table-cell table:style-name="ce3" office:value-type="string" calcext:value-type="string">
            <text:p>Test on desktop browser</text:p>
            <text:p>Click View More</text:p>
            <text:p/>
            <text:p> Check: Works correctly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Functionality should work correctly on desktop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behavior is consistent with New Cars page.</text:p>
          </table:table-cell>
          <table:table-cell table:style-name="ce3" office:value-type="string" calcext:value-type="string">
            <text:p>Open page on mobile</text:p>
            <text:p>Click View More</text:p>
            <text:p/>
            <text:p> Check: Same behavior as desktop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Functionality should work correctly on mobil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page performance is not impacted.</text:p>
          </table:table-cell>
          <table:table-cell table:style-name="ce3" office:value-type="string" calcext:value-type="string">
            <text:p>Open New Cars page</text:p>
            <text:p>Compare behavior</text:p>
            <text:p/>
            <text:p> Check: Same expand functionality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Page performance should not be impacted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p Brands Expansion &amp; UI Behavior Validation</text:p>
          </table:table-cell>
          <table:table-cell table:style-name="ce3" office:value-type="string" calcext:value-type="string">
            <text:p>Verify multiple clicks on View More do not cause duplication or UI issues.</text:p>
          </table:table-cell>
          <table:table-cell table:style-name="ce3" office:value-type="string" calcext:value-type="string">
            <text:p>Click View More multiple times</text:p>
            <text:p/>
            <text:p> Check: No duplication or UI break</text:p>
          </table:table-cell>
          <table:table-cell table:style-name="ce3" office:value-type="string" calcext:value-type="string">
            <text:p>Top brand validation</text:p>
          </table:table-cell>
          <table:table-cell table:style-name="ce3" office:value-type="string" calcext:value-type="string">
            <text:p>No duplication or UI break on multiple clicks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785" table:style-name="ta10">
        <table:table-column table:style-name="co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Navigation &amp; Language Visibility Validation</text:p>
          </table:table-cell>
          <table:table-cell table:style-name="ce3" office:value-type="string" calcext:value-type="string">
            <text:p>Verified by checking if the user is able to able navigate to FAQ detail page using wap on arabic pages.</text:p>
          </table:table-cell>
          <table:table-cell table:style-name="ce3" office:value-type="string" calcext:value-type="string">
            <text:p>Open website on mobile (WAP)</text:p>
            <text:p>Switch language to Arabic</text:p>
            <text:p>Navigate to FAQ section</text:p>
            <text:p>Click any FAQ</text:p>
          </table:table-cell>
          <table:table-cell table:style-name="ce3" office:value-type="string" calcext:value-type="string">
            <text:p>FAQ language validation</text:p>
          </table:table-cell>
          <table:table-cell table:style-name="ce3" office:value-type="string" calcext:value-type="string">
            <text:p>User should be able to navigate to FAQ detail pag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Navigation &amp; Language Visibility Validation</text:p>
          </table:table-cell>
          <table:table-cell table:style-name="ce3" office:value-type="string" calcext:value-type="string">
            <text:p>Verified by checking if the faq is visible on default language only.</text:p>
          </table:table-cell>
          <table:table-cell table:style-name="ce3" office:value-type="string" calcext:value-type="string">
            <text:p>Open website in default language (English)</text:p>
            <text:p>Go to FAQ section</text:p>
          </table:table-cell>
          <table:table-cell table:style-name="ce3" office:value-type="string" calcext:value-type="string">
            <text:p>FAQ language validation</text:p>
          </table:table-cell>
          <table:table-cell table:style-name="ce3" office:value-type="string" calcext:value-type="string">
            <text:p>User should be able to navigate to FAQ detail pag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Navigation &amp; Language Visibility Validation</text:p>
          </table:table-cell>
          <table:table-cell table:style-name="ce3" office:value-type="string" calcext:value-type="string">
            <text:p>Verified by checking if the faq is not visible on Arabic language.</text:p>
          </table:table-cell>
          <table:table-cell table:style-name="ce3" office:value-type="string" calcext:value-type="string">
            <text:p>Switch to Arabic language</text:p>
            <text:p>Open same FAQ section</text:p>
          </table:table-cell>
          <table:table-cell table:style-name="ce3" office:value-type="string" calcext:value-type="string">
            <text:p>FAQ language validation</text:p>
          </table:table-cell>
          <table:table-cell table:style-name="ce3" office:value-type="string" calcext:value-type="string">
            <text:p>FAQs should be visible in default (English) language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Navigation &amp; Language Visibility Validation</text:p>
          </table:table-cell>
          <table:table-cell table:style-name="ce3" office:value-type="string" calcext:value-type="string">
            <text:p>Verified by checking if the pages are working are working fine on web using eng.</text:p>
          </table:table-cell>
          <table:table-cell table:style-name="ce3" office:value-type="string" calcext:value-type="string">
            <text:p>Open website on desktop (web)</text:p>
            <text:p>Browse FAQ pages in English</text:p>
          </table:table-cell>
          <table:table-cell table:style-name="ce3" office:value-type="string" calcext:value-type="string">
            <text:p>FAQ language validation</text:p>
          </table:table-cell>
          <table:table-cell table:style-name="ce3" office:value-type="string" calcext:value-type="string">
            <text:p>FAQs should not be visible in Arabic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Navigation &amp; Language Visibility Validation</text:p>
          </table:table-cell>
          <table:table-cell table:style-name="ce3" office:value-type="string" calcext:value-type="string">
            <text:p>Verified by checking if the pages are working are working fine on web using Arabic.</text:p>
          </table:table-cell>
          <table:table-cell table:style-name="ce3" office:value-type="string" calcext:value-type="string">
            <text:p>Switch to Arabic on web</text:p>
            <text:p>Navigate through pages</text:p>
          </table:table-cell>
          <table:table-cell table:style-name="ce3" office:value-type="string" calcext:value-type="string">
            <text:p>FAQ language validation</text:p>
          </table:table-cell>
          <table:table-cell table:style-name="ce3" office:value-type="string" calcext:value-type="string">
            <text:p>Pages should load and work correctly in English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Navigation &amp; Language Visibility Validation</text:p>
          </table:table-cell>
          <table:table-cell table:style-name="ce3" office:value-type="string" calcext:value-type="string">
            <text:p>Verified by checking if the user is not getting error pages.</text:p>
          </table:table-cell>
          <table:table-cell table:style-name="ce3" office:value-type="string" calcext:value-type="string">
            <text:p>Switch to Arabic on web</text:p>
            <text:p>Navigate through pages</text:p>
          </table:table-cell>
          <table:table-cell table:style-name="ce3" office:value-type="string" calcext:value-type="string">
            <text:p>FAQ language validation</text:p>
          </table:table-cell>
          <table:table-cell table:style-name="ce3" office:value-type="string" calcext:value-type="string">
            <text:p>Pages should load and work correctly in Arabic.</text:p>
          </table:table-cell>
          <table:table-cell table:style-name="ce3" office:value-type="string" calcext:value-type="string">
            <text:p>works without error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06" table:style-name="ta11">
        <table:table-column table:style-name="co8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Model Overview page loads as a single unified scrollable page.</text:p>
          </table:table-cell>
          <table:table-cell table:style-name="ce3" office:value-type="string" calcext:value-type="string">
            <text:p>Open a Model Overview page.</text:p>
            <text:p>Scroll down completely.</text:p>
            <text:p>Check if all sections are on the same page (no page reload)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Page loads as one continuous scroll without reload.</text:p>
          </table:table-cell>
          <table:table-cell table:style-name="ce3" office:value-type="string" calcext:value-type="string">
            <text:p>Page behaves as a single scrollable layou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o separate URLs exist for Images, Specs, Reviews, News, Videos, etc.</text:p>
          </table:table-cell>
          <table:table-cell table:style-name="ce3" office:value-type="string" calcext:value-type="string">
            <text:p>Click on Images, Specs, Reviews sections.</text:p>
            <text:p>Observe browser URL.</text:p>
            <text:p>Confirm URL does not change to a new page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URL does not change when clicking sections.</text:p>
          </table:table-cell>
          <table:table-cell table:style-name="ce3" office:value-type="string" calcext:value-type="string">
            <text:p>URL remains same (no redirection)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top navigation bar does not redirect to separate model-related pages.</text:p>
          </table:table-cell>
          <table:table-cell table:style-name="ce3" office:value-type="string" calcext:value-type="string">
            <text:p>Click each navigation item from top bar.</text:p>
            <text:p>Check if page reloads or redirects.</text:p>
            <text:p>Confirm it only scrolls within same page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Clicking nav items scrolls, not redirects.</text:p>
          </table:table-cell>
          <table:table-cell table:style-name="ce3" office:value-type="string" calcext:value-type="string">
            <text:p>Navigation works via scrolling on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Overview in navigation scrolls to ATF section.</text:p>
          </table:table-cell>
          <table:table-cell table:style-name="ce3" office:value-type="string" calcext:value-type="string">
            <text:p>Click “Overview” in navigation.</text:p>
            <text:p>Verify page scrolls to top/ATF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ATF/top section.</text:p>
          </table:table-cell>
          <table:table-cell table:style-name="ce3" office:value-type="string" calcext:value-type="string">
            <text:p>Lands correctly at top sectio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Specs scrolls to “Key Specs &amp; Features” section.</text:p>
          </table:table-cell>
          <table:table-cell table:style-name="ce3" office:value-type="string" calcext:value-type="string">
            <text:p>Click “Specs”.</text:p>
            <text:p>Confirm it scrolls to “Key Specs &amp; Features”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“Key Specs &amp; Features</text:p>
          </table:table-cell>
          <table:table-cell table:style-name="ce3" office:value-type="string" calcext:value-type="string">
            <text:p>Correct section is displayed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Price scrolls to “Variants, Spec &amp; Price in KSA” section.</text:p>
          </table:table-cell>
          <table:table-cell table:style-name="ce3" office:value-type="string" calcext:value-type="string">
            <text:p>Click “Price”.</text:p>
            <text:p>Verify scroll to “Variants, Spec &amp; Price in KSA”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price section.</text:p>
          </table:table-cell>
          <table:table-cell table:style-name="ce3" office:value-type="string" calcext:value-type="string">
            <text:p>Lands on correct pricing sectio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Expert Review scrolls to “Expert Opinion” section.</text:p>
          </table:table-cell>
          <table:table-cell table:style-name="ce3" office:value-type="string" calcext:value-type="string">
            <text:p>Click “Expert Review”.</text:p>
            <text:p>Confirm correct section opens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Expert Opinion section.</text:p>
          </table:table-cell>
          <table:table-cell table:style-name="ce3" office:value-type="string" calcext:value-type="string">
            <text:p>Section load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Images scrolls to Images section.</text:p>
          </table:table-cell>
          <table:table-cell table:style-name="ce3" office:value-type="string" calcext:value-type="string">
            <text:p>Click “Images”.</text:p>
            <text:p>Verify scroll to Images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Images section.</text:p>
          </table:table-cell>
          <table:table-cell table:style-name="ce3" office:value-type="string" calcext:value-type="string">
            <text:p>Images section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Videos scrolls to Videos section.</text:p>
          </table:table-cell>
          <table:table-cell table:style-name="ce3" office:value-type="string" calcext:value-type="string">
            <text:p>Click “Videos”.</text:p>
            <text:p>Confirm correct section loads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Videos section</text:p>
          </table:table-cell>
          <table:table-cell table:style-name="ce3" office:value-type="string" calcext:value-type="string">
            <text:p>Videos section display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Compare scrolls to “Vs Competitors” section.</text:p>
          </table:table-cell>
          <table:table-cell table:style-name="ce3" office:value-type="string" calcext:value-type="string">
            <text:p>Click “Compare”.</text:p>
            <text:p>Verify scroll to comparison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comparison section.</text:p>
          </table:table-cell>
          <table:table-cell table:style-name="ce3" office:value-type="string" calcext:value-type="string">
            <text:p>Correct comparison section show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Review scrolls to Reviews &amp; Ratings section.</text:p>
          </table:table-cell>
          <table:table-cell table:style-name="ce3" office:value-type="string" calcext:value-type="string">
            <text:p>Click “Review”.</text:p>
            <text:p>Confirm correct section opens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Reviews &amp; Ratings.</text:p>
          </table:table-cell>
          <table:table-cell table:style-name="ce3" office:value-type="string" calcext:value-type="string">
            <text:p>Reviews section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FAQ scrolls to FAQ section.</text:p>
          </table:table-cell>
          <table:table-cell table:style-name="ce3" office:value-type="string" calcext:value-type="string">
            <text:p>Click “FAQ”.</text:p>
            <text:p>Verify scroll to FAQ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FAQ section.</text:p>
          </table:table-cell>
          <table:table-cell table:style-name="ce3" office:value-type="string" calcext:value-type="string">
            <text:p>FAQ section display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Car Dealer scrolls to Dealer / Showroom section.</text:p>
          </table:table-cell>
          <table:table-cell table:style-name="ce3" office:value-type="string" calcext:value-type="string">
            <text:p>Click “Car Dealer”.</text:p>
            <text:p>Confirm scroll to dealer/showroom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dealer/showroom section</text:p>
          </table:table-cell>
          <table:table-cell table:style-name="ce3" office:value-type="string" calcext:value-type="string">
            <text:p>Dealer section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News scrolls to News &amp; Articles section.</text:p>
          </table:table-cell>
          <table:table-cell table:style-name="ce3" office:value-type="string" calcext:value-type="string">
            <text:p>Click “News”.</text:p>
            <text:p>Verify scroll to news/articles section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News &amp; Articles.</text:p>
          </table:table-cell>
          <table:table-cell table:style-name="ce3" office:value-type="string" calcext:value-type="string">
            <text:p>News section display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Brochure scrolls to Brochure download section.</text:p>
          </table:table-cell>
          <table:table-cell table:style-name="ce3" office:value-type="string" calcext:value-type="string">
            <text:p>Click “Brochure”.</text:p>
            <text:p>Confirm scroll to brochure download section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s to brochure section</text:p>
          </table:table-cell>
          <table:table-cell table:style-name="ce3" office:value-type="string" calcext:value-type="string">
            <text:p>Brochure section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items follow the same order as page widgets.</text:p>
          </table:table-cell>
          <table:table-cell table:style-name="ce3" office:value-type="string" calcext:value-type="string">
            <text:p>Compare nav items order with page sections.</text:p>
            <text:p>Confirm both follow same sequence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 items follow same order as page sections.</text:p>
          </table:table-cell>
          <table:table-cell table:style-name="ce3" office:value-type="string" calcext:value-type="string">
            <text:p>Order is consisten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page URL does not change when navigating between sections.</text:p>
          </table:table-cell>
          <table:table-cell table:style-name="ce3" office:value-type="string" calcext:value-type="string">
            <text:p>Click multiple nav items.</text:p>
            <text:p>Observe URL bar.</text:p>
            <text:p>Confirm no change (except anchor if used)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URL remains same during navigation.</text:p>
          </table:table-cell>
          <table:table-cell table:style-name="ce3" office:value-type="string" calcext:value-type="string">
            <text:p>No URL change observ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anchor navigation works correctly on page refresh.</text:p>
          </table:table-cell>
          <table:table-cell table:style-name="ce3" office:value-type="string" calcext:value-type="string">
            <text:p>Click any section (e.g., Specs).</text:p>
            <text:p>Refresh page.</text:p>
            <text:p>Confirm page opens at same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Page opens at same section after refresh.</text:p>
          </table:table-cell>
          <table:table-cell table:style-name="ce3" office:value-type="string" calcext:value-type="string">
            <text:p>Anchor navigation 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clicking navigation items multiple times scrolls correctly each time.</text:p>
          </table:table-cell>
          <table:table-cell table:style-name="ce3" office:value-type="string" calcext:value-type="string">
            <text:p>Click same nav item multiple times.</text:p>
            <text:p>Confirm it scrolls correctly every time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Repeated clicks scroll correctly each time.</text:p>
          </table:table-cell>
          <table:table-cell table:style-name="ce3" office:value-type="string" calcext:value-type="string">
            <text:p>No issue on repeated click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scrolls to correct section even with dynamic content loaded.</text:p>
          </table:table-cell>
          <table:table-cell table:style-name="ce3" office:value-type="string" calcext:value-type="string">
            <text:p>Wait for page to fully load (lazy content).</text:p>
            <text:p>Click nav items.</text:p>
            <text:p>Confirm scroll still lands correctly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croll lands correctly even after lazy loading.</text:p>
          </table:table-cell>
          <table:table-cell table:style-name="ce3" office:value-type="string" calcext:value-type="string">
            <text:p>Navigation 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section IDs are unique and correctly mapped to navigation items.</text:p>
          </table:table-cell>
          <table:table-cell table:style-name="ce3" office:value-type="string" calcext:value-type="string">
            <text:p>Inspect sections using DevTools.</text:p>
            <text:p>Check each section has unique ID.</text:p>
            <text:p>Match IDs with nav links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Each section has unique ID mapped to nav.</text:p>
          </table:table-cell>
          <table:table-cell table:style-name="ce3" office:value-type="string" calcext:value-type="string">
            <text:p>IDs are correct and uniqu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scrolling position aligns correctly with section heading (no partial cutoff).</text:p>
          </table:table-cell>
          <table:table-cell table:style-name="ce3" office:value-type="string" calcext:value-type="string">
            <text:p>Click any nav item.</text:p>
            <text:p>Check if heading is fully visible.</text:p>
            <text:p>Ensure no part is hidden behind header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Section heading fully visible (no cutoff).</text:p>
          </table:table-cell>
          <table:table-cell table:style-name="ce3" office:value-type="string" calcext:value-type="string">
            <text:p>Alignment is prope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works correctly on mobile devices.</text:p>
          </table:table-cell>
          <table:table-cell table:style-name="ce3" office:value-type="string" calcext:value-type="string">
            <text:p>Open page on mobile.</text:p>
            <text:p>Click nav items.</text:p>
            <text:p>Verify smooth scroll and correct sections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smoothly on mobile</text:p>
          </table:table-cell>
          <table:table-cell table:style-name="ce3" office:value-type="string" calcext:value-type="string">
            <text:p>Works correctly on mobi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works correctly on tablet devices.</text:p>
          </table:table-cell>
          <table:table-cell table:style-name="ce3" office:value-type="string" calcext:value-type="string">
            <text:p>Open page on tablet view.</text:p>
            <text:p>Repeat navigation clicks.</text:p>
            <text:p>Confirm proper behavior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on tablet view.</text:p>
          </table:table-cell>
          <table:table-cell table:style-name="ce3" office:value-type="string" calcext:value-type="string">
            <text:p>Works correctly on table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works correctly on desktop devices.</text:p>
          </table:table-cell>
          <table:table-cell table:style-name="ce3" office:value-type="string" calcext:value-type="string">
            <text:p>Open page on desktop.</text:p>
            <text:p>Test all nav items.</text:p>
            <text:p>Confirm correct scrolling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on desktop.</text:p>
          </table:table-cell>
          <table:table-cell table:style-name="ce3" office:value-type="string" calcext:value-type="string">
            <text:p>Works correctly on deskto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behavior works correctly in RTL (Arabic) layout.</text:p>
          </table:table-cell>
          <table:table-cell table:style-name="ce3" office:value-type="string" calcext:value-type="string">
            <text:p>Switch site to Arabic.</text:p>
            <text:p>Click nav items.</text:p>
            <text:p>Confirm scroll works correctly in RTL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properly in RTL layout.</text:p>
          </table:table-cell>
          <table:table-cell table:style-name="ce3" office:value-type="string" calcext:value-type="string">
            <text:p>Works correctly in Arabic layou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avigation behavior works correctly in LTR (English) layout.</text:p>
          </table:table-cell>
          <table:table-cell table:style-name="ce3" office:value-type="string" calcext:value-type="string">
            <text:p>Switch to English.</text:p>
            <text:p>Test navigation.</text:p>
            <text:p>Confirm proper behavior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properly in LTR layout.</text:p>
          </table:table-cell>
          <table:table-cell table:style-name="ce3" office:value-type="string" calcext:value-type="string">
            <text:p>Works correctly in English layou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internal related model links appear at the bottom of the model page.</text:p>
          </table:table-cell>
          <table:table-cell table:style-name="ce3" office:value-type="string" calcext:value-type="string">
            <text:p>Scroll to bottom of page.</text:p>
            <text:p>Check for related model section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: Related models appear at page bottom.</text:p>
          </table:table-cell>
          <table:table-cell table:style-name="ce3" office:value-type="string" calcext:value-type="string">
            <text:p>Section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related model links redirect to correct model overview pages.</text:p>
          </table:table-cell>
          <table:table-cell table:style-name="ce3" office:value-type="string" calcext:value-type="string">
            <text:p>Click a related model link.</text:p>
            <text:p>Confirm it opens correct model page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Clicking link opens correct model page.</text:p>
          </table:table-cell>
          <table:table-cell table:style-name="ce3" office:value-type="string" calcext:value-type="string">
            <text:p>Redirect 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related model links do not break scroll-based navigation.</text:p>
          </table:table-cell>
          <table:table-cell table:style-name="ce3" office:value-type="string" calcext:value-type="string">
            <text:p>Open related model page.</text:p>
            <text:p>Test navigation again.</text:p>
            <text:p>Confirm it works normally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normally on new page.</text:p>
          </table:table-cell>
          <table:table-cell table:style-name="ce3" office:value-type="string" calcext:value-type="string">
            <text:p>No issues observ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browser back button behavior works correctly after scrolling navigation.</text:p>
          </table:table-cell>
          <table:table-cell table:style-name="ce3" office:value-type="string" calcext:value-type="string">
            <text:p>Navigate using scroll or links.</text:p>
            <text:p>Click browser back button.</text:p>
            <text:p>Confirm correct previous state/page loads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Back button returns to correct page/state.</text:p>
          </table:table-cell>
          <table:table-cell table:style-name="ce3" office:value-type="string" calcext:value-type="string">
            <text:p>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no console errors occur during scroll navigation.</text:p>
          </table:table-cell>
          <table:table-cell table:style-name="ce3" office:value-type="string" calcext:value-type="string">
            <text:p>Open DevTools → Console.</text:p>
            <text:p>Click nav items.</text:p>
            <text:p>Confirm no errors appear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o errors during navigation.</text:p>
          </table:table-cell>
          <table:table-cell table:style-name="ce3" office:value-type="string" calcext:value-type="string">
            <text:p>Console remains clea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analytics events (if any) trigger correctly on section navigation.</text:p>
          </table:table-cell>
          <table:table-cell table:style-name="ce3" office:value-type="string" calcext:value-type="string">
            <text:p>Open Network/Analytics tools.</text:p>
            <text:p>Click nav items.</text:p>
            <text:p>Confirm events are fired (if implemented)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triggers analytics events (if implemented).</text:p>
          </table:table-cell>
          <table:table-cell table:style-name="ce3" office:value-type="string" calcext:value-type="string">
            <text:p>Events are triggered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accessibility support for keyboard navigation through nav items.</text:p>
          </table:table-cell>
          <table:table-cell table:style-name="ce3" office:value-type="string" calcext:value-type="string">
            <text:p>Use Tab key to navigate menu.</text:p>
            <text:p>Press Enter on items.</text:p>
            <text:p>Confirm scroll works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User can navigate using keyboard.</text:p>
          </table:table-cell>
          <table:table-cell table:style-name="ce3" office:value-type="string" calcext:value-type="string">
            <text:p>Keyboard navigation work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if user can identify navigation items and target sections.</text:p>
          </table:table-cell>
          <table:table-cell table:style-name="ce3" office:value-type="string" calcext:value-type="string">
            <text:p>Look at nav labels and page sections.</text:p>
            <text:p>Confirm labels clearly match sections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 labels clearly match sections.</text:p>
          </table:table-cell>
          <table:table-cell table:style-name="ce3" office:value-type="string" calcext:value-type="string">
            <text:p>Labels are understanda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– Unified Navigation &amp; Scroll Behavior</text:p>
          </table:table-cell>
          <table:table-cell table:style-name="ce9" office:value-type="string" calcext:value-type="string">
            <text:p>Verify unified page structure works consistently across all supported browsers.</text:p>
          </table:table-cell>
          <table:table-cell table:style-name="ce3" office:value-type="string" calcext:value-type="string">
            <text:p>Open page in Chrome, Safari, Edge, etc.</text:p>
            <text:p>Test navigation in each.</text:p>
            <text:p>Confirm consistent behavior.</text:p>
          </table:table-cell>
          <table:table-cell table:style-name="ce3" office:value-type="string" calcext:value-type="string">
            <text:p>User must open a car model containing all the model pages</text:p>
          </table:table-cell>
          <table:table-cell table:style-name="ce3" office:value-type="string" calcext:value-type="string">
            <text:p>Navigation works in all supported browsers.</text:p>
          </table:table-cell>
          <table:table-cell table:style-name="ce3" office:value-type="string" calcext:value-type="string">
            <text:p>Behavior is consistent across browsers.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27" table:style-name="ta12">
        <table:table-column table:style-name="co8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1 tag exists and is unique on Model Overview page.</text:p>
          </table:table-cell>
          <table:table-cell table:style-name="ce3" office:value-type="string" calcext:value-type="string">
            <text:p>Open Model Overview page</text:p>
            <text:p>Inspect (F12) → search &lt;h1&gt;</text:p>
          </table:table-cell>
          <table:table-cell table:style-name="ce3" office:value-type="string" calcext:value-type="string">
            <text:p>h1 is available</text:p>
          </table:table-cell>
          <table:table-cell table:style-name="ce3" office:value-type="string" calcext:value-type="string">
            <text:p>Only one H1 exists with model name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1 tag exists and is unique on Model Price page.</text:p>
          </table:table-cell>
          <table:table-cell table:style-name="ce3" office:value-type="string" calcext:value-type="string">
            <text:p>Open Model Price page</text:p>
            <text:p>Inspect → search &lt;h1&gt;</text:p>
          </table:table-cell>
          <table:table-cell table:style-name="ce3" office:value-type="string" calcext:value-type="string">
            <text:p>h1 is available</text:p>
          </table:table-cell>
          <table:table-cell table:style-name="ce3" office:value-type="string" calcext:value-type="string">
            <text:p>Only one H1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1 tag exists and is unique on Model Specifications page.</text:p>
          </table:table-cell>
          <table:table-cell table:style-name="ce3" office:value-type="string" calcext:value-type="string">
            <text:p>Open Specs page</text:p>
            <text:p>Inspect → search &lt;h1&gt;</text:p>
          </table:table-cell>
          <table:table-cell table:style-name="ce3" office:value-type="string" calcext:value-type="string">
            <text:p>h1 is available</text:p>
          </table:table-cell>
          <table:table-cell table:style-name="ce3" office:value-type="string" calcext:value-type="string">
            <text:p>Only one H1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1 tag exists and is unique on Model Images page.</text:p>
          </table:table-cell>
          <table:table-cell table:style-name="ce3" office:value-type="string" calcext:value-type="string">
            <text:p>Open Images page</text:p>
            <text:p>Inspect → search &lt;h1&gt;</text:p>
          </table:table-cell>
          <table:table-cell table:style-name="ce3" office:value-type="string" calcext:value-type="string">
            <text:p>h1 is available</text:p>
          </table:table-cell>
          <table:table-cell table:style-name="ce3" office:value-type="string" calcext:value-type="string">
            <text:p>Only one H1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1 tag exists and is unique on Model FAQ page.</text:p>
          </table:table-cell>
          <table:table-cell table:style-name="ce3" office:value-type="string" calcext:value-type="string">
            <text:p>Open FAQ page</text:p>
            <text:p>Inspect → search &lt;h1&gt;</text:p>
          </table:table-cell>
          <table:table-cell table:style-name="ce3" office:value-type="string" calcext:value-type="string">
            <text:p>h1 is available</text:p>
          </table:table-cell>
          <table:table-cell table:style-name="ce3" office:value-type="string" calcext:value-type="string">
            <text:p>Only one H1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1 tag exists and is unique on Model Review page.</text:p>
          </table:table-cell>
          <table:table-cell table:style-name="ce3" office:value-type="string" calcext:value-type="string">
            <text:p>Open Review page</text:p>
            <text:p>Inspect → search &lt;h1&gt;</text:p>
          </table:table-cell>
          <table:table-cell table:style-name="ce3" office:value-type="string" calcext:value-type="string">
            <text:p>h1 is available</text:p>
          </table:table-cell>
          <table:table-cell table:style-name="ce3" office:value-type="string" calcext:value-type="string">
            <text:p>Only one H1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“Compare” text is no longer rendered as an H2 tag.</text:p>
          </table:table-cell>
          <table:table-cell table:style-name="ce3" office:value-type="string" calcext:value-type="string">
            <text:p>Open page</text:p>
            <text:p>Inspect “Compare” text</text:p>
            <text:p>Check tag</text:p>
          </table:table-cell>
          <table:table-cell table:style-name="ce3" office:value-type="string" calcext:value-type="string">
            <text:p>h2 is available</text:p>
          </table:table-cell>
          <table:table-cell table:style-name="ce3" office:value-type="string" calcext:value-type="string">
            <text:p>only one h2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“Cookies on Zigwheels” is no longer rendered as an H2 tag.</text:p>
          </table:table-cell>
          <table:table-cell table:style-name="ce3" office:value-type="string" calcext:value-type="string">
            <text:p>Inspect cookie banner text</text:p>
            <text:p>Check HTML tag</text:p>
          </table:table-cell>
          <table:table-cell table:style-name="ce3" office:value-type="string" calcext:value-type="string">
            <text:p>h2 is available</text:p>
          </table:table-cell>
          <table:table-cell table:style-name="ce3" office:value-type="string" calcext:value-type="string">
            <text:p>only one h2 present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“Choose your city to find options nearby” is not an H2 tag.</text:p>
          </table:table-cell>
          <table:table-cell table:style-name="ce3" office:value-type="string" calcext:value-type="string">
            <text:p>Inspect city selection text</text:p>
            <text:p>Check tag</text:p>
          </table:table-cell>
          <table:table-cell table:style-name="ce3" office:value-type="string" calcext:value-type="string">
            <text:p>h2 is available</text:p>
          </table:table-cell>
          <table:table-cell table:style-name="ce3" office:value-type="string" calcext:value-type="string">
            <text:p>Same heading structure in both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eading changes reflect correctly in View Source and Inspect Element.</text:p>
          </table:table-cell>
          <table:table-cell table:style-name="ce3" office:value-type="string" calcext:value-type="string">
            <text:p>Right-click → View Source</text:p>
            <text:p>Inspect same element</text:p>
          </table:table-cell>
          <table:table-cell table:style-name="ce3" office:value-type="string" calcext:value-type="string">
            <text:p>heading is there</text:p>
          </table:table-cell>
          <table:table-cell table:style-name="ce3" office:value-type="string" calcext:value-type="string">
            <text:p>Same heading structure in both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eading updates work correctly on mobile devices.</text:p>
          </table:table-cell>
          <table:table-cell table:style-name="ce3" office:value-type="string" calcext:value-type="string">
            <text:p>Open page on mobile</text:p>
            <text:p>Inspect using DevTools / emulator</text:p>
          </table:table-cell>
          <table:table-cell table:style-name="ce3" office:value-type="string" calcext:value-type="string">
            <text:p>heading is there</text:p>
          </table:table-cell>
          <table:table-cell table:style-name="ce3" office:value-type="string" calcext:value-type="string">
            <text:p>Same heading structure in both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Tag Validation Across Pages</text:p>
          </table:table-cell>
          <table:table-cell table:style-name="ce9" office:value-type="string" calcext:value-type="string">
            <text:p>Verify heading updates work correctly on desktop devices.</text:p>
          </table:table-cell>
          <table:table-cell table:style-name="ce3" office:value-type="string" calcext:value-type="string">
            <text:p>Open page on desktop</text:p>
            <text:p>Inspect headings</text:p>
          </table:table-cell>
          <table:table-cell table:style-name="ce3" office:value-type="string" calcext:value-type="string">
            <text:p>heading is there</text:p>
          </table:table-cell>
          <table:table-cell table:style-name="ce3" office:value-type="string" calcext:value-type="string">
            <text:p>Same heading structure in both</text:p>
          </table:table-cell>
          <table:table-cell table:style-name="ce3" office:value-type="string" calcext:value-type="string">
            <text:p>exist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28" table:style-name="ta13">
        <table:table-column table:style-name="co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dealer section appears on Model Overview pages where applicable.</text:p>
          </table:table-cell>
          <table:table-cell table:style-name="ce3" office:value-type="string" calcext:value-type="string">
            <text:p>Open a Model Overview page.</text:p>
            <text:p>Scroll down.</text:p>
            <text:p>Check if Dealer section is visible (where applicable)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Dealer section is visible where applicable.</text:p>
          </table:table-cell>
          <table:table-cell table:style-name="ce3" office:value-type="string" calcext:value-type="string">
            <text:p>Dealer section appears correctly on the pag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dealer section appears on Price pages where applicable.</text:p>
          </table:table-cell>
          <table:table-cell table:style-name="ce3" office:value-type="string" calcext:value-type="string">
            <text:p>Open a Price page.</text:p>
            <text:p>Scroll to bottom or relevant section.</text:p>
            <text:p>Verify Dealer section appears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Dealer section is visible on Price page</text:p>
          </table:table-cell>
          <table:table-cell table:style-name="ce3" office:value-type="string" calcext:value-type="string">
            <text:p>Dealer section is displayed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dealer section appears on Specification pages where applicable.</text:p>
          </table:table-cell>
          <table:table-cell table:style-name="ce3" office:value-type="string" calcext:value-type="string">
            <text:p>Open a Specification page.</text:p>
            <text:p>Scroll through the page.</text:p>
            <text:p>Confirm Dealer section is presen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Dealer section is visible on Specification page.</text:p>
          </table:table-cell>
          <table:table-cell table:style-name="ce3" office:value-type="string" calcext:value-type="string">
            <text:p>Dealer section is present as expect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dealer section heading text remains unchanged.</text:p>
          </table:table-cell>
          <table:table-cell table:style-name="ce3" office:value-type="string" calcext:value-type="string">
            <text:p>Open any page with Dealer section.</text:p>
            <text:p>Look at the heading text.</text:p>
            <text:p>Compare with expected tex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Heading text remains same as defined.</text:p>
          </table:table-cell>
          <table:table-cell table:style-name="ce3" office:value-type="string" calcext:value-type="string">
            <text:p>Heading text is unchang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internal link URL to Toyota dealer page remains unchanged.</text:p>
          </table:table-cell>
          <table:table-cell table:style-name="ce3" office:value-type="string" calcext:value-type="string">
            <text:p>Click on dealer link.</text:p>
            <text:p>Observe URL in browser.</text:p>
            <text:p>Confirm it matches expected dealer listing URL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Dealer link redirects to correct and unchanged URL</text:p>
          </table:table-cell>
          <table:table-cell table:style-name="ce3" office:value-type="string" calcext:value-type="string">
            <text:p>URL is correct and not modifi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is updated from “Riyadh” to “5 Toyota Car Dealers”.</text:p>
          </table:table-cell>
          <table:table-cell table:style-name="ce3" office:value-type="string" calcext:value-type="string">
            <text:p>Open Dealer section.</text:p>
            <text:p>Look at the anchor text.</text:p>
            <text:p>Confirm it shows “5 Toyota Car Dealers” instead of “Riyadh”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Anchor text shows “5 Toyota Car Dealers</text:p>
          </table:table-cell>
          <table:table-cell table:style-name="ce3" office:value-type="string" calcext:value-type="string">
            <text:p>Updated text is displayed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exactly matches “5 Toyota Car Dealers”.</text:p>
          </table:table-cell>
          <table:table-cell table:style-name="ce3" office:value-type="string" calcext:value-type="string">
            <text:p>Check the text carefully.</text:p>
            <text:p>Confirm it is exactly “5 Toyota Car Dealers” (no extra words/spaces)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exactly matches “5 Toyota Car Dealers</text:p>
          </table:table-cell>
          <table:table-cell table:style-name="ce3" office:value-type="string" calcext:value-type="string">
            <text:p>No extra/missing words; exact match observ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does not display city-only naming.</text:p>
          </table:table-cell>
          <table:table-cell table:style-name="ce3" office:value-type="string" calcext:value-type="string">
            <text:p>Observe anchor text.</text:p>
            <text:p>Confirm it does NOT show only city name like “Riyadh”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does not show only city name like “Riyadh</text:p>
          </table:table-cell>
          <table:table-cell table:style-name="ce3" office:value-type="string" calcext:value-type="string">
            <text:p>City-only text is not display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no layout shift occurs after anchor text update.</text:p>
          </table:table-cell>
          <table:table-cell table:style-name="ce3" office:value-type="string" calcext:value-type="string">
            <text:p>Hover or tap on anchor text.</text:p>
            <text:p>Click it.</text:p>
            <text:p>Confirm full text is clickable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Entire anchor text is clickable</text:p>
          </table:table-cell>
          <table:table-cell table:style-name="ce3" office:value-type="string" calcext:value-type="string">
            <text:p>Click works on full text area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clickable area of anchor text remains intact.</text:p>
          </table:table-cell>
          <table:table-cell table:style-name="ce3" office:value-type="string" calcext:value-type="string">
            <text:p>Click the anchor text.</text:p>
            <text:p>Verify it opens Toyota dealer listing page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Clicking link opens correct dealer listing page.</text:p>
          </table:table-cell>
          <table:table-cell table:style-name="ce3" office:value-type="string" calcext:value-type="string">
            <text:p>Redirect 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clicking the anchor redirects to Toyota dealer listing page.</text:p>
          </table:table-cell>
          <table:table-cell table:style-name="ce3" office:value-type="string" calcext:value-type="string">
            <text:p>Open pages for different brands.</text:p>
            <text:p>Check dealer section.</text:p>
            <text:p>Confirm anchor text follows same pattern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Anchor text format consistent across brands.</text:p>
          </table:table-cell>
          <table:table-cell table:style-name="ce3" office:value-type="string" calcext:value-type="string">
            <text:p>Works correctly for all tested brand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update works across all brands (if applicable).</text:p>
          </table:table-cell>
          <table:table-cell table:style-name="ce3" office:value-type="string" calcext:value-type="string">
            <text:p>Open page and observe Dealer section.</text:p>
            <text:p>Reload page.</text:p>
            <text:p>Confirm UI does not jump or shif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No UI shift after text update</text:p>
          </table:table-cell>
          <table:table-cell table:style-name="ce3" office:value-type="string" calcext:value-type="string">
            <text:p>Layout remains sta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is visible in page source HTML.</text:p>
          </table:table-cell>
          <table:table-cell table:style-name="ce3" office:value-type="string" calcext:value-type="string">
            <text:p>Right-click → View Page Source.</text:p>
            <text:p>Search for anchor text.</text:p>
            <text:p>Confirm it exists in HTML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Anchor text visible in HTML source.</text:p>
          </table:table-cell>
          <table:table-cell table:style-name="ce3" office:value-type="string" calcext:value-type="string">
            <text:p>Text found in page sourc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mains correct after page refresh.</text:p>
          </table:table-cell>
          <table:table-cell table:style-name="ce3" office:value-type="string" calcext:value-type="string">
            <text:p>Refresh the page.</text:p>
            <text:p>Check anchor text again.</text:p>
            <text:p>Confirm it remains correct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remains correct after refresh.</text:p>
          </table:table-cell>
          <table:table-cell table:style-name="ce3" office:value-type="string" calcext:value-type="string">
            <text:p>No change after refresh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mains correct after hard reload.</text:p>
          </table:table-cell>
          <table:table-cell table:style-name="ce3" office:value-type="string" calcext:value-type="string">
            <text:p>Press Ctrl + Shift + R (hard reload).</text:p>
            <text:p>Check anchor text.</text:p>
            <text:p>Confirm no change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remains correct after hard reload.</text:p>
          </table:table-cell>
          <table:table-cell table:style-name="ce3" office:value-type="string" calcext:value-type="string">
            <text:p>No issues observ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mains correct in incognito mode.</text:p>
          </table:table-cell>
          <table:table-cell table:style-name="ce3" office:value-type="string" calcext:value-type="string">
            <text:p>Open page in Incognito mode.</text:p>
            <text:p>Check Dealer section.</text:p>
            <text:p>Confirm anchor text is correc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displays correctly in incognito mode.</text:p>
          </table:table-cell>
          <table:table-cell table:style-name="ce3" office:value-type="string" calcext:value-type="string">
            <text:p>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mains correct on mobile devices.</text:p>
          </table:table-cell>
          <table:table-cell table:style-name="ce3" office:value-type="string" calcext:value-type="string">
            <text:p>Open page on mobile device.</text:p>
            <text:p>Scroll to Dealer section.</text:p>
            <text:p>Confirm anchor text is correc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Anchor text displays correctly on mobile.</text:p>
          </table:table-cell>
          <table:table-cell table:style-name="ce3" office:value-type="string" calcext:value-type="string">
            <text:p>Works properly on mobi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mains correct on desktop devices.</text:p>
          </table:table-cell>
          <table:table-cell table:style-name="ce3" office:value-type="string" calcext:value-type="string">
            <text:p>Open page on desktop.</text:p>
            <text:p>Check Dealer section.</text:p>
            <text:p>Confirm anchor text is correc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<text:s/>Anchor text displays correctly on desktop.</text:p>
          </table:table-cell>
          <table:table-cell table:style-name="ce3" office:value-type="string" calcext:value-type="string">
            <text:p>Works properly on deskto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nders correctly in Arabic (RTL) layout if applicable.</text:p>
          </table:table-cell>
          <table:table-cell table:style-name="ce3" office:value-type="string" calcext:value-type="string">
            <text:p>Switch site to Arabic.</text:p>
            <text:p>Open page.</text:p>
            <text:p>Check Dealer section alignment and tex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renders correctly in RTL layout.</text:p>
          </table:table-cell>
          <table:table-cell table:style-name="ce3" office:value-type="string" calcext:value-type="string">
            <text:p>Layout and text appear correc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renders correctly in English (LTR) layout if applicable.</text:p>
          </table:table-cell>
          <table:table-cell table:style-name="ce3" office:value-type="string" calcext:value-type="string">
            <text:p>Switch to English.</text:p>
            <text:p>Check Dealer section.</text:p>
            <text:p>Confirm correct rendering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ext renders correctly in LTR layout.</text:p>
          </table:table-cell>
          <table:table-cell table:style-name="ce3" office:value-type="string" calcext:value-type="string">
            <text:p>Work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anchor text change does not affect existing translations.</text:p>
          </table:table-cell>
          <table:table-cell table:style-name="ce3" office:value-type="string" calcext:value-type="string">
            <text:p>Switch between languages.</text:p>
            <text:p>Check anchor text.</text:p>
            <text:p>Confirm translation remains correct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Translations remain correct after update.</text:p>
          </table:table-cell>
          <table:table-cell table:style-name="ce3" office:value-type="string" calcext:value-type="string">
            <text:p>no translation issues foun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aler Section Visibility &amp; Anchor Text Validation</text:p>
          </table:table-cell>
          <table:table-cell table:style-name="ce9" office:value-type="string" calcext:value-type="string">
            <text:p>Verify consistency of anchor text across similar dealer sections site-wide</text:p>
          </table:table-cell>
          <table:table-cell table:style-name="ce3" office:value-type="string" calcext:value-type="string">
            <text:p>Open multiple pages (models, brands, etc.).</text:p>
            <text:p>Check Dealer sections.</text:p>
            <text:p>Confirm same anchor text format everywhere.</text:p>
          </table:table-cell>
          <table:table-cell table:style-name="ce3" office:value-type="string" calcext:value-type="string">
            <text:p>Test the Model Overview, Price, and Specification pages for a Toyota model where the dealer section should appear.</text:p>
          </table:table-cell>
          <table:table-cell table:style-name="ce3" office:value-type="string" calcext:value-type="string">
            <text:p>Same anchor text format used across all pages.</text:p>
          </table:table-cell>
          <table:table-cell table:style-name="ce3" office:value-type="string" calcext:value-type="string">
            <text:p>Consistent across all tested pages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47" table:style-name="ta14">
        <table:table-column table:style-name="co8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s present on Model Overview pages.</text:p>
          </table:table-cell>
          <table:table-cell table:style-name="ce3" office:value-type="string" calcext:value-type="string">
            <text:p>Open a Model Overview page in a browser.</text:p>
            <text:p>Right-click → View Page Source or press F12 → DevTools → Elements.</text:p>
            <text:p>Search (Ctrl+F) for "@type": "ItemList" or &lt;script type="application/ld+json"&gt;.</text:p>
            <text:p>Confirm the schema block is present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 schema block is present in Page Source or DevTools on Model Overview page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s present on Variant Detail pages.</text:p>
          </table:table-cell>
          <table:table-cell table:style-name="ce3" office:value-type="string" calcext:value-type="string">
            <text:p>Open a Variant Detail page.</text:p>
            <text:p>Use Page Source or DevTools → Elements.</text:p>
            <text:p>Search for "@type": "ItemList".</text:p>
            <text:p>Confirm the schema block is present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 schema block is present on Variant Detail page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s present on Dealer pages.</text:p>
          </table:table-cell>
          <table:table-cell table:style-name="ce3" office:value-type="string" calcext:value-type="string">
            <text:p>Open a Dealer page.</text:p>
            <text:p>Use Page Source or DevTools → Elements.</text:p>
            <text:p>Search for "@type": "ItemList".</text:p>
            <text:p>Confirm the schema block is present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 schema block is present on Dealer page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ncludes itemListElement field on Model Overview pages.</text:p>
          </table:table-cell>
          <table:table-cell table:style-name="ce3" office:value-type="string" calcext:value-type="string">
            <text:p>Open a Model Overview page.</text:p>
            <text:p>Locate the ItemList schema block.</text:p>
            <text:p>Check for itemListElement field.</text:p>
            <text:p>Confirm it exists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Element field exists within the schema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ncludes itemListElement field on Variant Detail pages.</text:p>
          </table:table-cell>
          <table:table-cell table:style-name="ce3" office:value-type="string" calcext:value-type="string">
            <text:p>Repeat the above steps on a Variant Detail page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Element field exists in the schema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ncludes itemListElement field on Dealer pages.</text:p>
          </table:table-cell>
          <table:table-cell table:style-name="ce3" office:value-type="string" calcext:value-type="string">
            <text:p>Repeat the above steps on a Dealer page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Element field exists in the schema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Element is an array with one or more entries.</text:p>
          </table:table-cell>
          <table:table-cell table:style-name="ce3" office:value-type="string" calcext:value-type="string">
            <text:p>Open a page with ItemList schema.</text:p>
            <text:p>Locate the itemListElement field.</text:p>
            <text:p>Confirm it is an array.</text:p>
            <text:p>Ensure the array has at least one entry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itemListElement is an array with at least one entr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each itemListElement entry is of type ListItem.</text:p>
          </table:table-cell>
          <table:table-cell table:style-name="ce3" office:value-type="string" calcext:value-type="string">
            <text:p>Open the schema block.</text:p>
            <text:p>Check each entry in itemListElement array.</text:p>
            <text:p>Confirm each entry contains "@type": "ListItem"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Each entry contains "@type": "ListItem"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ListItem positions are numeric and start from 1.</text:p>
          </table:table-cell>
          <table:table-cell table:style-name="ce3" office:value-type="string" calcext:value-type="string">
            <text:p>Check the "position" field of each ListItem.</text:p>
            <text:p>Confirm positions start at 1 and are numeric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"position" starts at 1 and is numeric for all ListItem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ListItem positions are sequential without gaps.</text:p>
          </table:table-cell>
          <table:table-cell table:style-name="ce3" office:value-type="string" calcext:value-type="string">
            <text:p>Check all "position" values in itemListElement.</text:p>
            <text:p>Confirm they increment sequentially: 1, 2, 3…</text:p>
            <text:p>Ensure there are no missing numbers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Positions increment sequentially: 1, 2, 3… with no missing number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renders correctly on Arabic pages.</text:p>
          </table:table-cell>
          <table:table-cell table:style-name="ce3" office:value-type="string" calcext:value-type="string">
            <text:p>Inspect all entries in itemListElement.</text:p>
            <text:p>Confirm that no name or url is duplicated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No duplicate entries exist in itemListElement arra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renders correctly on English pages.</text:p>
          </table:table-cell>
          <table:table-cell table:style-name="ce3" office:value-type="string" calcext:value-type="string">
            <text:p>Check each ListItem entry.</text:p>
            <text:p>Confirm "name" and "url" are not empty or null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All ListItems have non-empty "name" and "url" field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does not contain duplicate ListItem entries.</text:p>
          </table:table-cell>
          <table:table-cell table:style-name="ce3" office:value-type="string" calcext:value-type="string">
            <text:p>Open the Arabic version of a page.</text:p>
            <text:p>Locate the ItemList schema block.</text:p>
            <text:p>Confirm names and descriptions are correctly in Arabic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Schema displays correctly with Arabic names/description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does not contain empty or null ListItem values.</text:p>
          </table:table-cell>
          <table:table-cell table:style-name="ce3" office:value-type="string" calcext:value-type="string">
            <text:p>Open the English version of the page.</text:p>
            <text:p>Check the ItemList schema block.</text:p>
            <text:p>Confirm names and descriptions are in English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Schema displays correctly with English names/description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no Structured Data validation errors in Rich Results Test.</text:p>
          </table:table-cell>
          <table:table-cell table:style-name="ce3" office:value-type="string" calcext:value-type="string">
            <text:p>Open multiple models, variants, and dealer pages.</text:p>
            <text:p>Check the schema block.</text:p>
            <text:p>Confirm that "name", "description", and "position" reflect the actual content of the page dynamically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Schema values (names, descriptions, positions) reflect actual page content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no Structured Data warnings related to ItemList in Schema Validator.</text:p>
          </table:table-cell>
          <table:table-cell table:style-name="ce3" office:value-type="string" calcext:value-type="string">
            <text:p>Go to Google Rich Results Test: https://search.google.com/test/rich-results</text:p>
            <text:p>Enter the page URL → click Test URL.</text:p>
            <text:p>Confirm no errors appear for ItemList schema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Google Rich Results Test shows no errors for ItemList schema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remains intact after page refresh.</text:p>
          </table:table-cell>
          <table:table-cell table:style-name="ce3" office:value-type="string" calcext:value-type="string">
            <text:p>Repeat the above steps → confirm no warnings appear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No warnings appear in Google or other Schema validator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remains intact after cache clear.</text:p>
          </table:table-cell>
          <table:table-cell table:style-name="ce3" office:value-type="string" calcext:value-type="string">
            <text:p>Open a page → locate ItemList schema.</text:p>
            <text:p>Refresh the page.</text:p>
            <text:p>Confirm schema remains present and correct.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Schema remains unchanged after refreshing the page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ItemList Structured Data Verification</text:p>
          </table:table-cell>
          <table:table-cell table:style-name="ce9" office:value-type="string" calcext:value-type="string">
            <text:p>Verify ItemList schema is generated dynamically based on page data.</text:p>
          </table:table-cell>
          <table:table-cell table:style-name="ce3" office:value-type="string" calcext:value-type="string">
            <text:p>Clear browser cache.</text:p>
            <text:p>Reopen the page.</text:p>
            <text:p>Confirm ItemList schema still exists and is correct</text:p>
          </table:table-cell>
          <table:table-cell table:style-name="ce3" office:value-type="string" calcext:value-type="string">
            <text:p>schema should be there</text:p>
          </table:table-cell>
          <table:table-cell table:style-name="ce3" office:value-type="string" calcext:value-type="string">
            <text:p>Schema remains unchanged after clearing browser cache.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48" table:style-name="ta15">
        <table:table-column table:style-name="co8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9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ItemList structured data is present on the Model Overview page.</text:p>
          </table:table-cell>
          <table:table-cell table:style-name="ce3" office:value-type="string" calcext:value-type="string">
            <text:p>Open the Model Overview page on a browser.</text:p>
            <text:p>Right-click → View Page Source or use Chrome DevTools → Elements.</text:p>
            <text:p>Search for ItemList schema block (&lt;script type="application/ld+json"&gt;).</text:p>
            <text:p>Confirm that the schema block is present on the page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ItemList schema block is present in Page Source or DevTools on the Model Overview page.</text:p>
          </table:table-cell>
          <table:table-cell table:style-name="ce3" office:value-type="string" calcext:value-type="string">
            <text:p>ItemList schema is visible and correctly rendered on the pag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ItemList structured data is present on the Variant Detail page.</text:p>
          </table:table-cell>
          <table:table-cell table:style-name="ce3" office:value-type="string" calcext:value-type="string">
            <text:p>Open the Variant Detail page on a browser.</text:p>
            <text:p>Use Page Source or Chrome DevTools → Elements.</text:p>
            <text:p>Search for ItemList schema block.</text:p>
            <text:p>Confirm schema is present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ItemList schema block is present on the Variant Detail page.</text:p>
          </table:table-cell>
          <table:table-cell table:style-name="ce3" office:value-type="string" calcext:value-type="string">
            <text:p>Schema is displayed correctly on the Variant pag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the name field in ItemList schema is dynamically populated with the correct model name on Model pages.</text:p>
          </table:table-cell>
          <table:table-cell table:style-name="ce3" office:value-type="string" calcext:value-type="string">
            <text:p>Open a Model Overview page.</text:p>
            <text:p>Locate the ItemList schema block in Page Source or DevTools.</text:p>
            <text:p>Check the "name" field.</text:p>
            <text:p>Confirm it matches the actual model name displayed on the page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"name" field contains the exact model name shown on the page.</text:p>
          </table:table-cell>
          <table:table-cell table:style-name="ce3" office:value-type="string" calcext:value-type="string">
            <text:p>Name field matches the displayed model nam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the description field in ItemList schema is dynamically populated with the correct model name on Model pages.</text:p>
          </table:table-cell>
          <table:table-cell table:style-name="ce3" office:value-type="string" calcext:value-type="string">
            <text:p>Open a Model Overview page.</text:p>
            <text:p>Locate the ItemList schema block.</text:p>
            <text:p>Check the "description" field.</text:p>
            <text:p>Confirm it dynamically includes the correct model name.</text:p>
          </table:table-cell>
          <table:table-cell table:style-name="ce3" office:value-type="string" calcext:value-type="string">
            <text:p>schemashould be there</text:p>
          </table:table-cell>
          <table:table-cell table:style-name="ce3"/>
          <table:table-cell table:style-name="ce3" office:value-type="string" calcext:value-type="string">
            <text:p>Description field correctly reflects the model nam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the name field in ItemList schema is dynamically populated with the correct variant name on Variant pages.</text:p>
          </table:table-cell>
          <table:table-cell table:style-name="ce3" office:value-type="string" calcext:value-type="string">
            <text:p>Open a Variant Detail page.</text:p>
            <text:p>Locate the ItemList schema block.</text:p>
            <text:p>Check the "name" field.</text:p>
            <text:p>Confirm it matches the actual variant name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"name" field contains the exact variant name shown on the page.</text:p>
          </table:table-cell>
          <table:table-cell table:style-name="ce3" office:value-type="string" calcext:value-type="string">
            <text:p>Name field matches the displayed variant nam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the description field in ItemList schema is dynamically populated with the correct variant name on Variant pages.</text:p>
          </table:table-cell>
          <table:table-cell table:style-name="ce3" office:value-type="string" calcext:value-type="string">
            <text:p>Open a Variant Detail page.</text:p>
            <text:p>Locate the ItemList schema block.</text:p>
            <text:p>Check the "description" field.</text:p>
            <text:p>Confirm it dynamically includes the correct variant name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"description" field contains the correct variant name dynamically.</text:p>
          </table:table-cell>
          <table:table-cell table:style-name="ce3" office:value-type="string" calcext:value-type="string">
            <text:p>Description field correctly reflects the variant nam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schema output is valid JSON-LD format.</text:p>
          </table:table-cell>
          <table:table-cell table:style-name="ce3" office:value-type="string" calcext:value-type="string">
            <text:p>Copy the ItemList schema block from Page Source or DevTools.</text:p>
            <text:p>Open a JSON validator (like https://jsonlint.com/</text:p>
            <text:p>).</text:p>
            <text:p>Paste the schema and validate.</text:p>
            <text:p>Confirm it is valid JSON-LD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ItemList schema passes validation in a JSON validator; no syntax errors.</text:p>
          </table:table-cell>
          <table:table-cell table:style-name="ce3" office:value-type="string" calcext:value-type="string">
            <text:p>JSON-LD is valid, parses without error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schema does not produce warnings related to missing name or description.</text:p>
          </table:table-cell>
          <table:table-cell table:style-name="ce3" office:value-type="string" calcext:value-type="string">
            <text:p>Open the page with ItemList schema.</text:p>
            <text:p>Use Google Rich Results Test (https://search.google.com/test/rich-results</text:p>
            <text:p>).</text:p>
            <text:p>Enter the page URL → run the test.</text:p>
            <text:p>Confirm no warnings about missing "name" or "description"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Google Rich Results Test shows no warnings for missing "name" or "description".</text:p>
          </table:table-cell>
          <table:table-cell table:style-name="ce3" office:value-type="string" calcext:value-type="string">
            <text:p>Schema passes Rich Results Test with no warning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no duplicate ItemList schema blocks are present on the same page.</text:p>
          </table:table-cell>
          <table:table-cell table:style-name="ce3" office:value-type="string" calcext:value-type="string">
            <text:p>Open the page source or DevTools.</text:p>
            <text:p>Search for all &lt;script type="application/ld+json"&gt; blocks containing "@type": "ItemList".</text:p>
            <text:p>Confirm there is only one ItemList block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Only one ItemList schema block exists on the page.</text:p>
          </table:table-cell>
          <table:table-cell table:style-name="ce3" office:value-type="string" calcext:value-type="string">
            <text:p>Single schema block is present; no duplicate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ItemList schema is rendered only once per page.</text:p>
          </table:table-cell>
          <table:table-cell table:style-name="ce3" office:value-type="string" calcext:value-type="string">
            <text:p>Same as above – check all schema blocks.</text:p>
            <text:p>Confirm only a single ItemList schema exists on the page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Schema is rendered once, not repeated anywhere.</text:p>
          </table:table-cell>
          <table:table-cell table:style-name="ce3" office:value-type="string" calcext:value-type="string">
            <text:p>ItemList appears only once per page as expect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schema values are correctly escaped for special characters in model/variant names.</text:p>
          </table:table-cell>
          <table:table-cell table:style-name="ce3" office:value-type="string" calcext:value-type="string">
            <text:p>Use a model or variant with special characters (like &amp;, &lt;, &gt;).</text:p>
            <text:p>Open the schema block in Page Source or DevTools.</text:p>
            <text:p>Check that special characters are properly escaped (&amp;amp;, &amp;lt;, &amp;gt;)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Special characters (&amp;, &lt;, &gt;) are escaped correctly (&amp;amp;, &amp;lt;, &amp;gt;).</text:p>
          </table:table-cell>
          <table:table-cell table:style-name="ce3" office:value-type="string" calcext:value-type="string">
            <text:p>Schema values display correctly with escaped characters; JSON-LD is vali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ructured Data Verification (ItemList Schema)</text:p>
          </table:table-cell>
          <table:table-cell table:style-name="ce3" office:value-type="string" calcext:value-type="string">
            <text:p>Verify schema values do not break when model/variant name contains numbers or symbols.</text:p>
          </table:table-cell>
          <table:table-cell table:style-name="ce3" office:value-type="string" calcext:value-type="string">
            <text:p>Use a model or variant with numbers or symbols (e.g., Model X 2026 or Variant #1).</text:p>
            <text:p>Check the ItemList schema in Page Source.</text:p>
            <text:p>Confirm that the JSON-LD parses correctly and does not break.</text:p>
          </table:table-cell>
          <table:table-cell table:style-name="ce3" office:value-type="string" calcext:value-type="string">
            <text:p>schemashould be there</text:p>
          </table:table-cell>
          <table:table-cell table:style-name="ce3" office:value-type="string" calcext:value-type="string">
            <text:p>Schema parses correctly even if name contains numbers or symbols</text:p>
          </table:table-cell>
          <table:table-cell table:style-name="ce3" office:value-type="string" calcext:value-type="string">
            <text:p>Schema works fine; JSON-LD is valid and does not break.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52" table:style-name="ta16">
        <table:table-column table:style-name="co8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LCP metric is tracked correctly on Mobile for Model Overview pages.</text:p>
          </table:table-cell>
          <table:table-cell table:style-name="ce3" office:value-type="string" calcext:value-type="string">
            <text:p>Open the website on a mobile device or emulator.</text:p>
            <text:p>Navigate to any Model Overview page.</text:p>
            <text:p>Use a performance monitoring tool (like WebPageTest, Lighthouse, or Chrome DevTools) to check LCP (Largest Contentful Paint).</text:p>
            <text:p>Record the LCP metric and confirm it is tracked correctly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LCP is captured correctly on mobile pages.</text:p>
          </table:table-cell>
          <table:table-cell table:style-name="ce3" office:value-type="string" calcext:value-type="string">
            <text:p>captured correctly 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LCP metric is tracked correctly on Desktop for Model Overview pages.</text:p>
          </table:table-cell>
          <table:table-cell table:style-name="ce3" office:value-type="string" calcext:value-type="string">
            <text:p>Open the website on a desktop browser.</text:p>
            <text:p>Navigate to a Model Overview page.</text:p>
            <text:p>Use Chrome DevTools or Lighthouse to monitor LCP metric.</text:p>
            <text:p>Verify that LCP is tracked correctly and recorded in the tool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LCP is captured correctly on desktop pages.</text:p>
          </table:table-cell>
          <table:table-cell table:style-name="ce3" office:value-type="string" calcext:value-type="string">
            <text:p>captured correctly 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Speed Index is tracked correctly on Mobile across key pages.</text:p>
          </table:table-cell>
          <table:table-cell table:style-name="ce3" office:value-type="string" calcext:value-type="string">
            <text:p>Open the website on a mobile device.</text:p>
            <text:p>Navigate through key pages (Model Overview, Price, Gallery, etc.).</text:p>
            <text:p>Use Lighthouse or WebPageTest to capture Speed Index.</text:p>
            <text:p>Verify the metric is tracked correctly for all pages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Speed Index metrics are captured accurately on mobile for all key pages.</text:p>
          </table:table-cell>
          <table:table-cell table:style-name="ce3" office:value-type="string" calcext:value-type="string">
            <text:p>speed index captured accura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Speed Index is tracked correctly on Desktop across key pages.</text:p>
          </table:table-cell>
          <table:table-cell table:style-name="ce3" office:value-type="string" calcext:value-type="string">
            <text:p>Open the website on a desktop browser.</text:p>
            <text:p>Navigate through key pages.</text:p>
            <text:p>Use Lighthouse or WebPageTest to capture Speed Index.</text:p>
            <text:p>Confirm the metric is tracked accurately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Speed Index metrics are captured accurately on desktop for all key pages.</text:p>
          </table:table-cell>
          <table:table-cell table:style-name="ce3" office:value-type="string" calcext:value-type="string">
            <text:p>speed index captured accura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ATF elements contributing to LCP load within acceptable time.</text:p>
          </table:table-cell>
          <table:table-cell table:style-name="ce3" office:value-type="string" calcext:value-type="string">
            <text:p>Open a Model Overview page on Web or Mobile.</text:p>
            <text:p>Inspect elements above the fold (ATF).</text:p>
            <text:p>Use Lighthouse/DevTools to measure time for ATF elements to load.</text:p>
            <text:p>Ensure they load within acceptable thresholds (e.g., &lt;2.5s for LCP)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Above-the-fold elements load quickly, contributing to acceptable LCP</text:p>
          </table:table-cell>
          <table:table-cell table:style-name="ce3" office:value-type="string" calcext:value-type="string">
            <text:p>fold elements loads quick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images contributing to LCP are loaded with correct priority.</text:p>
          </table:table-cell>
          <table:table-cell table:style-name="ce3" office:value-type="string" calcext:value-type="string">
            <text:p>Open a Model Overview page on Web or Mobile.</text:p>
            <text:p>Inspect images that appear above the fold.</text:p>
            <text:p>Check the network tab in DevTools to see if LCP images are prioritized.</text:p>
            <text:p>Confirm they are loaded first, before lower-priority assets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Images affecting LCP load first, before lower-priority assets.</text:p>
          </table:table-cell>
          <table:table-cell table:style-name="ce3" office:value-type="string" calcext:value-type="string">
            <text:p>LCP images are loaded first, priority correctly appli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Web Core Vitals improvements reflect in PageSpeed Insights.</text:p>
          </table:table-cell>
          <table:table-cell table:style-name="ce3" office:value-type="string" calcext:value-type="string">
            <text:p>Open PageSpeed Insights and enter a Model Overview page URL.</text:p>
            <text:p>Run the performance test for Mobile and Desktop.</text:p>
            <text:p>Check Core Web Vitals metrics (LCP, CLS, FID/INP).</text:p>
            <text:p>Confirm improvements are reflected compared to previous scores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PageSpeed Insights shows improved Core Web Vitals </text:p>
          </table:table-cell>
          <table:table-cell table:style-name="ce3" office:value-type="string" calcext:value-type="string">
            <text:p>Metrics reflect improvement as expected on both Mobile and Deskto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fixes applied on Mobile do not negatively impact Desktop performance.</text:p>
          </table:table-cell>
          <table:table-cell table:style-name="ce3" office:value-type="string" calcext:value-type="string">
            <text:p>Apply or check fixes on Mobile pages.</text:p>
            <text:p>Open the same pages on Desktop.</text:p>
            <text:p>Measure performance metrics (LCP, CLS, FID/INP, Speed Index).</text:p>
            <text:p>Confirm Desktop metrics are not negatively impacted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Desktop performance remains stable after Mobile fixes.</text:p>
          </table:table-cell>
          <table:table-cell table:style-name="ce3" office:value-type="string" calcext:value-type="string">
            <text:p>Desktop metrics (LCP, Speed Index, CLS) are unaffect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gallery popup displays default tab content correctly.</text:p>
          </table:table-cell>
          <table:table-cell table:style-name="ce3" office:value-type="string" calcext:value-type="string">
            <text:p>Open a Model Overview page on Web or Mobile.</text:p>
            <text:p>Click the gallery popup to open it.</text:p>
            <text:p>Observe the default tab (e.g., Exterior, Interior, Colors) content.</text:p>
            <text:p>Confirm it is loaded and displayed correctly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When opened, gallery shows the correct default tab content</text:p>
          </table:table-cell>
          <table:table-cell table:style-name="ce3" office:value-type="string" calcext:value-type="string">
            <text:p>Default tab loads properly without error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clicking on gallery popup tabs switches content correctly.</text:p>
          </table:table-cell>
          <table:table-cell table:style-name="ce3" office:value-type="string" calcext:value-type="string">
            <text:p>Open the gallery popup.</text:p>
            <text:p>Click on a different tab (Interior, Colors, etc.).</text:p>
            <text:p>Confirm the content switches to the new tab correctly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Clicking a tab loads its content immediately and correctly.</text:p>
          </table:table-cell>
          <table:table-cell table:style-name="ce3" office:value-type="string" calcext:value-type="string">
            <text:p>Tab switching works as expected; content updates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previously active tab content is hidden when switching tabs.</text:p>
          </table:table-cell>
          <table:table-cell table:style-name="ce3" office:value-type="string" calcext:value-type="string">
            <text:p>Open gallery popup.</text:p>
            <text:p>Switch from one tab to another.</text:p>
            <text:p>Check that the previous tab’s content is no longer visible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Previous tab content disappears after switching.</text:p>
          </table:table-cell>
          <table:table-cell table:style-name="ce3" office:value-type="string" calcext:value-type="string">
            <text:p>Old tab content hides properly; no remnant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no tab content overlaps or remains visible after tab switch.</text:p>
          </table:table-cell>
          <table:table-cell table:style-name="ce3" office:value-type="string" calcext:value-type="string">
            <text:p>Open gallery popup and switch tabs multiple times.</text:p>
            <text:p>Verify that no content overlaps or remains visible from the previous tab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Only current tab content is visible; no overlapping occurs.</text:p>
          </table:table-cell>
          <table:table-cell table:style-name="ce3" office:value-type="string" calcext:value-type="string">
            <text:p>Tabs display correctly; no overlap or leftover conten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tab state is maintained correctly on repeated tab clicks.</text:p>
          </table:table-cell>
          <table:table-cell table:style-name="ce3" office:value-type="string" calcext:value-type="string">
            <text:p>Open gallery popup.</text:p>
            <text:p>Click the same tab multiple times.</text:p>
            <text:p>Confirm the content remains correct, and no duplicate rendering occurs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Re-clicking the same tab maintains correct state without duplication or error.</text:p>
          </table:table-cell>
          <table:table-cell table:style-name="ce3" office:value-type="string" calcext:value-type="string">
            <text:p>Tab content remains stable; no duplicate rendering occur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gallery popup tab switching works on mobile devices.</text:p>
          </table:table-cell>
          <table:table-cell table:style-name="ce3" office:value-type="string" calcext:value-type="string">
            <text:p>Open gallery popup on a mobile device.</text:p>
            <text:p>Switch between tabs.</text:p>
            <text:p>Confirm content loads correctly and is responsive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Tab switching on mobile displays content correctly and responsively.</text:p>
          </table:table-cell>
          <table:table-cell table:style-name="ce3" office:value-type="string" calcext:value-type="string">
            <text:p>Gallery tabs function smoothly on mobile device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gallery popup tab switching works on desktop devices.</text:p>
          </table:table-cell>
          <table:table-cell table:style-name="ce3" office:value-type="string" calcext:value-type="string">
            <text:p>Open gallery popup on Desktop browser.</text:p>
            <text:p>Switch between tabs.</text:p>
            <text:p>Confirm content loads correctly and without errors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Tab switching on desktop displays content correctly and instantly.</text:p>
          </table:table-cell>
          <table:table-cell table:style-name="ce3" office:value-type="string" calcext:value-type="string">
            <text:p>Gallery tabs function properly on desktop; no glitche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del Overview Page Performance &amp; Gallery Functionality</text:p>
          </table:table-cell>
          <table:table-cell table:style-name="ce3" office:value-type="string" calcext:value-type="string">
            <text:p>Verify updated gallery popup functionality opens without delay.</text:p>
          </table:table-cell>
          <table:table-cell table:style-name="ce3" office:value-type="string" calcext:value-type="string">
            <text:p>Click to open gallery popup on Web or Mobile.</text:p>
            <text:p>Measure time taken to open and load default content.</text:p>
            <text:p>Confirm popup opens instantly or within acceptable time limits.</text:p>
          </table:table-cell>
          <table:table-cell table:style-name="ce3" office:value-type="string" calcext:value-type="string">
            <text:p>LCP should be in given time</text:p>
          </table:table-cell>
          <table:table-cell table:style-name="ce3" office:value-type="string" calcext:value-type="string">
            <text:p>Gallery popup opens quickly, default tab content loads immediately.</text:p>
          </table:table-cell>
          <table:table-cell table:style-name="ce3" office:value-type="string" calcext:value-type="string">
            <text:p>Popup opens instantly on both Mobile and Desktop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53" table:style-name="ta17">
        <table:table-column table:style-name="co8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Display Verification</text:p>
          </table:table-cell>
          <table:table-cell table:style-name="ce3" office:value-type="string" calcext:value-type="string">
            <text:p>Verified by checking if the user is getting Offers only once.</text:p>
          </table:table-cell>
          <table:table-cell table:style-name="ce3" office:value-type="string" calcext:value-type="string">
            <text:p>Open the website on Web or Mobile.</text:p>
            <text:p>Navigate to a car Model Overview page.</text:p>
            <text:p>Scroll to the Offers section.</text:p>
            <text:p>Observe each offer listed for the model.</text:p>
          </table:table-cell>
          <table:table-cell table:style-name="ce3" office:value-type="string" calcext:value-type="string">
            <text:p>car model page is required</text:p>
          </table:table-cell>
          <table:table-cell table:style-name="ce3" office:value-type="string" calcext:value-type="string">
            <text:p>Each offer is displayed only once per model.</text:p>
          </table:table-cell>
          <table:table-cell table:style-name="ce3" office:value-type="string" calcext:value-type="string">
            <text:p>offer is displayed only onc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Display Verification</text:p>
          </table:table-cell>
          <table:table-cell table:style-name="ce3" office:value-type="string" calcext:value-type="string">
            <text:p>Verified by checking if the Offers are not getting repeated.</text:p>
          </table:table-cell>
          <table:table-cell table:style-name="ce3" office:value-type="string" calcext:value-type="string">
            <text:p>Open the website on Web or Mobile.</text:p>
            <text:p>Navigate to a car Model Overview page.</text:p>
            <text:p>Scroll through all offers for the model.</text:p>
            <text:p>Verify that no offer appears more than once.</text:p>
          </table:table-cell>
          <table:table-cell table:style-name="ce3" office:value-type="string" calcext:value-type="string">
            <text:p>car model page is required</text:p>
          </table:table-cell>
          <table:table-cell table:style-name="ce3" office:value-type="string" calcext:value-type="string">
            <text:p>All offers are unique, no repetitions anywhere on the page.</text:p>
          </table:table-cell>
          <table:table-cell table:style-name="ce3" office:value-type="string" calcext:value-type="string">
            <text:p>no repetitions of offe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Display Verification</text:p>
          </table:table-cell>
          <table:table-cell table:style-name="ce3" office:value-type="string" calcext:value-type="string">
            <text:p>Verified by checking if the user Offers are not getting repeated on Model Price level page of KSA.</text:p>
          </table:table-cell>
          <table:table-cell table:style-name="ce3" office:value-type="string" calcext:value-type="string">
            <text:p>Open the website in the KSA region on Web or Mobile.</text:p>
            <text:p>Navigate to a car Model Price Level page.</text:p>
            <text:p>Scroll to the Offers section for the model.</text:p>
            <text:p>Check that each offer appears only once, with no duplicates.</text:p>
          </table:table-cell>
          <table:table-cell table:style-name="ce3" office:value-type="string" calcext:value-type="string">
            <text:p>car model page is required</text:p>
          </table:table-cell>
          <table:table-cell table:style-name="ce3" office:value-type="string" calcext:value-type="string">
            <text:p>Offers on the Model Price Level page in KSA are unique.</text:p>
          </table:table-cell>
          <table:table-cell table:style-name="ce3" office:value-type="string" calcext:value-type="string">
            <text:p>offers are uniqu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63" table:style-name="ta18"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Cars Widget Verification</text:p>
          </table:table-cell>
          <table:table-cell table:style-name="ce3" office:value-type="string" calcext:value-type="string">
            <text:p>Verified by checking if the user is able to see the widget for all the latest, popular and upcoming brand cars on Overview page using web.</text:p>
          </table:table-cell>
          <table:table-cell table:style-name="ce3" office:value-type="string" calcext:value-type="string">
            <text:p>Open the website on a desktop browser (Web).</text:p>
            <text:p>Navigate to the Brand Overview page for any car brand.</text:p>
            <text:p>Scroll through the page and locate the Latest, Popular, and Upcoming cars widgets.</text:p>
            <text:p>Verify that all three widgets are visible and display content correctly (car names, images, links).</text:p>
          </table:table-cell>
          <table:table-cell table:style-name="ce3" office:value-type="string" calcext:value-type="string">
            <text:p>car details is required</text:p>
          </table:table-cell>
          <table:table-cell table:style-name="ce3" office:value-type="string" calcext:value-type="string">
            <text:p>All three widgets (Latest, Popular, Upcoming) are visible and populated with correct car data.</text:p>
            <text:p>No broken images or missing sections appear.</text:p>
          </table:table-cell>
          <table:table-cell table:style-name="ce3" office:value-type="string" calcext:value-type="string">
            <text:p>all widgets are visible with coreect data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Cars Widget Verification</text:p>
          </table:table-cell>
          <table:table-cell table:style-name="ce3" office:value-type="string" calcext:value-type="string">
            <text:p>Verified by checking if the user is able to see the widget for all the latest, popular and upcoming brand cars on Overview page using wap.</text:p>
          </table:table-cell>
          <table:table-cell table:style-name="ce3" office:value-type="string" calcext:value-type="string">
            <text:p>Open the website on a mobile device or mobile browser (WAP).</text:p>
            <text:p>Navigate to the Brand Overview page for any car brand.</text:p>
            <text:p>Scroll and locate the Latest, Popular, and Upcoming cars widgets.</text:p>
            <text:p>Verify that all widgets are visible and display content correctly.</text:p>
          </table:table-cell>
          <table:table-cell table:style-name="ce3" office:value-type="string" calcext:value-type="string">
            <text:p>car details is required</text:p>
          </table:table-cell>
          <table:table-cell table:style-name="ce3" office:value-type="string" calcext:value-type="string">
            <text:p>All three widgets (Latest, Popular, Upcoming) are visible and populated with correct car data on mobile.</text:p>
          </table:table-cell>
          <table:table-cell table:style-name="ce3" office:value-type="string" calcext:value-type="string">
            <text:p>all widgets are visible with coreect da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75" table:style-name="ta19">
        <table:table-column table:style-name="co8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9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3" office:value-type="string" calcext:value-type="string">
            <text:p>Navigation &amp; URL Verification</text:p>
          </table:table-cell>
          <table:table-cell table:style-name="ce3" office:value-type="string" calcext:value-type="string">
            <text:p>Verified by checking if the user is getting navigated to correct URL and page.</text:p>
          </table:table-cell>
          <table:table-cell table:style-name="ce3" office:value-type="string" calcext:value-type="string">
            <text:p>Open the website on a desktop browser (Web).</text:p>
            <text:p>Click the link/button/menu that triggers navigation.</text:p>
            <text:p>Observe the URL and the page loaded.</text:p>
          </table:table-cell>
          <table:table-cell table:style-name="ce3" office:value-type="string" calcext:value-type="string">
            <text:p>correct url is required</text:p>
          </table:table-cell>
          <table:table-cell table:style-name="ce3" office:value-type="string" calcext:value-type="string">
            <text:p>The user is navigated to the correct URL.</text:p>
            <text:p>The correct page content is displayed</text:p>
          </table:table-cell>
          <table:table-cell table:style-name="ce3" office:value-type="string" calcext:value-type="string">
            <text:p>the user is navigated to correct ur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avigation &amp; URL Verification</text:p>
          </table:table-cell>
          <table:table-cell table:style-name="ce3" office:value-type="string" calcext:value-type="string">
            <text:p>Verified by checking if the user is navigated to correct URL using web and wap.</text:p>
          </table:table-cell>
          <table:table-cell table:style-name="ce3" office:value-type="string" calcext:value-type="string">
            <text:p>Open the website on Web (desktop). Click the navigation element and note the URL/page.</text:p>
            <text:p>Open the website on WAP (mobile browser/emulator). Repeat the same navigation.</text:p>
          </table:table-cell>
          <table:table-cell table:style-name="ce3" office:value-type="string" calcext:value-type="string">
            <text:p>correct url is required</text:p>
          </table:table-cell>
          <table:table-cell table:style-name="ce3" office:value-type="string" calcext:value-type="string">
            <text:p>Both Web and WAP redirect the user to the same correct URL.</text:p>
            <text:p>Page content is displayed correctly on both platforms.</text:p>
          </table:table-cell>
          <table:table-cell table:style-name="ce3" office:value-type="string" calcext:value-type="string">
            <text:p>the user is navigated to correct url on both platform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avigation &amp; URL Verification</text:p>
          </table:table-cell>
          <table:table-cell table:style-name="ce3" office:value-type="string" calcext:value-type="string">
            <text:p>Verified by checking if the user is getting navigated to correct URL and page using both platforms without any error.</text:p>
          </table:table-cell>
          <table:table-cell table:style-name="ce3" office:value-type="string" calcext:value-type="string">
            <text:p>Open the website on Web and perform the navigation.</text:p>
            <text:p>Open the website on WAP and perform the navigation.</text:p>
            <text:p>Check that no errors appear (like 404 or broken pages).</text:p>
            <text:p>Confirm that the URL and page content are correct on both platforms.</text:p>
          </table:table-cell>
          <table:table-cell table:style-name="ce3" office:value-type="string" calcext:value-type="string">
            <text:p>correct url is required</text:p>
          </table:table-cell>
          <table:table-cell table:style-name="ce3" office:value-type="string" calcext:value-type="string">
            <text:p>Navigation works without errors on Web and WAP.</text:p>
            <text:p>Users are taken to the correct URL and see the correct page content.</text:p>
          </table:table-cell>
          <table:table-cell table:style-name="ce3" office:value-type="string" calcext:value-type="string">
            <text:p>navigation work on both wap and web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83" table:style-name="ta20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Similar Car Comparison section displays exactly 5 models on Web.</text:p>
          </table:table-cell>
          <table:table-cell table:style-name="ce3" office:value-type="string" calcext:value-type="string">
            <text:p>Open the website on a desktop browser</text:p>
            <text:p>Navigate to any car detail page</text:p>
            <text:p>Scroll to “Similar Car Comparison” section</text:p>
            <text:p>Count the number of models displayed</text:p>
          </table:table-cell>
          <table:table-cell table:style-name="ce3" office:value-type="string" calcext:value-type="string">
            <text:p>5 models is required </text:p>
          </table:table-cell>
          <table:table-cell table:style-name="ce3" office:value-type="string" calcext:value-type="string">
            <text:p>The Similar Car Comparison section displays exactly 5 models on Web.</text:p>
          </table:table-cell>
          <table:table-cell table:style-name="ce3" office:value-type="string" calcext:value-type="string">
            <text:p>To be filled during testing] e.g., “5 models displayed as expect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Similar Car Comparison section displays exactly 5 models on Mobile.</text:p>
          </table:table-cell>
          <table:table-cell table:style-name="ce3" office:value-type="string" calcext:value-type="string">
            <text:p>Open the website on a mobile device or emulator</text:p>
            <text:p>Navigate to any car detail page</text:p>
            <text:p>Scroll to “Similar Car Comparison” section</text:p>
            <text:p>Count the number of models displayed</text:p>
          </table:table-cell>
          <table:table-cell table:style-name="ce3" office:value-type="string" calcext:value-type="string">
            <text:p>5 models is required</text:p>
          </table:table-cell>
          <table:table-cell table:style-name="ce3" office:value-type="string" calcext:value-type="string">
            <text:p>The Similar Car Comparison section displays exactly 5 models on Mobile.</text:p>
          </table:table-cell>
          <table:table-cell table:style-name="ce3" office:value-type="string" calcext:value-type="string">
            <text:p>To be filled during testing] e.g., “5 models displayed as expect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no additional model appears on Mobile after swipe/scroll.</text:p>
          </table:table-cell>
          <table:table-cell table:style-name="ce3" office:value-type="string" calcext:value-type="string">
            <text:p>Open the site on mobile</text:p>
            <text:p>Go to car detail page</text:p>
            <text:p>Scroll/swipe horizontally/vertically in comparison section</text:p>
            <text:p>Observe if additional models appear beyond 5</text:p>
          </table:table-cell>
          <table:table-cell table:style-name="ce3" office:value-type="string" calcext:value-type="string">
            <text:p>5 model is required</text:p>
          </table:table-cell>
          <table:table-cell table:style-name="ce3" office:value-type="string" calcext:value-type="string">
            <text:p>After scrolling/swiping, no additional models appear beyond the 5 initially displayed.</text:p>
          </table:table-cell>
          <table:table-cell table:style-name="ce3" office:value-type="string" calcext:value-type="string">
            <text:p>No additional models appear; 5 models remai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UI alignment and spacing remain correct after reducing to 5 models.</text:p>
          </table:table-cell>
          <table:table-cell table:style-name="ce3" office:value-type="string" calcext:value-type="string">
            <text:p>Open comparison section (Web &amp; Mobile)</text:p>
            <text:p>Observe layout after limiting to 5 models</text:p>
            <text:p>Check spacing, padding, alignment of cards</text:p>
          </table:table-cell>
          <table:table-cell table:style-name="ce3" office:value-type="string" calcext:value-type="string">
            <text:p>5 model is required</text:p>
          </table:table-cell>
          <table:table-cell table:style-name="ce3" office:value-type="string" calcext:value-type="string">
            <text:p>The layout is properly aligned, spacing and padding between models are consistent.</text:p>
          </table:table-cell>
          <table:table-cell table:style-name="ce3" office:value-type="string" calcext:value-type="string">
            <text:p>Models are aligned properly; spacing between cards is consisten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responsive behavior across screen sizes (mobile, tablet, desktop).</text:p>
          </table:table-cell>
          <table:table-cell table:style-name="ce3" office:value-type="string" calcext:value-type="string">
            <text:p>Open the page on desktop</text:p>
            <text:p>Resize browser (desktop → tablet → mobile view)</text:p>
            <text:p>Observe layout and behavior of comparison section</text:p>
          </table:table-cell>
          <table:table-cell table:style-name="ce3" office:value-type="string" calcext:value-type="string">
            <text:p>mobile tablet desktop is required</text:p>
          </table:table-cell>
          <table:table-cell table:style-name="ce3" office:value-type="string" calcext:value-type="string">
            <text:p>On desktop, tablet, and mobile, the comparison section is responsive:</text:p>
          </table:table-cell>
          <table:table-cell table:style-name="ce3" office:value-type="string" calcext:value-type="string">
            <text:p>Layout adapts correctly on desktop, tablet, and mobile; no overflow or broken card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revised price scoring logic is applied correctly for ±5% → score 5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 (e.g., ₹10,00,000)</text:p>
            <text:p>Identify or configure a comparison model whose price falls within ±5% of the base car</text:p>
            <text:p>Example range: ₹9,50,000 – ₹10,50,000</text:p>
            <text:p>Scroll to the Similar Car Comparison section</text:p>
            <text:p>Locate the selected comparison model</text:p>
            <text:p>Check the price difference between base car and compared model</text:p>
            <text:p>Verify the score assigned to that model</text:p>
          </table:table-cell>
          <table:table-cell/>
          <table:table-cell table:style-name="ce3" office:value-type="string" calcext:value-type="string">
            <text:p>Model within ±5% price range gets score = 5.</text:p>
            <text:p>Ranking reflects this score correctly.</text:p>
          </table:table-cell>
          <table:table-cell table:style-name="ce3" office:value-type="string" calcext:value-type="string">
            <text:p>Model within ±5% price range is assigned score = 5 and appears at top rank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revised price scoring logic is applied correctly for ±10% → score 4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 (e.g., ₹10,00,000)</text:p>
            <text:p>Identify or configure a comparison model whose price falls within ±10% of the base car</text:p>
            <text:p>Example range: ₹9,00,000 – ₹11,00,000</text:p>
            <text:p>Ensure it is outside ±5% but within ±10%</text:p>
            <text:p>Scroll to the Similar Car Comparison section</text:p>
            <text:p>Locate the selected comparison model</text:p>
            <text:p>Check the price difference between base car and compared model</text:p>
            <text:p>Verify the score assigned to that model</text:p>
          </table:table-cell>
          <table:table-cell/>
          <table:table-cell table:style-name="ce3" office:value-type="string" calcext:value-type="string">
            <text:p>Model within ±10% (but outside ±5%) gets score = 4</text:p>
          </table:table-cell>
          <table:table-cell table:style-name="ce3" office:value-type="string" calcext:value-type="string">
            <text:p>Model within ±10% (outside ±5%) is assigned score = 4 and ranked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revised price scoring logic is applied correctly for ±20% → score 3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 (e.g., ₹10,00,000)</text:p>
            <text:p>Identify or configure a comparison model whose price falls within ±20% of the base car</text:p>
            <text:p>Example range: ₹8,00,000 – ₹12,00,000</text:p>
            <text:p>Ensure it is outside ±10% but within ±20%</text:p>
            <text:p>Scroll to the Similar Car Comparison section</text:p>
            <text:p>Locate the selected comparison model</text:p>
            <text:p>Check the price difference between base car and compared model</text:p>
            <text:p>Verify the score assigned to that model</text:p>
          </table:table-cell>
          <table:table-cell/>
          <table:table-cell table:style-name="ce3" office:value-type="string" calcext:value-type="string">
            <text:p>Model within ±20% (but outside ±10%) gets score = 3</text:p>
          </table:table-cell>
          <table:table-cell table:style-name="ce3" office:value-type="string" calcext:value-type="string">
            <text:p>Model within ±20% (outside ±10%) is assigned score = 3 and displayed according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revised price scoring logic is applied correctly for ±30% → score 2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 (e.g., ₹10,00,000)</text:p>
            <text:p>Identify or configure a comparison model whose price falls within ±30% of the base car</text:p>
            <text:p>Example range: ₹7,00,000 – ₹13,00,000</text:p>
            <text:p>Ensure it is outside ±20% but within ±30%</text:p>
            <text:p>Scroll to the Similar Car Comparison section</text:p>
            <text:p>Locate the selected comparison model</text:p>
            <text:p>Check the price difference between base car and compared model</text:p>
            <text:p>Verify the score assigned to that model</text:p>
          </table:table-cell>
          <table:table-cell/>
          <table:table-cell table:style-name="ce3" office:value-type="string" calcext:value-type="string">
            <text:p>Model within ±30% (but outside ±20%) gets score = 2</text:p>
          </table:table-cell>
          <table:table-cell table:style-name="ce3" office:value-type="string" calcext:value-type="string">
            <text:p>Model within ±30% (outside ±20%) is assigned score = 2 and ranked lowe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revised price scoring logic is applied correctly for ±40% → score 1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 (e.g., ₹10,00,000)</text:p>
            <text:p>Identify or configure a comparison model whose price falls within ±40% of the base car</text:p>
            <text:p>Example range: ₹6,00,000 – ₹14,00,000</text:p>
            <text:p>Ensure it is outside ±30% but within ±40%</text:p>
            <text:p>Scroll to the Similar Car Comparison section</text:p>
            <text:p>Locate the selected comparison model</text:p>
            <text:p>Check the price difference between base car and compared model</text:p>
            <text:p>Verify the score assigned to that model</text:p>
          </table:table-cell>
          <table:table-cell/>
          <table:table-cell table:style-name="ce3" office:value-type="string" calcext:value-type="string">
            <text:p>Model within ±40% (but outside ±30%) gets score = 1</text:p>
          </table:table-cell>
          <table:table-cell table:style-name="ce3" office:value-type="string" calcext:value-type="string">
            <text:p>Model within ±40% (outside ±30%) is assigned score = 1 and appears at the bottom of the sectio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models outside ±40% range are excluded or scored correctly as per logic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 (e.g., ₹10,00,000)</text:p>
            <text:p>Identify or configure comparison models whose prices fall outside ±40% range</text:p>
            <text:p>Example: Below ₹6,00,000 or above ₹14,00,000</text:p>
            <text:p>Scroll to the Similar Car Comparison section</text:p>
            <text:p>Check whether these models appear in the comparison list</text:p>
            <text:p>If displayed, verify the score assigned to these models</text:p>
            <text:p>Observe their position in ranking/order</text:p>
          </table:table-cell>
          <table:table-cell/>
          <table:table-cell table:style-name="ce3" office:value-type="string" calcext:value-type="string">
            <text:p>Models outside ±40% are excluded or assigned score according to logic (e.g., 0 or not shown</text:p>
          </table:table-cell>
          <table:table-cell table:style-name="ce3" office:value-type="string" calcext:value-type="string">
            <text:p>Models beyond ±40% are excluded from comparison or scored 0, not affecting ranking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scoring changes reflect correctly in comparison ranking/order.</text:p>
          </table:table-cell>
          <table:table-cell table:style-name="ce3" office:value-type="string" calcext:value-type="string">
            <text:p>Open the application (Web or Mobile)</text:p>
            <text:p>Navigate to a car detail page (select a base car with a known price)</text:p>
            <text:p>Note the base car price</text:p>
            <text:p>Identify multiple comparison models with different price differences (covering ±5%, ±10%, ±20%, ±30%, ±40%, and beyond if possible)</text:p>
            <text:p>Scroll to the Similar Car Comparison section</text:p>
            <text:p>Note the score assigned to each model based on price difference</text:p>
            <text:p>Observe the order in which models are displayed</text:p>
            <text:p>Compare ranking with expected scoring priority</text:p>
          </table:table-cell>
          <table:table-cell/>
          <table:table-cell table:style-name="ce3" office:value-type="string" calcext:value-type="string">
            <text:p>Models are ranked in descending order of score.</text:p>
            <text:p>Higher scored models appear first.</text:p>
            <text:p>Ties are handled consistently.</text:p>
          </table:table-cell>
          <table:table-cell table:style-name="ce3" office:value-type="string" calcext:value-type="string">
            <text:p>Models are displayed in descending score order (5 → 1), tie-breaker logic applied consisten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variants without price are excluded from comparison logic.</text:p>
          </table:table-cell>
          <table:table-cell table:style-name="ce3" office:value-type="string" calcext:value-type="string">
            <text:p>Open the application (Web or Mobile)</text:p>
            <text:p>Navigate to a car detail page</text:p>
            <text:p>Identify or prepare test data where some variants do not have a price value</text:p>
            <text:p>Scroll to the Similar Car Comparison section</text:p>
            <text:p>Observe the list of variants/models displayed</text:p>
            <text:p>Cross-check with backend/test data to identify variants missing price</text:p>
            <text:p>Verify whether such variants are included or excluded</text:p>
          </table:table-cell>
          <table:table-cell/>
          <table:table-cell table:style-name="ce3" office:value-type="string" calcext:value-type="string">
            <text:p>Variants without price are not displayed in the comparison section</text:p>
          </table:table-cell>
          <table:table-cell table:style-name="ce3" office:value-type="string" calcext:value-type="string">
            <text:p>Variants without price are not shown; only valid-priced variants appea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models with null price values are not shown in Similar Comparison section.</text:p>
          </table:table-cell>
          <table:table-cell table:style-name="ce3" office:value-type="string" calcext:value-type="string">
            <text:p>Open the application (Web or Mobile)</text:p>
            <text:p>Navigate to a car detail page</text:p>
            <text:p>Identify or prepare test data where some models have null price values (price field = null/empty in backend)</text:p>
            <text:p>Scroll to the Similar Car Comparison section</text:p>
            <text:p>Observe the list of models displayed</text:p>
            <text:p>Cross-check with backend/test data to identify models having null price</text:p>
            <text:p>Verify whether these models appear in the comparison section</text:p>
          </table:table-cell>
          <table:table-cell/>
          <table:table-cell table:style-name="ce3" office:value-type="string" calcext:value-type="string">
            <text:p>Models with null price values do not appear in the section.</text:p>
          </table:table-cell>
          <table:table-cell table:style-name="ce3" office:value-type="string" calcext:value-type="string">
            <text:p>Models with null prices are excluded; section functions normal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models with “Coming Soon”, or placeholder prices are excluded.</text:p>
          </table:table-cell>
          <table:table-cell table:style-name="ce3" office:value-type="string" calcext:value-type="string">
            <text:p>Open the application (Web or Mobile)</text:p>
            <text:p>Navigate to a car detail page</text:p>
            <text:p>Identify or prepare test data where some models have:</text:p>
            <text:p>“Coming Soon”</text:p>
            <text:p>Placeholder values (e.g., “TBD”, “N/A”, “-”, etc.)</text:p>
            <text:p>Scroll to the Similar Car Comparison section</text:p>
            <text:p>Observe the list of models displayed</text:p>
            <text:p>Cross-check with backend/test data to identify models with such placeholder prices</text:p>
            <text:p>Verify whether these models appear in the comparison section</text:p>
          </table:table-cell>
          <table:table-cell/>
          <table:table-cell table:style-name="ce3" office:value-type="string" calcext:value-type="string">
            <text:p>Models marked “Coming Soon” or with placeholder prices are excluded.</text:p>
          </table:table-cell>
          <table:table-cell table:style-name="ce3" office:value-type="string" calcext:value-type="string">
            <text:p>Models with “Coming Soon” or placeholders do not appear in compariso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only models with exact numeric price values are included.</text:p>
          </table:table-cell>
          <table:table-cell table:style-name="ce3" office:value-type="string" calcext:value-type="string">
            <text:p>Open the application (Web or Mobile)</text:p>
            <text:p>Navigate to a car detail page</text:p>
            <text:p>Prepare or identify test data with mixed price formats:</text:p>
            <text:p>Exact numeric values (e.g., ₹10,00,000)</text:p>
            <text:p>Text-based values (e.g., “Starting from”, “Estimated”)</text:p>
            <text:p>Placeholder values (e.g., “N/A”, “Coming Soon”)</text:p>
            <text:p>Null/empty values</text:p>
            <text:p>Scroll to the Similar Car Comparison section</text:p>
            <text:p>Observe the list of models displayed</text:p>
            <text:p>Cross-check each model’s price format from backend/test data</text:p>
            <text:p>Verify which models are included in the comparison</text:p>
          </table:table-cell>
          <table:table-cell/>
          <table:table-cell table:style-name="ce3" office:value-type="string" calcext:value-type="string">
            <text:p>Only models with exact numeric prices are displayed.</text:p>
            <text:p>Text-based, placeholder, null, or approximate prices are excluded</text:p>
          </table:table-cell>
          <table:table-cell table:style-name="ce3" office:value-type="string" calcext:value-type="string">
            <text:p>Only models with exact numeric prices appear; all other formats exclud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approximate prices (e.g., “Starting from”, “Estimated”, ranges) are not considered valid.</text:p>
          </table:table-cell>
          <table:table-cell table:style-name="ce3" office:value-type="string" calcext:value-type="string">
            <text:p>Open the application (Web or Mobile)</text:p>
            <text:p>Navigate to a car detail page</text:p>
            <text:p>Identify or prepare test data where some models have approximate price formats, such as:</text:p>
            <text:p>“Starting from ₹10,00,000”</text:p>
            <text:p>“Estimated ₹12,00,000”</text:p>
            <text:p>Price ranges (e.g., ₹10,00,000 – ₹12,00,000)</text:p>
            <text:p>Scroll to the Similar Car Comparison section</text:p>
            <text:p>Observe the list of models displayed</text:p>
            <text:p>Cross-check with backend/test data to identify models with approximate prices</text:p>
            <text:p>Verify whether these models appear in the comparison section</text:p>
          </table:table-cell>
          <table:table-cell/>
          <table:table-cell table:style-name="ce3" office:value-type="string" calcext:value-type="string">
            <text:p>Models with “Starting from”, “Estimated”, or price ranges are not included in comparison or scoring.</text:p>
          </table:table-cell>
          <table:table-cell table:style-name="ce3" office:value-type="string" calcext:value-type="string">
            <text:p>Models with “Starting from”, “Estimated”, or price ranges are not includ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comparison still loads correctly when some models are filtered out due to missing prices.</text:p>
          </table:table-cell>
          <table:table-cell table:style-name="ce3" office:value-type="string" calcext:value-type="string">
            <text:p>Open the application (Web or Mobile)</text:p>
            <text:p>Navigate to a car detail page</text:p>
            <text:p>Prepare or identify test data where multiple models have:</text:p>
            <text:p>Missing prices</text:p>
            <text:p>Null values</text:p>
            <text:p>Placeholder/invalid price formats</text:p>
            <text:p>Ensure only a few models have valid numeric prices</text:p>
            <text:p>Scroll to the Similar Car Comparison section</text:p>
            <text:p>Observe how the section loads after filtering invalid models</text:p>
            <text:p>Check the number of models displayed</text:p>
            <text:p>Verify layout, spacing, and functionality</text:p>
            <text:p/>
          </table:table-cell>
          <table:table-cell/>
          <table:table-cell table:style-name="ce3" office:value-type="string" calcext:value-type="string">
            <text:p>Comparison section loads without errors even if multiple models are filtered out.</text:p>
            <text:p>Layout, spacing, and functionality remain intact.</text:p>
          </table:table-cell>
          <table:table-cell table:style-name="ce3" office:value-type="string" calcext:value-type="string">
            <text:p>Section loads properly; fewer models do not break layout or scoring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imilar Car Comparison</text:p>
          </table:table-cell>
          <table:table-cell table:style-name="ce9" office:value-type="string" calcext:value-type="string">
            <text:p>Verify sorting and scoring remain consistent across Web and Mobile</text:p>
          </table:table-cell>
          <table:table-cell table:style-name="ce3" office:value-type="string" calcext:value-type="string">
            <text:p>Open the application on Web (desktop browser)</text:p>
            <text:p>Navigate to a car detail page</text:p>
            <text:p>Note the base car price and the list of comparison models</text:p>
            <text:p>Scroll to the Similar Car Comparison section</text:p>
            <text:p>Record the order of models and their assigned scores</text:p>
            <text:p>Open the same car detail page on Mobile (device or emulator)</text:p>
            <text:p>Scroll to the Similar Car Comparison section on Mobile</text:p>
            <text:p>Record the order of models and their assigned scores</text:p>
            <text:p>Compare the Web vs Mobile order and scoring</text:p>
          </table:table-cell>
          <table:table-cell/>
          <table:table-cell table:style-name="ce3" office:value-type="string" calcext:value-type="string">
            <text:p>Models’ order and scores remain consistent across platforms.</text:p>
            <text:p>No discrepancy between Web and Mobile.</text:p>
          </table:table-cell>
          <table:table-cell table:style-name="ce3" office:value-type="string" calcext:value-type="string">
            <text:p>Sorting and scoring remain consistent on both platforms; no discrepancies.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81" table:style-name="ta21">
        <table:table-column table:style-name="co8" table:default-cell-style-name="Default"/>
        <table:table-column table:style-name="co77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ATF gallery popup opens when clicking on Exterior image tab on Model Overview page.</text:p>
          </table:table-cell>
          <table:table-cell table:style-name="ce3" office:value-type="string" calcext:value-type="string">
            <text:p>Open the website on Desktop or Mobile</text:p>
            <text:p>Navigate to a car Model Overview page</text:p>
            <text:p>Locate the Exterior image tab</text:p>
            <text:p>Click on the tab</text:p>
            <text:p>Observe whether the gallery popup opens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Clicking the Exterior tab opens the gallery popup immediately.</text:p>
          </table:table-cell>
          <table:table-cell table:style-name="ce3" office:value-type="string" calcext:value-type="string">
            <text:p>Gallery opens correctly without dela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first image loads correctly on first click (Desktop – KSA).</text:p>
          </table:table-cell>
          <table:table-cell table:style-name="ce3" office:value-type="string" calcext:value-type="string">
            <text:p>Open the website on Desktop in KSA region</text:p>
            <text:p>Navigate to a Model Overview page</text:p>
            <text:p>Click on the Exterior tab</text:p>
            <text:p>Observe if the first image in the gallery loads correctly without broken image or delay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The first image appears fully loaded on first click.</text:p>
          </table:table-cell>
          <table:table-cell table:style-name="ce3" office:value-type="string" calcext:value-type="string">
            <text:p>Image loads instantly with no broken image icon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first image loads correctly on first click (Mobile – KSA).</text:p>
          </table:table-cell>
          <table:table-cell table:style-name="ce3" office:value-type="string" calcext:value-type="string">
            <text:p>Open the website on a Mobile device or emulator in KSA region</text:p>
            <text:p>Navigate to a Model Overview page</text:p>
            <text:p>Tap on the Exterior tab</text:p>
            <text:p>Observe if the first image loads correctly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The first image displays correctly on first tap.</text:p>
          </table:table-cell>
          <table:table-cell table:style-name="ce3" office:value-type="string" calcext:value-type="string">
            <text:p>Image shows immediately and fits mobile scree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first image loads correctly on first click (Desktop – AE).</text:p>
          </table:table-cell>
          <table:table-cell table:style-name="ce3" office:value-type="string" calcext:value-type="string">
            <text:p>Open the website on Desktop in AE region</text:p>
            <text:p>Navigate to a Model Overview page</text:p>
            <text:p>Click on the Exterior tab</text:p>
            <text:p>Observe if the first image loads correctly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First image appears properly on Desktop AE site.</text:p>
          </table:table-cell>
          <table:table-cell table:style-name="ce3" office:value-type="string" calcext:value-type="string">
            <text:p>Image loads correctly, high-resolution version show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first image loads correctly on first click (Mobile – AE).</text:p>
          </table:table-cell>
          <table:table-cell table:style-name="ce3" office:value-type="string" calcext:value-type="string">
            <text:p>Open the website on Mobile in AE region</text:p>
            <text:p>Navigate to a Model Overview page</text:p>
            <text:p>Tap on the Exterior tab</text:p>
            <text:p>Observe if the first image loads correctly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First image displays correctly on Mobile AE site.</text:p>
          </table:table-cell>
          <table:table-cell table:style-name="ce3" office:value-type="string" calcext:value-type="string">
            <text:p>Image appears without delay or broken icon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no broken image icon appears on first load of gallery popup.</text:p>
          </table:table-cell>
          <table:table-cell table:style-name="ce3" office:value-type="string" calcext:value-type="string">
            <text:p>Open gallery popup via Exterior tab click</text:p>
            <text:p>Observe the first image</text:p>
            <text:p>Check for any broken image icons (e.g., placeholder image or error icon)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No placeholder or broken image icon is visible when gallery opens.</text:p>
          </table:table-cell>
          <table:table-cell table:style-name="ce3" office:value-type="string" calcext:value-type="string">
            <text:p>Images load successfully; no broken icons appea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image URL returns HTTP 200 status on first click.</text:p>
          </table:table-cell>
          <table:table-cell table:style-name="ce3" office:value-type="string" calcext:value-type="string">
            <text:p>Open the gallery popup</text:p>
            <text:p>Inspect the image URL via browser developer tools (Network tab)</text:p>
            <text:p>Check the HTTP status returned for the first image</text:p>
            <text:p>Confirm it is HTTP 200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The image URL should return HTTP 200, meaning it loads successfully.</text:p>
          </table:table-cell>
          <table:table-cell table:style-name="ce3" office:value-type="string" calcext:value-type="string">
            <text:p>Image URL returns 200; image is visible in galler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image loads without requiring page refresh.</text:p>
          </table:table-cell>
          <table:table-cell table:style-name="ce3" office:value-type="string" calcext:value-type="string">
            <text:p>Open the gallery popup</text:p>
            <text:p>Observe the first image load</text:p>
            <text:p>Confirm the image loads immediately without refreshing the page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The image should appear on first click, no page refresh required.</text:p>
          </table:table-cell>
          <table:table-cell table:style-name="ce3" office:value-type="string" calcext:value-type="string">
            <text:p>Image loads immediately without any manual refresh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image loads correctly after hard refresh and cache clear.</text:p>
          </table:table-cell>
          <table:table-cell table:style-name="ce3" office:value-type="string" calcext:value-type="string">
            <text:p>Clear browser cache or perform a hard refresh (Ctrl + F5 / Cmd + Shift + R)</text:p>
            <text:p>Navigate to the Model Overview page</text:p>
            <text:p>Open the Exterior gallery popup</text:p>
            <text:p>Verify the first image loads correctly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After clearing cache or hard refresh, the image should still load properly.</text:p>
          </table:table-cell>
          <table:table-cell table:style-name="ce3" office:value-type="string" calcext:value-type="string">
            <text:p>Image appears correctly even after hard refresh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image loads correctly when switching between tabs (Interior/Exterior/Colors).</text:p>
          </table:table-cell>
          <table:table-cell table:style-name="ce3" office:value-type="string" calcext:value-type="string">
            <text:p>Open the gallery popup</text:p>
            <text:p>Switch between Interior, Exterior, and Colors tabs</text:p>
            <text:p>Observe whether images on each tab load correctly without errors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Switching between Interior, Exterior, and Colors tabs should load images correctly each time.</text:p>
          </table:table-cell>
          <table:table-cell table:style-name="ce3" office:value-type="string" calcext:value-type="string">
            <text:p>Images load instantly on all tabs with no broken icon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returning to Exterior tab does not show broken image.</text:p>
          </table:table-cell>
          <table:table-cell table:style-name="ce3" office:value-type="string" calcext:value-type="string">
            <text:p>Switch to another tab in the gallery (e.g., Interior or Colors)</text:p>
            <text:p>Return to the Exterior tab</text:p>
            <text:p>Verify the images on the Exterior tab display correctly without broken images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Returning to the Exterior tab should show all images correctly.</text:p>
          </table:table-cell>
          <table:table-cell table:style-name="ce3" office:value-type="string" calcext:value-type="string">
            <text:p>Images display properly; no placeholders appea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navigating to next/previous images does not show broken image.</text:p>
          </table:table-cell>
          <table:table-cell table:style-name="ce3" office:value-type="string" calcext:value-type="string">
            <text:p>Open the gallery popup on the first image</text:p>
            <text:p>Use next/previous navigation arrows</text:p>
            <text:p>Verify each image loads correctly without any broken icons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Clicking next or previous arrows should load images correctly.</text:p>
          </table:table-cell>
          <table:table-cell table:style-name="ce3" office:value-type="string" calcext:value-type="string">
            <text:p>Images appear immediately; navigation works smooth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lazy loading does not delay or break first image render.</text:p>
          </table:table-cell>
          <table:table-cell table:style-name="ce3" office:value-type="string" calcext:value-type="string">
            <text:p>Open the gallery popup</text:p>
            <text:p>Observe the first image load while lazy loading is enabled</text:p>
            <text:p>Confirm it loads immediately and correctly without blank placeholder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The first image should load correctly even if lazy loading is enabled.</text:p>
          </table:table-cell>
          <table:table-cell table:style-name="ce3" office:value-type="string" calcext:value-type="string">
            <text:p>Image loads without blank placeholder; lazy loading does not delay i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high-resolution image loads in popup instead of thumbnail version.</text:p>
          </table:table-cell>
          <table:table-cell table:style-name="ce3" office:value-type="string" calcext:value-type="string">
            <text:p>Open the gallery popup</text:p>
            <text:p>Click on the first image</text:p>
            <text:p>Inspect the loaded image (via dev tools or visually)</text:p>
            <text:p>Confirm high-resolution image loads instead of a low-res thumbnail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The gallery should load a high-resolution image, not a thumbnail.</text:p>
          </table:table-cell>
          <table:table-cell table:style-name="ce3" office:value-type="string" calcext:value-type="string">
            <text:p>High-resolution image is displayed correctly when click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no console errors related to image loading on first click.</text:p>
          </table:table-cell>
          <table:table-cell table:style-name="ce3" office:value-type="string" calcext:value-type="string">
            <text:p>Open browser developer tools (Console tab)</text:p>
            <text:p>Open the gallery popup</text:p>
            <text:p>Observe the console for any errors or warnings related to image loading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Opening the gallery should not produce any console errors or warnings.</text:p>
          </table:table-cell>
          <table:table-cell table:style-name="ce3" office:value-type="string" calcext:value-type="string">
            <text:p>No console errors; gallery opens smooth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TF Gallery Popup</text:p>
          </table:table-cell>
          <table:table-cell table:style-name="ce3" office:value-type="string" calcext:value-type="string">
            <text:p>Verify issue does not reproduce on second click of the same image.</text:p>
          </table:table-cell>
          <table:table-cell table:style-name="ce3" office:value-type="string" calcext:value-type="string">
            <text:p>Close the gallery popup</text:p>
            <text:p>Reopen the popup by clicking the same Exterior image</text:p>
            <text:p>Verify the first image loads correctly without any issues</text:p>
            <text:p>Confirm the behavior is consistent with the first click</text:p>
          </table:table-cell>
          <table:table-cell table:style-name="ce3" office:value-type="string" calcext:value-type="string">
            <text:p>Atf should be there</text:p>
          </table:table-cell>
          <table:table-cell table:style-name="ce3" office:value-type="string" calcext:value-type="string">
            <text:p>Closing and reopening the same image should work correctly.</text:p>
          </table:table-cell>
          <table:table-cell table:style-name="ce3" office:value-type="string" calcext:value-type="string">
            <text:p>Image loads properly again, identical to first click behavior.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92" table:style-name="ta22">
        <table:table-column table:style-name="co8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8" table:default-cell-style-name="Default"/>
        <table:table-column table:style-name="co93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H1 description is displayed below the heading “Nissan Patrol Price in KSA”.</text:p>
          </table:table-cell>
          <table:table-cell table:style-name="ce3" office:value-type="string" calcext:value-type="string">
            <text:p>Open browser.</text:p>
            <text:p>Navigate to KSA overview page.</text:p>
            <text:p>Locate heading Nissan Patrol Price in KSA</text:p>
            <text:p>Observe content below the heading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Description is shown below the heading.</text:p>
          </table:table-cell>
          <table:table-cell table:style-name="ce3" office:value-type="string" calcext:value-type="string">
            <text:p>Description is correctly displayed below the heading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escription content matches the provided text exactly.</text:p>
          </table:table-cell>
          <table:table-cell table:style-name="ce3" office:value-type="string" calcext:value-type="string">
            <text:p>Open overview page (KSA/UAE).</text:p>
            <text:p>Copy displayed description text.</text:p>
            <text:p>Compare with provided expected content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Description text matches exactly.</text:p>
          </table:table-cell>
          <table:table-cell table:style-name="ce3" office:value-type="string" calcext:value-type="string">
            <text:p>Text matches the expected content exactly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escription appears for both UAE and KSA sites.</text:p>
          </table:table-cell>
          <table:table-cell table:style-name="ce3" office:value-type="string" calcext:value-type="string">
            <text:p>Open KSA overview page.</text:p>
            <text:p>Open UAE overview page.</text:p>
            <text:p>Locate description under heading on both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Description appears on both UAE and KSA pages.</text:p>
          </table:table-cell>
          <table:table-cell table:style-name="ce3" office:value-type="string" calcext:value-type="string">
            <text:p>Description is visible on both sites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only first 3 lines are visible by default.</text:p>
          </table:table-cell>
          <table:table-cell table:style-name="ce3" office:value-type="string" calcext:value-type="string">
            <text:p>Open overview page.</text:p>
            <text:p>Locate description section.</text:p>
            <text:p>Observe visible lines without interaction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Only 3 lines are visible by default.</text:p>
          </table:table-cell>
          <table:table-cell table:style-name="ce3" office:value-type="string" calcext:value-type="string">
            <text:p>Only first 3 lines are shown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“Read More” option is displayed after truncated text.</text:p>
          </table:table-cell>
          <table:table-cell table:style-name="ce3" office:value-type="string" calcext:value-type="string">
            <text:p>Open overview page.</text:p>
            <text:p>Locate truncated description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Read More is visible.</text:p>
          </table:table-cell>
          <table:table-cell table:style-name="ce3" office:value-type="string" calcext:value-type="string">
            <text:p>Read More is displayed after text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clicking “Read More” expands the full description.</text:p>
          </table:table-cell>
          <table:table-cell table:style-name="ce3" office:value-type="string" calcext:value-type="string">
            <text:p>Open overview page.</text:p>
            <text:p>Click on Read More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Clicking “Read More” shows full text</text:p>
          </table:table-cell>
          <table:table-cell table:style-name="ce3" office:value-type="string" calcext:value-type="string">
            <text:p>Full description expands correctly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“Read Less” (if implemented) collapses the text back to 3 lines.</text:p>
          </table:table-cell>
          <table:table-cell table:style-name="ce3" office:value-type="string" calcext:value-type="string">
            <text:p>Click Read More.</text:p>
            <text:p>Click Read Less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Read Less” collapses text.</text:p>
          </table:table-cell>
          <table:table-cell table:style-name="ce3" office:value-type="string" calcext:value-type="string">
            <text:p>Text collapses back to 3 lines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no layout shift occurs when expanding/collapsing text.</text:p>
          </table:table-cell>
          <table:table-cell table:style-name="ce3" office:value-type="string" calcext:value-type="string">
            <text:p>Open overview page.</text:p>
            <text:p>Click Read More and Read Less.</text:p>
            <text:p>Observe surrounding UI elements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No layout shift on expand/collapse.</text:p>
          </table:table-cell>
          <table:table-cell table:style-name="ce3" office:value-type="string" calcext:value-type="string">
            <text:p>No UI shift observed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responsiveness across mobile, tablet, and desktop.</text:p>
          </table:table-cell>
          <table:table-cell table:style-name="ce3" office:value-type="string" calcext:value-type="string">
            <text:p>Open DevTools.</text:p>
            <text:p>Switch to mobile, tablet, desktop views.</text:p>
            <text:p>Check description, widget, disclaimer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Works properly on all devices.</text:p>
          </table:table-cell>
          <table:table-cell table:style-name="ce3" office:value-type="string" calcext:value-type="string">
            <text:p>Works correctly on mobile, tablet, and desktop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RTL rendering works correctly for Arabic pages.</text:p>
          </table:table-cell>
          <table:table-cell table:style-name="ce3" office:value-type="string" calcext:value-type="string">
            <text:p>Switch site language to Arabic.</text:p>
            <text:p>Reload page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RTL layout works correctly.</text:p>
          </table:table-cell>
          <table:table-cell table:style-name="ce3" office:value-type="string" calcext:value-type="string">
            <text:p>Arabic layout displays properly in RTL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ATF Image Alt Text Update</text:p>
          </table:table-cell>
          <table:table-cell table:style-name="ce3" office:value-type="string" calcext:value-type="string">
            <text:p>Open the browser.</text:p>
            <text:p>Go to the Nissan Patrol overview Page.</text:p>
            <text:p>Locate the above-the-fold (ATF) main image at the top of the page.</text:p>
            <text:p>Right-click on the image and click Inspect.</text:p>
            <text:p>Check the alt attribute of the image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above-the-fold (ATF) image should have alt text.</text:p>
          </table:table-cell>
          <table:table-cell table:style-name="ce3" office:value-type="string" calcext:value-type="string">
            <text:p>The ATF image has alt text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Above-the-Fold image alt text includes the country name for KSA pages.</text:p>
          </table:table-cell>
          <table:table-cell table:style-name="ce3" office:value-type="string" calcext:value-type="string">
            <text:p>Open KSA overview page.</text:p>
            <text:p>Inspect ATF image.</text:p>
            <text:p>Check alt attribute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Alt text includes KSA.</text:p>
          </table:table-cell>
          <table:table-cell table:style-name="ce3" office:value-type="string" calcext:value-type="string">
            <text:p>Alt text includes KS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Above-the-Fold image alt text includes the country name for UAE pages.</text:p>
          </table:table-cell>
          <table:table-cell table:style-name="ce3" office:value-type="string" calcext:value-type="string">
            <text:p>Open UAE overview page.</text:p>
            <text:p>Inspect ATF image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Alt text includes UAE.</text:p>
          </table:table-cell>
          <table:table-cell table:style-name="ce3" office:value-type="string" calcext:value-type="string">
            <text:p>Alt text includes “UAE”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alt text format follows the required pattern (e.g., “Patrol Front Angle Low View in Saudi Arabia”).</text:p>
          </table:table-cell>
          <table:table-cell table:style-name="ce3" office:value-type="string" calcext:value-type="string">
            <text:p>Inspect ATF image alt text.</text:p>
          </table:table-cell>
          <table:table-cell table:style-name="ce3" office:value-type="string" calcext:value-type="string">
            <text:p>H1 should be ther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alt text dynamically changes based on country site.</text:p>
          </table:table-cell>
          <table:table-cell table:style-name="ce3" office:value-type="string" calcext:value-type="string">
            <text:p>Open KSA page - note alt text.</text:p>
            <text:p>Open UAE page - note alt text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Alt text changes based on country.</text:p>
          </table:table-cell>
          <table:table-cell table:style-name="ce3" office:value-type="string" calcext:value-type="string">
            <text:p>Alt text updates correctly for country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ealer widget heading “Nissan Car Showrooms in Popular Cities” is visible.</text:p>
          </table:table-cell>
          <table:table-cell table:style-name="ce3" office:value-type="string" calcext:value-type="string">
            <text:p>Click on “Nissan Showrooms in Riyadh”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Verify dealer widget heading “Nissan Car Showrooms in Popular Cities” is visible.</text:p>
          </table:table-cell>
          <table:table-cell table:style-name="ce3" office:value-type="string" calcext:value-type="string">
            <text:p>The heading “Nissan Car Showrooms in Popular Cities” is displayed correctly and is visible on the page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text “1 Nissan car showroom in Abu Dhabi” is replaced with “32 Nissan Showrooms in Riyadh”.</text:p>
          </table:table-cell>
          <table:table-cell table:style-name="ce3" office:value-type="string" calcext:value-type="string">
            <text:p>Open the browser.</text:p>
            <text:p>Go to the Nissan Patrol overview Page (KSA site).</text:p>
            <text:p>Scroll down to the dealer section.</text:p>
            <text:p>Check the showroom text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text should display: “32 Nissan Showrooms in Riyadh”</text:p>
            <text:p>The old text “1 Nissan car showroom in Abu Dhabi” should not be visible.</text:p>
          </table:table-cell>
          <table:table-cell table:style-name="ce3" office:value-type="string" calcext:value-type="string">
            <text:p>The text “32 Nissan Showrooms in Riyadh” is displayed.</text:p>
            <text:p>The old text is not visible anywhere on the page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the entire text “Nissan Showrooms in Riyadh” is clickable as anchor text.</text:p>
          </table:table-cell>
          <table:table-cell table:style-name="ce3" office:value-type="string" calcext:value-type="string">
            <text:p>Open the browser.</text:p>
            <text:p>Go to the Nissan Patrol overview Page (KSA site).</text:p>
            <text:p>Scroll down to the dealer section.</text:p>
            <text:p>Find the text Nissan Showrooms in Riyadh.</text:p>
            <text:p>Click on the text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full text “Nissan Showrooms in Riyadh” should be clickable.</text:p>
          </table:table-cell>
          <table:table-cell table:style-name="ce3" office:value-type="string" calcext:value-type="string">
            <text:p>The entire text is clickab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anchor link redirects to the correct dealer listing page.</text:p>
          </table:table-cell>
          <table:table-cell table:style-name="ce3" office:value-type="string" calcext:value-type="string">
            <text:p>open the browser.</text:p>
            <text:p>Go to the Nissan Patrol overview Page (KSA site).</text:p>
            <text:p>Scroll to the dealer section.</text:p>
            <text:p>Click on “Nissan Showrooms in Riyadh”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Clicking on “Nissan Showrooms in Riyadh” should redirect to the dealer listing page for Riyadh.</text:p>
          </table:table-cell>
          <table:table-cell table:style-name="ce3" office:value-type="string" calcext:value-type="string">
            <text:p>Clicking the link redirects to the correct Riyadh dealer listing page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behavior across UAE and KSA where applicable. Disclaimer After Variant List</text:p>
          </table:table-cell>
          <table:table-cell table:style-name="ce3" office:value-type="string" calcext:value-type="string">
            <text:p>Open the browser.</text:p>
            <text:p>Go to the Nissan Patrol overview on the KSA site.</text:p>
            <text:p>Check dealer section details (text, link, count).</text:p>
            <text:p>Open the Nissan Patrol overview page on the UAE site.</text:p>
            <text:p>Check the same dealer section details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Content should change based on country (UAE vs KSA).</text:p>
            <text:p>Correct city names, showroom count, and links should be shown for each country.</text:p>
          </table:table-cell>
          <table:table-cell table:style-name="ce3" office:value-type="string" calcext:value-type="string">
            <text:p>Content updates correctly for UAE and KSA.</text:p>
            <text:p>City names, showroom count, and links are accurate for each country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isclaimer text appears immediately after the variant list section.</text:p>
          </table:table-cell>
          <table:table-cell table:style-name="ce3" office:value-type="string" calcext:value-type="string">
            <text:p>Open the browser.</text:p>
            <text:p>Go to the Nissan Patrol overview Page.</text:p>
            <text:p>Scroll down to the variant list section.</text:p>
            <text:p>Check the content immediately below the variant list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disclaimer text should appear immediately after the variant list section.</text:p>
          </table:table-cell>
          <table:table-cell table:style-name="ce3" office:value-type="string" calcext:value-type="string">
            <text:p>The disclaimer text is displayed right below the variant list section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isclaimer content matches exactly: “Final on-road price may vary slightly based on insurance, registration, and optional accessories.”</text:p>
          </table:table-cell>
          <table:table-cell table:style-name="ce3" office:value-type="string" calcext:value-type="string">
            <text:p>Open the browser.</text:p>
            <text:p>Go to the Nissan Patrol overview Page.</text:p>
            <text:p>Scroll down to the disclaimer section (below the variant list).</text:p>
            <text:p>Read the disclaimer text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disclaimer text should exactly match:</text:p>
          </table:table-cell>
          <table:table-cell table:style-name="ce3" office:value-type="string" calcext:value-type="string">
            <text:p>The disclaimer text matches exactly with the expected content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isclaimer is visible on both UAE and KSA sites.</text:p>
          </table:table-cell>
          <table:table-cell table:style-name="ce3" office:value-type="string" calcext:value-type="string">
            <text:p>Open the browser.</text:p>
            <text:p>Go to the Nissan overview Page on the KSA site.</text:p>
            <text:p>Scroll down and locate the disclaimer section.</text:p>
            <text:p>Open the Nissan Patrol overview Page on the UAE site.</text:p>
            <text:p>Scroll down and locate the disclaimer section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disclaimer should be visible on both UAE and KSA websites.</text:p>
          </table:table-cell>
          <table:table-cell table:style-name="ce3" office:value-type="string" calcext:value-type="string">
            <text:p>The disclaimer is visible on both UAE and KSA sites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isclaimer does not overlap with other elements.</text:p>
          </table:table-cell>
          <table:table-cell table:style-name="ce3" office:value-type="string" calcext:value-type="string">
            <text:p>Open the browser.</text:p>
            <text:p>Go to the Nissan Patrol overview Page.</text:p>
            <text:p>Scroll down to the disclaimer section.</text:p>
            <text:p>Observe the spacing around the disclaimer (above and below)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disclaimer should be properly aligned and spaced.</text:p>
            <text:p>It should not overlap with any other content on the page.</text:p>
          </table:table-cell>
          <table:table-cell table:style-name="ce3" office:value-type="string" calcext:value-type="string">
            <text:p>The disclaimer is displayed correctly.</text:p>
            <text:p>No overlapping with other elements is observed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disclaimer displays correctly across mobile, tablet, and desktop.</text:p>
          </table:table-cell>
          <table:table-cell table:style-name="ce3" office:value-type="string" calcext:value-type="string">
            <text:p>Open the browser.</text:p>
            <text:p>Go to the Nissan Patrol overview Page.</text:p>
            <text:p>Scroll to the disclaimer section.</text:p>
            <text:p>Open Developer Tools and switch to:</text:p>
            <text:p>Mobile view</text:p>
            <text:p>Tablet view</text:p>
            <text:p>Desktop view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disclaimer should display properly on mobile, tablet, and desktop.</text:p>
          </table:table-cell>
          <table:table-cell table:style-name="ce3" office:value-type="string" calcext:value-type="string">
            <text:p>The disclaimer displays correctly on mobile, tablet, and desktop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Vehicle Detail Page</text:p>
          </table:table-cell>
          <table:table-cell table:style-name="ce9" office:value-type="string" calcext:value-type="string">
            <text:p>Verify RTL layout works correctly for Arabic pages.</text:p>
          </table:table-cell>
          <table:table-cell table:style-name="ce3" office:value-type="string" calcext:value-type="string">
            <text:p>Switch to Arabic.</text:p>
            <text:p>Locate disclaimer.</text:p>
          </table:table-cell>
          <table:table-cell table:style-name="ce3" office:value-type="string" calcext:value-type="string">
            <text:p>H1 should be there</text:p>
          </table:table-cell>
          <table:table-cell table:style-name="ce3" office:value-type="string" calcext:value-type="string">
            <text:p>The page should display in Right-to-Left (RTL) layout when Arabic is selected.</text:p>
          </table:table-cell>
          <table:table-cell table:style-name="ce3" office:value-type="string" calcext:value-type="string">
            <text:p>The page displays correctly in RTL layout for Arabic.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16" table:style-name="ta23">
        <table:table-column table:style-name="co8" table:number-columns-repeated="2" table:default-cell-style-name="Default"/>
        <table:table-column table:style-name="co94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5" table:default-cell-style-name="Default"/>
        <table:table-column table:style-name="co36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ATF gallery popup opens with a high-resolution image instead of the 500×300 image.</text:p>
          </table:table-cell>
          <table:table-cell table:style-name="ce3" office:value-type="string" calcext:value-type="string">
            <text:p>Open Model Overview page</text:p>
            <text:p>Click on any image (ATF gallery)</text:p>
            <text:p>Observe popup image quality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Popup shows high-resolution image (not 500×300).</text:p>
          </table:table-cell>
          <table:table-cell table:style-name="ce3" office:value-type="string" calcext:value-type="string">
            <text:p>High-quality image loads correctly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the image in the popup does not appear pixelated when zoomed.</text:p>
          </table:table-cell>
          <table:table-cell table:style-name="ce3" office:value-type="string" calcext:value-type="string">
            <text:p>Open image popup</text:p>
            <text:p>Use zoom option (or pinch zoom)</text:p>
            <text:p>Check if image becomes blurry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Image remains clear when zoomed.</text:p>
          </table:table-cell>
          <table:table-cell table:style-name="ce3" office:value-type="string" calcext:value-type="string">
            <text:p>No pixelation observed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image clarity is maintained at all zoom levels supported by the popup.</text:p>
          </table:table-cell>
          <table:table-cell table:style-name="ce3" office:value-type="string" calcext:value-type="string">
            <text:p>Zoom in and out multiple times</text:p>
            <text:p>Observe image sharpnes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Image stays sharp at all zoom levels.</text:p>
          </table:table-cell>
          <table:table-cell table:style-name="ce3" office:value-type="string" calcext:value-type="string">
            <text:p>Clarity maintained during zoom in/out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high-resolution images are loaded only when the gallery popup is opened.</text:p>
          </table:table-cell>
          <table:table-cell table:style-name="ce3" office:value-type="string" calcext:value-type="string">
            <text:p>Open DevTools → Network tab</text:p>
            <text:p>Reload page</text:p>
            <text:p>Do NOT open popup → check images</text:p>
            <text:p>Now open popup → check new image load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High-res image loads only after popup is opened.</text:p>
          </table:table-cell>
          <table:table-cell table:style-name="ce3" office:value-type="string" calcext:value-type="string">
            <text:p>Image loads on click, not before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images inside the popup are lazy loaded.</text:p>
          </table:table-cell>
          <table:table-cell table:style-name="ce3" office:value-type="string" calcext:value-type="string">
            <text:p>Open DevTools → Network tab</text:p>
            <text:p>Reload page</text:p>
            <text:p>Do NOT open popup → check images</text:p>
            <text:p>Now open popup → check new image load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Images load only when viewed in popup.</text:p>
          </table:table-cell>
          <table:table-cell table:style-name="ce3" office:value-type="string" calcext:value-type="string">
            <text:p>Lazy loading works correctly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no popup images are loaded during initial page load.</text:p>
          </table:table-cell>
          <table:table-cell table:style-name="ce3" office:value-type="string" calcext:value-type="string">
            <text:p>Open popup</text:p>
            <text:p>Navigate between images</text:p>
            <text:p>Check Network tab</text:p>
            <text:p>Confirm images load only when viewed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No high-res images loaded during page load.</text:p>
          </table:table-cell>
          <table:table-cell table:style-name="ce3" office:value-type="string" calcext:value-type="string">
            <text:p>Only thumbnails load initially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page initial load time is not increased after implementing larger popup images when compared with live.</text:p>
          </table:table-cell>
          <table:table-cell table:style-name="ce3" office:value-type="string" calcext:value-type="string">
            <text:p>Open page with Network tab</text:p>
            <text:p>Reload page</text:p>
            <text:p>Check if high-res popup images are loaded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Page load time remains same as before</text:p>
          </table:table-cell>
          <table:table-cell table:style-name="ce3" office:value-type="string" calcext:value-type="string">
            <text:p>No noticeable performance impact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only the currently visible popup image is loaded, not all gallery images at once.</text:p>
          </table:table-cell>
          <table:table-cell table:style-name="ce3" office:value-type="string" calcext:value-type="string">
            <text:p>Open Network tab</text:p>
            <text:p>Reload page</text:p>
            <text:p>Compare load time with previous/live version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Only current image loads, not all gallery images.</text:p>
          </table:table-cell>
          <table:table-cell table:style-name="ce3" office:value-type="string" calcext:value-type="string">
            <text:p>Images load one-by-one as user navigat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no layout shift occurs when high-resolution image loads in popup.</text:p>
          </table:table-cell>
          <table:table-cell table:style-name="ce3" office:value-type="string" calcext:value-type="string">
            <text:p>Open popup</text:p>
            <text:p>Check Network tab</text:p>
            <text:p>Navigate to next image</text:p>
            <text:p>Confirm only current image load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UI remains stable while image loads.</text:p>
          </table:table-cell>
          <table:table-cell table:style-name="ce3" office:value-type="string" calcext:value-type="string">
            <text:p>No layout jump observed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popup closes smoothly even while image is still loading.</text:p>
          </table:table-cell>
          <table:table-cell table:style-name="ce3" office:value-type="string" calcext:value-type="string">
            <text:p>Open popup</text:p>
            <text:p>Observe while image loads</text:p>
            <text:p>Check if UI jumps or shift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Popup closes without lag or issue.</text:p>
          </table:table-cell>
          <table:table-cell table:style-name="ce3" office:value-type="string" calcext:value-type="string">
            <text:p>Smooth close behavior observ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popup image loads correctly on slow network (3G throttling).</text:p>
          </table:table-cell>
          <table:table-cell table:style-name="ce3" office:value-type="string" calcext:value-type="string">
            <text:p>Open popup</text:p>
            <text:p>Close it quickly while image loads</text:p>
            <text:p>Observe behavior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Image loads (may be slower but works).</text:p>
          </table:table-cell>
          <table:table-cell table:style-name="ce3" office:value-type="string" calcext:value-type="string">
            <text:p>Image loads successfully under throttling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popup image loads correctly on fast network (Wi-Fi / broadband).</text:p>
          </table:table-cell>
          <table:table-cell table:style-name="ce3" office:value-type="string" calcext:value-type="string">
            <text:p>Open DevTools → Network → Throttling → 3G</text:p>
            <text:p>Open popup</text:p>
            <text:p>Check image loading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Image loads quickly without delay.</text:p>
          </table:table-cell>
          <table:table-cell table:style-name="ce3" office:value-type="string" calcext:value-type="string">
            <text:p>Fast loading observed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behavior is consistent across desktop browsers (Chrome, Firefox, Edge, Safari).</text:p>
          </table:table-cell>
          <table:table-cell table:style-name="ce3" office:value-type="string" calcext:value-type="string">
            <text:p>Switch to normal/Wi-Fi</text:p>
            <text:p>Open popup</text:p>
            <text:p>Verify image loads quickly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Works consistently across all browsers.</text:p>
          </table:table-cell>
          <table:table-cell table:style-name="ce3" office:value-type="string" calcext:value-type="string">
            <text:p>No issues across tested browsers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behavior is consistent on mobile browsers (Android Chrome, iOS Safari).</text:p>
          </table:table-cell>
          <table:table-cell table:style-name="ce3" office:value-type="string" calcext:value-type="string">
            <text:p>Open on mobile device</text:p>
            <text:p>Open popup</text:p>
            <text:p>Check image loading and UI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Works correctly on mobile devices.</text:p>
          </table:table-cell>
          <table:table-cell table:style-name="ce3" office:value-type="string" calcext:value-type="string">
            <text:p>Proper behavior on mobile browsers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popup zoom functionality works correctly with high-resolution images.</text:p>
          </table:table-cell>
          <table:table-cell table:style-name="ce3" office:value-type="string" calcext:value-type="string">
            <text:p>Open popup</text:p>
            <text:p>Zoom image</text:p>
            <text:p>Check smooth zoom and clarity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Zoom works smoothly with clear image.</text:p>
          </table:table-cell>
          <table:table-cell table:style-name="ce3" office:value-type="string" calcext:value-type="string">
            <text:p>Zoom works correctly without issues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no console errors occur during popup image load.</text:p>
          </table:table-cell>
          <table:table-cell table:style-name="ce3" office:value-type="string" calcext:value-type="string">
            <text:p>Open DevTools → Console</text:p>
            <text:p>Open popup</text:p>
            <text:p>Check for error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No errors in console during popup usage.</text:p>
          </table:table-cell>
          <table:table-cell table:style-name="ce3" office:value-type="string" calcext:value-type="string">
            <text:p>Console remains clean.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ATF gallery pop up</text:p>
          </table:table-cell>
          <table:table-cell table:style-name="ce3" office:value-type="string" calcext:value-type="string">
            <text:p>Verify popup image URLs are different from thumbnail image URLs.</text:p>
          </table:table-cell>
          <table:table-cell table:style-name="ce3" office:value-type="string" calcext:value-type="string">
            <text:p>Inspect thumbnail image</text:p>
            <text:p>Open popup → inspect image</text:p>
            <text:p>Compare URLs</text:p>
          </table:table-cell>
          <table:table-cell table:style-name="ce3" office:value-type="string" calcext:value-type="string">
            <text:p>High-res popup images</text:p>
          </table:table-cell>
          <table:table-cell table:style-name="ce3" office:value-type="string" calcext:value-type="string">
            <text:p>Popup image URL is different from thumbnail.</text:p>
          </table:table-cell>
          <table:table-cell table:style-name="ce3" office:value-type="string" calcext:value-type="string">
            <text:p>Separate high-res image URL observed.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63" table:style-name="ta24">
        <table:table-column table:style-name="co8" table:number-columns-repeated="2" table:default-cell-style-name="Default"/>
        <table:table-column table:style-name="co87" table:default-cell-style-name="Default"/>
        <table:table-column table:style-name="co96" table:default-cell-style-name="Default"/>
        <table:table-column table:style-name="co8" table:default-cell-style-name="Default"/>
        <table:table-column table:style-name="co97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ilters Widget UI &amp; Layout Validation (WAP/Mobile)</text:p>
          </table:table-cell>
          <table:table-cell table:style-name="ce3" office:value-type="string" calcext:value-type="string">
            <text:p>Verified by checking if the UI of the Filters using wap is visible correctly.</text:p>
          </table:table-cell>
          <table:table-cell table:style-name="ce3" office:value-type="string" calcext:value-type="string">
            <text:p>Open the website on mobile (WAP) or emulator.</text:p>
            <text:p>Navigate to the page where Filters widget is present.</text:p>
            <text:p>Observe the Filters section.</text:p>
          </table:table-cell>
          <table:table-cell table:style-name="ce3" office:value-type="string" calcext:value-type="string">
            <text:p>filter is required </text:p>
          </table:table-cell>
          <table:table-cell table:style-name="ce3" office:value-type="string" calcext:value-type="string">
            <text:p>Filters UI is clearly visible, all options properly aligned, no overlap or broken layout.</text:p>
          </table:table-cell>
          <table:table-cell table:style-name="ce3" office:value-type="string" calcext:value-type="string">
            <text:p>Filters are displayed correctly with proper alignment and no UI issue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ilters Widget UI &amp; Layout Validation (WAP/Mobile)</text:p>
          </table:table-cell>
          <table:table-cell table:style-name="ce3" office:value-type="string" calcext:value-type="string">
            <text:p>Verified by checking if the UI of the Filters using wap is visible correctly after using filters functionality.</text:p>
          </table:table-cell>
          <table:table-cell table:style-name="ce3" office:value-type="string" calcext:value-type="string">
            <text:p>Open Filters on mobile.</text:p>
            <text:p>Apply any filter (e.g., brand, price, etc.).</text:p>
            <text:p>Apply/close filter.</text:p>
            <text:p>Observe UI again.</text:p>
          </table:table-cell>
          <table:table-cell table:style-name="ce3" office:value-type="string" calcext:value-type="string">
            <text:p>filter is required </text:p>
          </table:table-cell>
          <table:table-cell table:style-name="ce3" office:value-type="string" calcext:value-type="string">
            <text:p>After applying filters, UI remains stable with no distortion or misalignment.</text:p>
          </table:table-cell>
          <table:table-cell table:style-name="ce3" office:value-type="string" calcext:value-type="string">
            <text:p>Filters apply successfully and UI remains intact without any break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ilters Widget UI &amp; Layout Validation (WAP/Mobile)</text:p>
          </table:table-cell>
          <table:table-cell table:style-name="ce3" office:value-type="string" calcext:value-type="string">
            <text:p>Verified by checking if the space between boxes of the widget is reduced.</text:p>
          </table:table-cell>
          <table:table-cell table:style-name="ce3" office:value-type="string" calcext:value-type="string">
            <text:p>Open Filters widget.</text:p>
            <text:p>Look at spacing between filter boxes/cards.</text:p>
            <text:p>Compare with expected design.</text:p>
          </table:table-cell>
          <table:table-cell table:style-name="ce3" office:value-type="string" calcext:value-type="string">
            <text:p>filter is required </text:p>
          </table:table-cell>
          <table:table-cell table:style-name="ce3" office:value-type="string" calcext:value-type="string">
            <text:p>Spacing between filter boxes is reduced as per design and looks consistent.</text:p>
          </table:table-cell>
          <table:table-cell table:style-name="ce3" office:value-type="string" calcext:value-type="string">
            <text:p>Spacing appears properly reduced with no extra gap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ilters Widget UI &amp; Layout Validation (WAP/Mobile)</text:p>
          </table:table-cell>
          <table:table-cell table:style-name="ce3" office:value-type="string" calcext:value-type="string">
            <text:p>Verified by checking if the position of the arrow inside the widget is correctly placed.</text:p>
          </table:table-cell>
          <table:table-cell table:style-name="ce3" office:value-type="string" calcext:value-type="string">
            <text:p>Open Filters widget.</text:p>
            <text:p>Locate arrow icon (dropdown/expand icon).</text:p>
            <text:p>Observe its position.</text:p>
          </table:table-cell>
          <table:table-cell table:style-name="ce3" office:value-type="string" calcext:value-type="string">
            <text:p>filter is required </text:p>
          </table:table-cell>
          <table:table-cell table:style-name="ce3" office:value-type="string" calcext:value-type="string">
            <text:p>Arrow icon is correctly aligned inside the widget and not overlapping.</text:p>
          </table:table-cell>
          <table:table-cell table:style-name="ce3" office:value-type="string" calcext:value-type="string">
            <text:p>Arrow is properly positioned and visually aligned.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62" table:style-name="ta25">
        <table:table-column table:style-name="co8" table:number-columns-repeated="2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Offers widget on offers page is visible properly to the user on web UI.</text:p>
          </table:table-cell>
          <table:table-cell table:style-name="ce3" office:value-type="string" calcext:value-type="string">
            <text:p>Open website on desktop (web).</text:p>
            <text:p>Navigate to Offers page.</text:p>
            <text:p>Scroll and locate Offers widget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Widget is visible properly with correct layout.</text:p>
          </table:table-cell>
          <table:table-cell table:style-name="ce3" office:value-type="string" calcext:value-type="string">
            <text:p>Widget is displayed correctly on web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Offers widget on offers page is visible properly to the user on wap UI.</text:p>
          </table:table-cell>
          <table:table-cell table:style-name="ce3" office:value-type="string" calcext:value-type="string">
            <text:p>Open website on mobile (WAP).</text:p>
            <text:p>Go to Offers page.</text:p>
            <text:p>Scroll to Offers widget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Widget is visible properly on mobile without UI issues.</text:p>
          </table:table-cell>
          <table:table-cell table:style-name="ce3" office:value-type="string" calcext:value-type="string">
            <text:p>Widget appears correctly on WA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Offers widget on offers model page is visible properly to the user on web UI.</text:p>
          </table:table-cell>
          <table:table-cell table:style-name="ce3" office:value-type="string" calcext:value-type="string">
            <text:p>Open Offers Model page on desktop.</text:p>
            <text:p>Scroll to Offers widget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Widget is visible and properly aligned.</text:p>
          </table:table-cell>
          <table:table-cell table:style-name="ce3" office:value-type="string" calcext:value-type="string">
            <text:p>Widget is displayed correctly on web model pag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Offers widget on offers model page is visible properly to the user on wap UI.</text:p>
          </table:table-cell>
          <table:table-cell table:style-name="ce3" office:value-type="string" calcext:value-type="string">
            <text:p>Open same page on mobile.</text:p>
            <text:p>Scroll and locate widget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Widget is visible and responsive on mobile.</text:p>
          </table:table-cell>
          <table:table-cell table:style-name="ce3" office:value-type="string" calcext:value-type="string">
            <text:p>Widget appears correctly on mobi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Offers widget on offers model page is visible properly to the user after changing the offer on web UI.</text:p>
          </table:table-cell>
          <table:table-cell table:style-name="ce3" office:value-type="string" calcext:value-type="string">
            <text:p>Open Offers Model page on desktop.</text:p>
            <text:p>Change/select a different offer (if option available).</text:p>
            <text:p>Observe widget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Widget updates correctly and UI remains stable.</text:p>
          </table:table-cell>
          <table:table-cell table:style-name="ce3" office:value-type="string" calcext:value-type="string">
            <text:p>Offer changes reflect properly without UI break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Offers widget on offers model page is visible properly to the user after changing the offer on wap UI.</text:p>
          </table:table-cell>
          <table:table-cell table:style-name="ce3" office:value-type="string" calcext:value-type="string">
            <text:p>Open page on mobile.</text:p>
            <text:p>Change offer.</text:p>
            <text:p>Observe widget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Widget updates correctly on mobile without issues.</text:p>
          </table:table-cell>
          <table:table-cell table:style-name="ce3" office:value-type="string" calcext:value-type="string">
            <text:p>Works properly after changing offe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user bullet points on offers widget is visible correctly on the web.</text:p>
          </table:table-cell>
          <table:table-cell table:style-name="ce3" office:value-type="string" calcext:value-type="string">
            <text:p>Open Offers widget on desktop.</text:p>
            <text:p>Look at bullet points (offer details)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Bullet points are clear, aligned, and readable</text:p>
          </table:table-cell>
          <table:table-cell table:style-name="ce3" office:value-type="string" calcext:value-type="string">
            <text:p>Bullet points display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user bullet points on offers widget is visible correctly on the wap.</text:p>
          </table:table-cell>
          <table:table-cell table:style-name="ce3" office:value-type="string" calcext:value-type="string">
            <text:p>Open Offers widget on mobile.</text:p>
            <text:p>Check bullet points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Bullet points are readable and properly spaced on mobile.</text:p>
          </table:table-cell>
          <table:table-cell table:style-name="ce3" office:value-type="string" calcext:value-type="string">
            <text:p>Bullet points appear correctly on WA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correct currency symbol is used in offers widget is visible correctly on the web.</text:p>
          </table:table-cell>
          <table:table-cell table:style-name="ce3" office:value-type="string" calcext:value-type="string">
            <text:p>Open Offers widget on desktop.</text:p>
            <text:p>Look at price/offer value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Correct currency symbol is displayed as per region.</text:p>
          </table:table-cell>
          <table:table-cell table:style-name="ce3" office:value-type="string" calcext:value-type="string">
            <text:p>Currency symbol is correct on web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ffers Widget UI &amp; Content Validation</text:p>
          </table:table-cell>
          <table:table-cell table:style-name="ce9" office:value-type="string" calcext:value-type="string">
            <text:p>Verified by checking if the correct currency symbol is used in offers widget is visible correctly on the wap.</text:p>
          </table:table-cell>
          <table:table-cell table:style-name="ce3" office:value-type="string" calcext:value-type="string">
            <text:p>Open Offers widget on mobile.</text:p>
            <text:p>Check currency symbol.</text:p>
          </table:table-cell>
          <table:table-cell table:style-name="ce3" office:value-type="string" calcext:value-type="string">
            <text:p>offer page should be there </text:p>
          </table:table-cell>
          <table:table-cell table:style-name="ce3" office:value-type="string" calcext:value-type="string">
            <text:p>Correct currency symbol is shown on mobile.</text:p>
          </table:table-cell>
          <table:table-cell table:style-name="ce3" office:value-type="string" calcext:value-type="string">
            <text:p>Currency symbol is correct on WAP.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60" table:style-name="ta26">
        <table:table-column table:style-name="co8" table:number-columns-repeated="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if the brand name has been removed from all the widgets that uses brand name using web.</text:p>
          </table:table-cell>
          <table:table-cell table:style-name="ce3" office:value-type="string" calcext:value-type="string">
            <text:p>Open website on desktop (web).</text:p>
            <text:p>Go to a page with widgets (e.g., model/brand page).</text:p>
            <text:p>Check all widgets that previously had brand name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Brand name should not appear in any widget text on web.</text:p>
          </table:table-cell>
          <table:table-cell table:style-name="ce3" office:value-type="string" calcext:value-type="string">
            <text:p>Brand name is removed from all widgets on web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if the brand name has been removed from all the widgets that uses brand name using wap.</text:p>
          </table:table-cell>
          <table:table-cell table:style-name="ce3" office:value-type="string" calcext:value-type="string">
            <text:p>Open website on mobile (WAP).</text:p>
            <text:p>Navigate to same pages.</text:p>
            <text:p>Check widgets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Brand name should not appear in widgets on mobile.</text:p>
          </table:table-cell>
          <table:table-cell table:style-name="ce3" office:value-type="string" calcext:value-type="string">
            <text:p>Brand name is not visible on WA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different brand pages using web.</text:p>
          </table:table-cell>
          <table:table-cell table:style-name="ce3" office:value-type="string" calcext:value-type="string">
            <text:p>Open multiple brand pages (e.g., Toyota, Honda, etc.).</text:p>
            <text:p>Check widgets on each page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Brand name removal should be consistent across all brand pages.</text:p>
          </table:table-cell>
          <table:table-cell table:style-name="ce3" office:value-type="string" calcext:value-type="string">
            <text:p>All tested brand pages show correct behavior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different brand pages using wap.</text:p>
          </table:table-cell>
          <table:table-cell table:style-name="ce3" office:value-type="string" calcext:value-type="string">
            <text:p>Open different brand pages on mobile.</text:p>
            <text:p>Check widgets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Same consistency should be maintained on mobile.</text:p>
          </table:table-cell>
          <table:table-cell table:style-name="ce3" office:value-type="string" calcext:value-type="string">
            <text:p>Works correctly across all pages on WA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if the widget text stays intact using web.</text:p>
          </table:table-cell>
          <table:table-cell table:style-name="ce3" office:value-type="string" calcext:value-type="string">
            <text:p>Open widget on desktop.</text:p>
            <text:p>Read text after brand removal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Text should remain meaningful and properly formatted after removal.</text:p>
          </table:table-cell>
          <table:table-cell table:style-name="ce3" office:value-type="string" calcext:value-type="string">
            <text:p>Text is correct and reada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if the widget text stays intact using wap.</text:p>
          </table:table-cell>
          <table:table-cell table:style-name="ce3" office:value-type="string" calcext:value-type="string">
            <text:p>Open widget on mobile.</text:p>
            <text:p>Check text content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Text should remain clear and not broken on mobile.</text:p>
          </table:table-cell>
          <table:table-cell table:style-name="ce3" office:value-type="string" calcext:value-type="string">
            <text:p>Text displays properly on WA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if the widget is working normally using web.</text:p>
          </table:table-cell>
          <table:table-cell table:style-name="ce3" office:value-type="string" calcext:value-type="string">
            <text:p>Interact with widget (click, scroll, etc.).</text:p>
            <text:p>Observe behavior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Widget functionality should not be affected.</text:p>
          </table:table-cell>
          <table:table-cell table:style-name="ce3" office:value-type="string" calcext:value-type="string">
            <text:p>Widget works without any issu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 Name Removal &amp; Widget Functionality Validation (Web &amp; WAP)</text:p>
          </table:table-cell>
          <table:table-cell table:style-name="ce3" office:value-type="string" calcext:value-type="string">
            <text:p>Verified by checking if the widget is working normally using wap.</text:p>
          </table:table-cell>
          <table:table-cell table:style-name="ce3" office:value-type="string" calcext:value-type="string">
            <text:p>Use widget on mobile.</text:p>
            <text:p>Interact with it.</text:p>
          </table:table-cell>
          <table:table-cell table:style-name="ce3" office:value-type="string" calcext:value-type="string">
            <text:p>Multiple brands testing</text:p>
          </table:table-cell>
          <table:table-cell table:style-name="ce3" office:value-type="string" calcext:value-type="string">
            <text:p>Widget should function normally on mobile.</text:p>
          </table:table-cell>
          <table:table-cell table:style-name="ce3" office:value-type="string" calcext:value-type="string">
            <text:p>No functional issues on WAP.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30" table:style-name="ta27">
        <table:table-column table:style-name="co8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25" table:default-cell-style-name="Default"/>
        <table:table-column table:style-name="co8" table:number-columns-repeated="1019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“Modified on” timestamp is displayed under the author name on news detail pages.</text:p>
          </table:table-cell>
          <table:table-cell table:style-name="ce3" office:value-type="string" calcext:value-type="string">
            <text:p>Open any news detail page</text:p>
            <text:p>Check below author name</text:p>
            <text:p> Verify “Modified on” is shown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Modified on” should appear under author name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“Last Update on” text is replaced with “Last Modified on”.</text:p>
          </table:table-cell>
          <table:table-cell table:style-name="ce3" office:value-type="string" calcext:value-type="string">
            <text:p>Observe timestamp label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Last Update on” should be replaced with “Last Modified on”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 is visible for both new and existing news articles.</text:p>
          </table:table-cell>
          <table:table-cell table:style-name="ce3" office:value-type="string" calcext:value-type="string">
            <text:p>Open new article</text:p>
            <text:p>Open old article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Timestamp should be visible for all article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 format follows: DD Month, YYYY.</text:p>
          </table:table-cell>
          <table:table-cell table:style-name="ce3" office:value-type="string" calcext:value-type="string">
            <text:p>Check date text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Format should be DD Month, YYY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 format follows: hh:mm AM/PM.</text:p>
          </table:table-cell>
          <table:table-cell table:style-name="ce3" office:value-type="string" calcext:value-type="string">
            <text:p>Look at time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Format should be hh:mm AM/PM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zone abbreviation is displayed along with country timezone code.</text:p>
          </table:table-cell>
          <table:table-cell table:style-name="ce3" office:value-type="string" calcext:value-type="string">
            <text:p>Check timestamp text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Timezone should be shown with timestamp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UAE articles display timezone as GST.</text:p>
          </table:table-cell>
          <table:table-cell table:style-name="ce3" office:value-type="string" calcext:value-type="string">
            <text:p>Open UAE article</text:p>
          </table:table-cell>
          <table:table-cell table:style-name="ce3" office:value-type="string" calcext:value-type="string">
            <text:p>Timestamp timezone validation</text:p>
          </table:table-cell>
          <table:table-cell table:style-name="ce3" office:value-type="string" calcext:value-type="string">
            <text:p>Should display GST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KSA articles display timezone as AST – KSA.</text:p>
          </table:table-cell>
          <table:table-cell table:style-name="ce3" office:value-type="string" calcext:value-type="string">
            <text:p>Open KSA article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s are converted correctly based on UAE timezone (+04:00).</text:p>
          </table:table-cell>
          <table:table-cell table:style-name="ce3" office:value-type="string" calcext:value-type="string">
            <text:p>Compare backend time vs UI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s are converted correctly based on KSA timezone (+03:00).</text:p>
          </table:table-cell>
          <table:table-cell table:style-name="ce3" office:value-type="string" calcext:value-type="string">
            <text:p>Compare backend time vs UI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information <text:s/>icon is displayed next to timestamp.</text:p>
          </table:table-cell>
          <table:table-cell table:style-name="ce3" office:value-type="string" calcext:value-type="string">
            <text:p>Look next to timestamp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hovering on info icon shows tooltip on desktop.</text:p>
          </table:table-cell>
          <table:table-cell table:style-name="ce3" office:value-type="string" calcext:value-type="string">
            <text:p>Hover on (i) icon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apping info icon shows tooltip on mobile.</text:p>
          </table:table-cell>
          <table:table-cell table:style-name="ce3" office:value-type="string" calcext:value-type="string">
            <text:p>Tap on (i) icon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ooltip displays both Published on and Last Modified on timestamps.</text:p>
          </table:table-cell>
          <table:table-cell table:style-name="ce3" office:value-type="string" calcext:value-type="string">
            <text:p>Open tooltip Check Published + Modified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ooltip closes on click outside or second tap.</text:p>
          </table:table-cell>
          <table:table-cell table:style-name="ce3" office:value-type="string" calcext:value-type="string">
            <text:p>Click outside / tap again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Published on timestamp matches backend publish date.</text:p>
          </table:table-cell>
          <table:table-cell table:style-name="ce3" office:value-type="string" calcext:value-type="string">
            <text:p>Compare with backend data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Modified on timestamp matches backend modified date.</text:p>
          </table:table-cell>
          <table:table-cell table:style-name="ce3" office:value-type="string" calcext:value-type="string">
            <text:p>Compare with backend data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Modified date updates correctly after content edit.</text:p>
          </table:table-cell>
          <table:table-cell table:style-name="ce3" office:value-type="string" calcext:value-type="string">
            <text:p>Edit article</text:p>
            <text:p>Refresh page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NewsArticle schema contains dateModified field.</text:p>
          </table:table-cell>
          <table:table-cell table:style-name="ce3" office:value-type="string" calcext:value-type="string">
            <text:p>Right-click → View Source</text:p>
            <text:p>Search dateModified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dateModified uses correct given format.</text:p>
          </table:table-cell>
          <table:table-cell table:style-name="ce3" office:value-type="string" calcext:value-type="string">
            <text:p>Check date format in schema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dateModified contains correct timezone offset for UAE (+04:00).</text:p>
          </table:table-cell>
          <table:table-cell table:style-name="ce3" office:value-type="string" calcext:value-type="string">
            <text:p>Check +04:00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dateModified contains correct timezone offset for KSA (+03:00).</text:p>
          </table:table-cell>
          <table:table-cell table:style-name="ce3" office:value-type="string" calcext:value-type="string">
            <text:p>Check +03:00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schema dateModified matches UI Modified on timestamp.</text:p>
          </table:table-cell>
          <table:table-cell table:style-name="ce3" office:value-type="string" calcext:value-type="string">
            <text:p>Compare schema &amp; UI timestamp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no mismatch between Published on tooltip value and schema datePublished.</text:p>
          </table:table-cell>
          <table:table-cell table:style-name="ce3" office:value-type="string" calcext:value-type="string">
            <text:p>Compare tooltip vs schema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no console errors related to timestamp rendering.</text:p>
          </table:table-cell>
          <table:table-cell table:style-name="ce3" office:value-type="string" calcext:value-type="string">
            <text:p>Open DevTools → Console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 layout does not break on mobile devices.</text:p>
          </table:table-cell>
          <table:table-cell table:style-name="ce3" office:value-type="string" calcext:value-type="string">
            <text:p>Open on mobile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 alignment remains correct across screen sizes.</text:p>
          </table:table-cell>
          <table:table-cell table:style-name="ce3" office:value-type="string" calcext:value-type="string">
            <text:p>Resize screen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s display correctly across browsers (Chrome, Edge, Safari).</text:p>
          </table:table-cell>
          <table:table-cell table:style-name="ce3" office:value-type="string" calcext:value-type="string">
            <text:p>Test in Chrome, Edge, Safari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s remain correct after page refresh and cache clear.</text:p>
          </table:table-cell>
          <table:table-cell table:style-name="ce3" office:value-type="string" calcext:value-type="string">
            <text:p>Refresh page</text:p>
            <text:p>Hard reload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system handles articles created in one timezone but displayed in another correctly.</text:p>
          </table:table-cell>
          <table:table-cell table:style-name="ce3" office:value-type="string" calcext:value-type="string">
            <text:p>Open article from different region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multiple language versions (Arabic / English) display correct localized timestamp.</text:p>
          </table:table-cell>
          <table:table-cell table:style-name="ce3" office:value-type="string" calcext:value-type="string">
            <text:p>Switch English ↔ Arabic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RTL layout does not break timestamp formatting on Arabic pages.</text:p>
          </table:table-cell>
          <table:table-cell table:style-name="ce3" office:value-type="string" calcext:value-type="string">
            <text:p>Open Arabic page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 is visible for articles with only publish date and no modification.</text:p>
          </table:table-cell>
          <table:table-cell table:style-name="ce3" office:value-type="string" calcext:value-type="string">
            <text:p>Open article without modification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ews Timestamp &amp; Timezone Validation (UI + Schema + Accessibility)</text:p>
          </table:table-cell>
          <table:table-cell table:style-name="ce9" office:value-type="string" calcext:value-type="string">
            <text:p>Verify timestamp behavior when publish and modified times are identical.</text:p>
          </table:table-cell>
          <table:table-cell table:style-name="ce3" office:value-type="string" calcext:value-type="string">
            <text:p>Check article with same timestamps</text:p>
          </table:table-cell>
          <table:table-cell table:style-name="ce3" office:value-type="string" calcext:value-type="string">
            <text:p>Timestamp timezone validation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35" table:style-name="ta28">
        <table:table-column table:style-name="co8" table:number-columns-repeated="2" table:default-cell-style-name="Default"/>
        <table:table-column table:style-name="co107" table:default-cell-style-name="Default"/>
        <table:table-column table:style-name="co33" table:default-cell-style-name="Default"/>
        <table:table-column table:style-name="co70" table:default-cell-style-name="Default"/>
        <table:table-column table:style-name="co108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reflang tags are implemented in the &lt;head&gt; section of the homepage for AE, KSA English, and KSA Arabic.</text:p>
          </table:table-cell>
          <table:table-cell table:style-name="ce3" office:value-type="string" calcext:value-type="string">
            <text:p>Open homepage</text:p>
            <text:p>Right-click → View Page Source</text:p>
            <text:p>Search: hreflang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Hreflang tags should be present for en-AE, en-SA, ar-SA, and x-defaul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reflang tags are implemented in the &lt;head&gt; section for all model pages.</text:p>
          </table:table-cell>
          <table:table-cell table:style-name="ce3" office:value-type="string" calcext:value-type="string">
            <text:p>Open any model page</text:p>
            <text:p>View source</text:p>
            <text:p>Search hreflang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All model pages should contain hreflang tags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reflang tags are implemented in the &lt;head&gt; section for all listing pages.</text:p>
          </table:table-cell>
          <table:table-cell table:style-name="ce3" office:value-type="string" calcext:value-type="string">
            <text:p>Open listing page</text:p>
            <text:p>View source</text:p>
            <text:p>Search hreflang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Listing pages should have hreflang tag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AE pages include hreflang entries for en-AE, en-SA, ar-SA, and x-default.</text:p>
          </table:table-cell>
          <table:table-cell table:style-name="ce3" office:value-type="string" calcext:value-type="string">
            <text:p>Open AE page</text:p>
            <text:p>Check hreflang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AE pages should include en-AE, en-SA, ar-SA, x-defaul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KSA English pages include hreflang entries for en-SA, en-AE, ar-SA, and x-default.</text:p>
          </table:table-cell>
          <table:table-cell table:style-name="ce3" office:value-type="string" calcext:value-type="string">
            <text:p>Open KSA EN page</text:p>
            <text:p>Check hreflang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include en-SA, en-AE, ar-SA, x-defaul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KSA Arabic pages include hreflang entries for ar-SA, en-SA, en-AE, and x-default.</text:p>
          </table:table-cell>
          <table:table-cell table:style-name="ce3" office:value-type="string" calcext:value-type="string">
            <text:p>Open KSA AR page</text:p>
            <text:p>Check hreflang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include ar-SA, en-SA, en-AE, x-defaul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the x-default for all pages points to https://www.zigwheels.ae/.</text:p>
          </table:table-cell>
          <table:table-cell table:style-name="ce3" office:value-type="string" calcext:value-type="string">
            <text:p>Check hreflang list</text:p>
            <text:p> x-default should point to:</text:p>
            <text:p> https://www.zigwheels.ae/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12" office:value-type="string" calcext:value-type="string">
            <text:p><text:a xlink:href="https://www.zigwheels.ae/" xlink:type="simple">x-default should point to https://www.zigwheels.ae/</text:a>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language codes follow ISO format (en-AE, en-SA, ar-SA).</text:p>
          </table:table-cell>
          <table:table-cell table:style-name="ce3" office:value-type="string" calcext:value-type="string">
            <text:p>Check hreflang values</text:p>
            <text:p/>
            <text:p>Format should be:</text:p>
            <text:p/>
            <text:p>en-AE</text:p>
            <text:p>en-SA</text:p>
            <text:p>ar-SA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follow ISO format (en-AE, en-SA, ar-SA)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reflang URLs use correct KSA folders /en/ and /ar/.</text:p>
          </table:table-cell>
          <table:table-cell table:style-name="ce3" office:value-type="string" calcext:value-type="string">
            <text:p>Check URLs inside hreflang</text:p>
            <text:p/>
            <text:p> KSA should use:</text:p>
            <text:p/>
            <text:p>/en/</text:p>
            <text:p>/ar/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KSA URLs should use correct language folder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TML lang attribute is en for AE.</text:p>
          </table:table-cell>
          <table:table-cell table:style-name="ce3" office:value-type="string" calcext:value-type="string">
            <text:p>Inspect &lt;html&gt; tag</text:p>
            <text:p/>
            <text:p> lang="en"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be lang="en"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TML lang attribute is en for KSA English pages.</text:p>
          </table:table-cell>
          <table:table-cell table:style-name="ce3" office:value-type="string" calcext:value-type="string">
            <text:p>Inspect &lt;html&gt;</text:p>
            <text:p/>
            <text:p> lang="en"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be lang="en"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TML lang attribute is ar for KSA Arabic pages.</text:p>
          </table:table-cell>
          <table:table-cell table:style-name="ce3" office:value-type="string" calcext:value-type="string">
            <text:p>Inspect &lt;html&gt;</text:p>
            <text:p/>
            <text:p> lang="ar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be lang="ar"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reflang uses lowercase hreflang="en-ae" instead of uppercase.</text:p>
          </table:table-cell>
          <table:table-cell table:style-name="ce3" office:value-type="string" calcext:value-type="string">
            <text:p>Check hreflang values</text:p>
            <text:p> Should be: en-ae (lowercase)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use lowercase (en-ae)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no duplicate hreflang tags exist for any language.</text:p>
          </table:table-cell>
          <table:table-cell table:style-name="ce3" office:value-type="string" calcext:value-type="string">
            <text:p>Search all hreflang tags</text:p>
            <text:p/>
            <text:p> Ensure no duplicates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No duplicate tags should exis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all model pages include correct hreflang pointing to AE, KSA EN, and KSA AR versions.</text:p>
          </table:table-cell>
          <table:table-cell table:style-name="ce3" office:value-type="string" calcext:value-type="string">
            <text:p>Open model page</text:p>
            <text:p>Check hreflang links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link to AE, KSA EN, KSA AR versions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all car listing pages include correct hreflang pointing to their equivalents.</text:p>
          </table:table-cell>
          <table:table-cell table:style-name="ce3" office:value-type="string" calcext:value-type="string">
            <text:p>Open listing page</text:p>
            <text:p> Check equivalent links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link to equivalent page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Hreflang &amp; Language Tag Validation</text:p>
          </table:table-cell>
          <table:table-cell table:style-name="ce3" office:value-type="string" calcext:value-type="string">
            <text:p>Verify homepage includes hreflang for all three regions and x-default.</text:p>
          </table:table-cell>
          <table:table-cell table:style-name="ce3" office:value-type="string" calcext:value-type="string">
            <text:p>Open homepage</text:p>
            <text:p> Verify all regions + x-default</text:p>
          </table:table-cell>
          <table:table-cell table:style-name="ce3" office:value-type="string" calcext:value-type="string">
            <text:p>hreflag should be required</text:p>
          </table:table-cell>
          <table:table-cell table:style-name="ce3" office:value-type="string" calcext:value-type="string">
            <text:p>Should include all regions + x-defaul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18" table:style-name="ta29">
        <table:table-column table:style-name="co8" table:number-columns-repeated="2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" table:default-cell-style-name="Default"/>
        <table:table-column table:style-name="co112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the user is able to see the new UI changes on News Detail pages using WAP.</text:p>
          </table:table-cell>
          <table:table-cell table:style-name="ce3" office:value-type="string" calcext:value-type="string">
            <text:p>Open website on mobile (WAP)</text:p>
            <text:p>Open any News Detail page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New UI changes should be visible.</text:p>
          </table:table-cell>
          <table:table-cell table:style-name="ce3" office:value-type="string" calcext:value-type="string">
            <text:p>New UI is displayed correctly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the new UI changes on News Detail pages are not affecting other pages using WAP.</text:p>
          </table:table-cell>
          <table:table-cell table:style-name="ce3" office:value-type="string" calcext:value-type="string">
            <text:p>After checking News page</text:p>
            <text:p>Open other pages (Home, Listing, Model page)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Other pages should not be impacted.</text:p>
          </table:table-cell>
          <table:table-cell table:style-name="ce3" office:value-type="string" calcext:value-type="string">
            <text:p>No impact observed on other pages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the user is able to see the new UI changes on Car Tips Detail pages using WAP.</text:p>
          </table:table-cell>
          <table:table-cell table:style-name="ce3" office:value-type="string" calcext:value-type="string">
            <text:p>Open any Car Tips detail page</text:p>
            <text:p/>
            <text:p>Check:</text:p>
            <text:p/>
            <text:p>New UI changes are applied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New UI should be applied.</text:p>
          </table:table-cell>
          <table:table-cell table:style-name="ce3" office:value-type="string" calcext:value-type="string">
            <text:p>UI changes are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the user is able to see the new UI changes on Advisory Stories Detail pages using WAP.</text:p>
          </table:table-cell>
          <table:table-cell table:style-name="ce3" office:value-type="string" calcext:value-type="string">
            <text:p>Open any Advisory Story detail page</text:p>
            <text:p/>
            <text:p> Check:</text:p>
            <text:p/>
            <text:p>UI changes are visible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UI changes should be visible</text:p>
          </table:table-cell>
          <table:table-cell table:style-name="ce3" office:value-type="string" calcext:value-type="string">
            <text:p>UI is correctly displayed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the user Total Customer Views are visible below H1 heading and Aurthur name along with Social icons on the right side of the page.</text:p>
          </table:table-cell>
          <table:table-cell table:style-name="ce3" office:value-type="string" calcext:value-type="string">
            <text:p>Check same section</text:p>
            <text:p/>
            <text:p>Check:</text:p>
            <text:p/>
            <text:p>Social icons visible on right side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Social icons should be visible on right side.</text:p>
          </table:table-cell>
          <table:table-cell table:style-name="ce3" office:value-type="string" calcext:value-type="string">
            <text:p>Icons are correctly shown on right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all 4 social icons are visible below H1 heading and Aurthur name on th left side of the page.</text:p>
          </table:table-cell>
          <table:table-cell table:style-name="ce3" office:value-type="string" calcext:value-type="string">
            <text:p>Check same section</text:p>
            <text:p/>
            <text:p>Check:</text:p>
            <text:p/>
            <text:p>Social icons visible on left side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Social icons should be visible on left side.</text:p>
          </table:table-cell>
          <table:table-cell table:style-name="ce3" office:value-type="string" calcext:value-type="string">
            <text:p>Icons are correctly shown on lef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ews &amp; Content Detail Pages UI</text:p>
          </table:table-cell>
          <table:table-cell table:style-name="ce3" office:value-type="string" calcext:value-type="string">
            <text:p>Verified by checking if the user is able to see if the border of the images available on the news detail page is touching the edge.</text:p>
          </table:table-cell>
          <table:table-cell table:style-name="ce3" office:value-type="string" calcext:value-type="string">
            <text:p>Check below H1 &amp; author</text:p>
            <text:p/>
            <text:p> Check:</text:p>
            <text:p/>
            <text:p>All 4 social icons visible on left side</text:p>
          </table:table-cell>
          <table:table-cell table:style-name="ce3" office:value-type="string" calcext:value-type="string">
            <text:p>WAP UI validation</text:p>
          </table:table-cell>
          <table:table-cell table:style-name="ce3" office:value-type="string" calcext:value-type="string">
            <text:p>Images should touch screen edges (no extra spacing).</text:p>
          </table:table-cell>
          <table:table-cell table:style-name="ce3" office:value-type="string" calcext:value-type="string">
            <text:p>Images are aligned correctly with edges.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13" table:style-name="ta30">
        <table:table-column table:style-name="co8" table:number-columns-repeated="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22" table:default-cell-style-name="Default"/>
        <table:table-column table:style-name="co115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bout Us Page UI &amp; Content Validation</text:p>
          </table:table-cell>
          <table:table-cell table:style-name="ce3" office:value-type="string" calcext:value-type="string">
            <text:p>Verified by checking if the user is able to see the updated About Us Page on Zw Ae for web.</text:p>
          </table:table-cell>
          <table:table-cell table:style-name="ce3" office:value-type="string" calcext:value-type="string">
            <text:p>Open website on desktop (web)</text:p>
            <text:p>Navigate to About Us page</text:p>
          </table:table-cell>
          <table:table-cell table:style-name="ce3" office:value-type="string" calcext:value-type="string">
            <text:p>About page validation</text:p>
          </table:table-cell>
          <table:table-cell table:style-name="ce3" office:value-type="string" calcext:value-type="string">
            <text:p>Updated About Us page should be visible on web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bout Us Page UI &amp; Content Validation</text:p>
          </table:table-cell>
          <table:table-cell table:style-name="ce3" office:value-type="string" calcext:value-type="string">
            <text:p>Verified by checking if the user is able to see the updated About Us Page on Zw Ae for wap.</text:p>
          </table:table-cell>
          <table:table-cell table:style-name="ce3" office:value-type="string" calcext:value-type="string">
            <text:p>Open website on wap</text:p>
            <text:p>Navigate to About Us page</text:p>
          </table:table-cell>
          <table:table-cell table:style-name="ce3" office:value-type="string" calcext:value-type="string">
            <text:p>About page validation</text:p>
          </table:table-cell>
          <table:table-cell table:style-name="ce3" office:value-type="string" calcext:value-type="string">
            <text:p>Updated About Us page should be visible on mobile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bout Us Page UI &amp; Content Validation</text:p>
          </table:table-cell>
          <table:table-cell table:style-name="ce3" office:value-type="string" calcext:value-type="string">
            <text:p>Verified by checking if the user is able to scroll through the About Us Page on Zw Ae for web and wap.</text:p>
          </table:table-cell>
          <table:table-cell table:style-name="ce3" office:value-type="string" calcext:value-type="string">
            <text:p>Open About Us page</text:p>
            <text:p>Scroll from top to bottom</text:p>
          </table:table-cell>
          <table:table-cell table:style-name="ce3" office:value-type="string" calcext:value-type="string">
            <text:p>About page validation</text:p>
          </table:table-cell>
          <table:table-cell table:style-name="ce3" office:value-type="string" calcext:value-type="string">
            <text:p>Page should scroll smoothly without issues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bout Us Page UI &amp; Content Validation</text:p>
          </table:table-cell>
          <table:table-cell table:style-name="ce3" office:value-type="string" calcext:value-type="string">
            <text:p>Verified by checking if the content of the About Us Page is correctly updated on Zw Ae for web and wap.</text:p>
          </table:table-cell>
          <table:table-cell table:style-name="ce3" office:value-type="string" calcext:value-type="string">
            <text:p>Read content on About Us page</text:p>
          </table:table-cell>
          <table:table-cell table:style-name="ce3" office:value-type="string" calcext:value-type="string">
            <text:p>About page validation</text:p>
          </table:table-cell>
          <table:table-cell table:style-name="ce3" office:value-type="string" calcext:value-type="string">
            <text:p>content should be updated and correct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bout Us Page UI &amp; Content Validation</text:p>
          </table:table-cell>
          <table:table-cell table:style-name="ce3" office:value-type="string" calcext:value-type="string">
            <text:p>Verified by checking if the user is able to see the updated About Us Page on Zw Ae for web.</text:p>
          </table:table-cell>
          <table:table-cell table:style-name="ce3" office:value-type="string" calcext:value-type="string">
            <text:p>Compare same page on web &amp; mobile</text:p>
          </table:table-cell>
          <table:table-cell table:style-name="ce3" office:value-type="string" calcext:value-type="string">
            <text:p>About page validation</text:p>
          </table:table-cell>
          <table:table-cell table:style-name="ce3" office:value-type="string" calcext:value-type="string">
            <text:p>Same content and UI should appear on both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08" table:style-name="ta31">
        <table:table-column table:style-name="co8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41" table:default-cell-style-name="Default"/>
        <table:table-column table:style-name="co118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ied by checking if the CDN is visible for the images on Model Overview (ATF) images page</text:p>
          </table:table-cell>
          <table:table-cell table:style-name="ce3" office:value-type="string" calcext:value-type="string">
            <text:p>Open any Model Overview page</text:p>
            <text:p>Right-click image → Inspect</text:p>
            <text:p>Check image URL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ATF images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ied by checking if the CDN is visible for the images on Model Image gallery page</text:p>
          </table:table-cell>
          <table:table-cell table:style-name="ce3" office:value-type="string" calcext:value-type="string">
            <text:p>Open model → go to Image Gallery</text:p>
            <text:p>Inspect gallery images</text:p>
            <text:p/>
            <text:p/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Gallery images should use CDN URL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ied by checking if the CDN is visible for the images Expert review images page</text:p>
          </table:table-cell>
          <table:table-cell table:style-name="ce3" office:value-type="string" calcext:value-type="string">
            <text:p>Open Expert Review page</text:p>
            <text:p>Inspect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All images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ied by checking if the CDN is visible for the images News / Article images page</text:p>
          </table:table-cell>
          <table:table-cell table:style-name="ce3" office:value-type="string" calcext:value-type="string">
            <text:p>Open any news/article page</text:p>
            <text:p>Inspect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Images should load via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mobile version loads all images from the new CDN.</text:p>
          </table:table-cell>
          <table:table-cell table:style-name="ce3" office:value-type="string" calcext:value-type="string">
            <text:p>Open page</text:p>
            <text:p>Scroll down slowly</text:p>
            <text:p>Watch images loading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All images on mobile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lazy loading is applied to non-ATF images from the new CDN</text:p>
          </table:table-cell>
          <table:table-cell table:style-name="ce3" office:value-type="string" calcext:value-type="string">
            <text:p>Open page</text:p>
            <text:p>Scroll down slowly</text:p>
            <text:p>Watch images loading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Non-ATF images should load only on scroll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article listing thumbnails load from the new CDN.</text:p>
          </table:table-cell>
          <table:table-cell table:style-name="ce3" office:value-type="string" calcext:value-type="string">
            <text:p>Open listing page</text:p>
            <text:p>Inspect thumbnail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Thumbnails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news/article featured images load from the new CDN</text:p>
          </table:table-cell>
          <table:table-cell table:style-name="ce3" office:value-type="string" calcext:value-type="string">
            <text:p>Open article</text:p>
            <text:p>Check top image CDN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Featured image should use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inline article body images load from the new CDN.</text:p>
          </table:table-cell>
          <table:table-cell table:style-name="ce3" office:value-type="string" calcext:value-type="string">
            <text:p>Scroll article \Inspect inline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Inline images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JPG, PNG, and WebP images in expert review pages load via the new CDN.</text:p>
          </table:table-cell>
          <table:table-cell table:style-name="ce3" office:value-type="string" calcext:value-type="string">
            <text:p>Inspect different images</text:p>
            <text:p/>
            <text:p> Check format + CDN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All formats should load via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full-size or zoomed gallery images load from the new CDN.</text:p>
          </table:table-cell>
          <table:table-cell table:style-name="ce3" office:value-type="string" calcext:value-type="string">
            <text:p>Open gallery → click image</text:p>
            <text:p> Check zoom image URL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Zoomed images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model gallery images load sequentially without broken images.</text:p>
          </table:table-cell>
          <table:table-cell table:style-name="ce3" office:value-type="string" calcext:value-type="string">
            <text:p>Open gallery</text:p>
            <text:p>Scroll through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Images should load without break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expert review banner images load from the new CDN.</text:p>
          </table:table-cell>
          <table:table-cell table:style-name="ce3" office:value-type="string" calcext:value-type="string">
            <text:p>Open expert review page</text:p>
            <text:p>Inspect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Banner image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expert review inline content images load from the new CDN.</text:p>
          </table:table-cell>
          <table:table-cell table:style-name="ce3" office:value-type="string" calcext:value-type="string">
            <text:p>Scroll page</text:p>
            <text:p> Inspect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Inline images should use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ATF images load with proper quality and within acceptable loading time.</text:p>
          </table:table-cell>
          <table:table-cell table:style-name="ce3" office:value-type="string" calcext:value-type="string">
            <text:p>Reload page</text:p>
            <text:p> Observe loading time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Images should load quickly with good quality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all model gallery images load from the new CDN.</text:p>
          </table:table-cell>
          <table:table-cell table:style-name="ce3" office:value-type="string" calcext:value-type="string">
            <text:p>Open gallery</text:p>
            <text:p> Check all images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All images should load via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gallery thumbnails load from the new CDN.</text:p>
          </table:table-cell>
          <table:table-cell table:style-name="ce3" office:value-type="string" calcext:value-type="string">
            <text:p>Check thumbnail images</text:p>
            <text:p> Inspect URL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Thumbnails should use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mage CDN Integration &amp; Loading Validation</text:p>
          </table:table-cell>
          <table:table-cell table:style-name="ce9" office:value-type="string" calcext:value-type="string">
            <text:p>Verify ATF (model overview) images load from the new CDN.</text:p>
          </table:table-cell>
          <table:table-cell table:style-name="ce3" office:value-type="string" calcext:value-type="string">
            <text:p>Inspect top images again</text:p>
            <text:p/>
            <text:p> Confirm CDN</text:p>
          </table:table-cell>
          <table:table-cell table:style-name="ce3" office:value-type="string" calcext:value-type="string">
            <text:p>Image CDN validation</text:p>
          </table:table-cell>
          <table:table-cell table:style-name="ce3" office:value-type="string" calcext:value-type="string">
            <text:p>Top images should load from CD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02" table:style-name="ta32">
        <table:table-column table:style-name="co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86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sorted in ascending date order for Create date field.</text:p>
          </table:table-cell>
          <table:table-cell table:style-name="ce3" office:value-type="string" calcext:value-type="string">
            <text:p>Open list page</text:p>
            <text:p>Click Create Date column header</text:p>
            <text:p>Select Ascending sort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Items should be sorted from oldest to newes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sorted in descending date order for Create date field.</text:p>
          </table:table-cell>
          <table:table-cell table:style-name="ce3" office:value-type="string" calcext:value-type="string">
            <text:p>Click Create Date column again</text:p>
            <text:p>Select Descending sort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Items should be sorted from newest to oldes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sorted in ascending date order for Updated date field.</text:p>
          </table:table-cell>
          <table:table-cell table:style-name="ce3" office:value-type="string" calcext:value-type="string">
            <text:p>Click Updated Date column</text:p>
            <text:p>Select Ascending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Items should be sorted from oldest to newest (based on update date)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sorted in descending date order for Updated date field.</text:p>
          </table:table-cell>
          <table:table-cell table:style-name="ce3" office:value-type="string" calcext:value-type="string">
            <text:p>Click Updated Date column again</text:p>
            <text:p>Select Descending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Items should be sorted from newest to oldest (based on update date)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correctly sorted after creating new list item.</text:p>
          </table:table-cell>
          <table:table-cell table:style-name="ce3" office:value-type="string" calcext:value-type="string">
            <text:p>Create a new list item</text:p>
            <text:p>Go back to list page</text:p>
            <text:p>Apply sorting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New item should appear in correct position based on sorting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correctly sorted after updating an existing list item.</text:p>
          </table:table-cell>
          <table:table-cell table:style-name="ce3" office:value-type="string" calcext:value-type="string">
            <text:p>Edit any existing item</text:p>
            <text:p>Save changes</text:p>
            <text:p>Apply sorting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Updated item should move according to new updated dat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correctly sorted after changing the page for Create Date field.</text:p>
          </table:table-cell>
          <table:table-cell table:style-name="ce3" office:value-type="string" calcext:value-type="string">
            <text:p>Apply sort on Create Date</text:p>
            <text:p>Go to next page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Sorting order should remain consistent across page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ist Sorting &amp; Pagination Validation (Create Date &amp; Update Date)</text:p>
          </table:table-cell>
          <table:table-cell table:style-name="ce3" office:value-type="string" calcext:value-type="string">
            <text:p>Verified by checking if the list items are getting correctly sorted after changing the page for Update Date field.</text:p>
          </table:table-cell>
          <table:table-cell table:style-name="ce3" office:value-type="string" calcext:value-type="string">
            <text:p>Apply Updated Date sort</text:p>
            <text:p>Change page</text:p>
          </table:table-cell>
          <table:table-cell table:style-name="ce3" office:value-type="string" calcext:value-type="string">
            <text:p>List sorting validation</text:p>
          </table:table-cell>
          <table:table-cell table:style-name="ce3" office:value-type="string" calcext:value-type="string">
            <text:p>Sorting should not break when changing page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01" table:style-name="ta33">
        <table:table-column table:style-name="co8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f the user is able to view the video on Images page using web.</text:p>
          </table:table-cell>
          <table:table-cell table:style-name="ce3" office:value-type="string" calcext:value-type="string">
            <text:p>Open website on desktop (web)</text:p>
            <text:p>Go to Images page</text:p>
            <text:p>Play the video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Video should be visible and play properly on web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f the user is able to view the video on Images page using wap.</text:p>
          </table:table-cell>
          <table:table-cell table:style-name="ce3" office:value-type="string" calcext:value-type="string">
            <text:p>Open website on mobile</text:p>
            <text:p>Go to Images page</text:p>
            <text:p>Play the video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Video should be visible and play properly on wap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t the user is able to view the video on Colors page using web.</text:p>
          </table:table-cell>
          <table:table-cell table:style-name="ce3" office:value-type="string" calcext:value-type="string">
            <text:p>Open Colors page on desktop</text:p>
            <text:p>Play the video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Video should be visible and playable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t the user is able to view the video on Colors page using wap.</text:p>
          </table:table-cell>
          <table:table-cell table:style-name="ce3" office:value-type="string" calcext:value-type="string">
            <text:p>Open Colors page on mobile</text:p>
            <text:p>Play the video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Video should be visible and playable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f the user is able to use other functionalities while watching the video on Images page using web.</text:p>
          </table:table-cell>
          <table:table-cell table:style-name="ce3" office:value-type="string" calcext:value-type="string">
            <text:p>Play video on Images page</text:p>
            <text:p>Try scrolling / clicking other elements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User should be able to use other features while video plays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f the user is able to use other functionalities while watching the video on Colors page using web.</text:p>
          </table:table-cell>
          <table:table-cell table:style-name="ce3" office:value-type="string" calcext:value-type="string">
            <text:p>Play video on Colors page</text:p>
            <text:p>Interact with page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No blocking while video is playing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f the user is able to use other functionalities while watching the video on Images page using wap.</text:p>
          </table:table-cell>
          <table:table-cell table:style-name="ce3" office:value-type="string" calcext:value-type="string">
            <text:p>Play video on mobile (Images page)</text:p>
            <text:p>Scroll or tap other elements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User should interact with page while video plays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ideo Playback &amp; Functionality Validation</text:p>
          </table:table-cell>
          <table:table-cell table:style-name="ce3" office:value-type="string" calcext:value-type="string">
            <text:p>Verified by checking if the user is able to use other functionalities while watching the video on Colors page using wap.</text:p>
          </table:table-cell>
          <table:table-cell table:style-name="ce3" office:value-type="string" calcext:value-type="string">
            <text:p>Play video on mobile (Colors page)</text:p>
            <text:p>Use other features</text:p>
          </table:table-cell>
          <table:table-cell table:style-name="ce3" office:value-type="string" calcext:value-type="string">
            <text:p>Video playback validation</text:p>
          </table:table-cell>
          <table:table-cell table:style-name="ce3" office:value-type="string" calcext:value-type="string">
            <text:p>Page should remain functional during playback.</text:p>
          </table:table-cell>
          <table:table-cell table:style-name="ce3" office:value-type="string" calcext:value-type="string">
            <text:p>works completely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472" table:style-name="ta34">
        <table:table-column table:style-name="co8" table:number-columns-repeated="2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64" table:default-cell-style-name="Default"/>
        <table:table-column table:style-name="co8" table:number-columns-repeated="1019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FAQ creation form loads correctly in backend.</text:p>
          </table:table-cell>
          <table:table-cell table:style-name="ce3" office:value-type="string" calcext:value-type="string">
            <text:p>Login to backend/admin panel</text:p>
            <text:p>Navigate to FAQ creation pag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FAQ creation form should load properl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brand dropdown displays all available brands.</text:p>
          </table:table-cell>
          <table:table-cell table:style-name="ce3" office:value-type="string" calcext:value-type="string">
            <text:p>Click Brand dropdown</text:p>
            <text:p> Check: All brands are listed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All brands should be visible in dropdown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model dropdown is disabled before brand selection.</text:p>
          </table:table-cell>
          <table:table-cell table:style-name="ce3" office:value-type="string" calcext:value-type="string">
            <text:p>Do NOT select brand</text:p>
            <text:p/>
            <text:p> Check: Model dropdown is disabled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Model dropdown should be disabled before selecting brand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model dropdown becomes active after selecting a brand.</text:p>
          </table:table-cell>
          <table:table-cell table:style-name="ce3" office:value-type="string" calcext:value-type="string">
            <text:p>Select any brand</text:p>
            <text:p/>
            <text:p> Check: Model dropdown becomes activ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Model dropdown should activate after brand selection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mandatory validation for brand selection before saving.</text:p>
          </table:table-cell>
          <table:table-cell table:style-name="ce3" office:value-type="string" calcext:value-type="string">
            <text:p>Try saving without selecting brand</text:p>
            <text:p/>
            <text:p> Check: Validation error appears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System should not allow save without brand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model selection is optional for brand-level FAQs.</text:p>
          </table:table-cell>
          <table:table-cell table:style-name="ce3" office:value-type="string" calcext:value-type="string">
            <text:p>Select brand only</text:p>
            <text:p>Leave model empty</text:p>
            <text:p>Sav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FAQ should save without selecting model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model selection is required for model-specific FAQs.</text:p>
          </table:table-cell>
          <table:table-cell table:style-name="ce3" office:value-type="string" calcext:value-type="string">
            <text:p>Select brand + model</text:p>
            <text:p>Sav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Model must be selected for model-specific FAQ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Question and Answer fields are mandatory.</text:p>
          </table:table-cell>
          <table:table-cell table:style-name="ce3" office:value-type="string" calcext:value-type="string">
            <text:p>Leave fields empty</text:p>
            <text:p>Click sav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Fields should not be empty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system prevents duplicate FAQ entries for same brand/model/question.</text:p>
          </table:table-cell>
          <table:table-cell table:style-name="ce3" office:value-type="string" calcext:value-type="string">
            <text:p>Create FAQ</text:p>
            <text:p>Try adding same question again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Duplicate FAQs should not be allowed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edit functionality for existing FAQs.</text:p>
          </table:table-cell>
          <table:table-cell table:style-name="ce3" office:value-type="string" calcext:value-type="string">
            <text:p>Open existing FAQ</text:p>
            <text:p>Click edit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Existing FAQ should be editable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brand and model fields are editable in existing FAQs.</text:p>
          </table:table-cell>
          <table:table-cell table:style-name="ce3" office:value-type="string" calcext:value-type="string">
            <text:p>Modify brand/model</text:p>
            <text:p>Sav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Brand and model should update successfull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brand_id and model_id reference valid brand/model records.</text:p>
          </table:table-cell>
          <table:table-cell table:style-name="ce3" office:value-type="string" calcext:value-type="string">
            <text:p>Check saved FAQ in DB/backend</text:p>
            <text:p/>
            <text:p> Check: brand_id &amp; model_id valid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brand_id and model_id should be valid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brand-specific FAQs display correctly on the brand page.</text:p>
          </table:table-cell>
          <table:table-cell table:style-name="ce3" office:value-type="string" calcext:value-type="string">
            <text:p>Open brand page</text:p>
            <text:p/>
            <text:p> Check: Brand FAQs visibl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Brand FAQs should display correctl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FAQs of other brands do not appear on a different brand page.</text:p>
          </table:table-cell>
          <table:table-cell table:style-name="ce3" office:value-type="string" calcext:value-type="string">
            <text:p>Open another brand</text:p>
            <text:p/>
            <text:p> Check: No wrong FAQs shown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FAQs should not appear on other brand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model-specific FAQs display correctly on the model page.</text:p>
          </table:table-cell>
          <table:table-cell table:style-name="ce3" office:value-type="string" calcext:value-type="string">
            <text:p>Open model page</text:p>
            <text:p/>
            <text:p> Check: Model FAQs visibl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Model FAQs should display correctl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both brand-level and model-level FAQs display together on a model page.</text:p>
          </table:table-cell>
          <table:table-cell table:style-name="ce3" office:value-type="string" calcext:value-type="string">
            <text:p>Open model page</text:p>
            <text:p/>
            <text:p> Check: Both brand + model FAQs shown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Both brand &amp; model FAQs should show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if brand-level FAQs are visible when no model-specific FAQ exists.</text:p>
          </table:table-cell>
          <table:table-cell table:style-name="ce3" office:value-type="string" calcext:value-type="string">
            <text:p>Remove model FAQ</text:p>
            <text:p>Open model page</text:p>
            <text:p/>
            <text:p> Check: Brand FAQ visible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Brand FAQ should show if no model FAQ exist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irrelevant FAQs do not appear across other models.</text:p>
          </table:table-cell>
          <table:table-cell table:style-name="ce3" office:value-type="string" calcext:value-type="string">
            <text:p>Open different model</text:p>
            <text:p/>
            <text:p> Check: Wrong FAQs not shown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FAQs should not appear on wrong models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FAQs display under correct model page sections.</text:p>
          </table:table-cell>
          <table:table-cell table:style-name="ce3" office:value-type="string" calcext:value-type="string">
            <text:p>Scroll model page</text:p>
            <text:p/>
            <text:p> Check: FAQs appear in correct section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FAQs should appear in correct section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ied by checking if the FAQs created using model is visible.</text:p>
          </table:table-cell>
          <table:table-cell table:style-name="ce3" office:value-type="string" calcext:value-type="string">
            <text:p>Create FAQ (model) → check frontend</text:p>
            <text:p>Create FAQ (brand) → check frontend</text:p>
            <text:p>Create FAQ (both) → check frontend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All created FAQs should be visible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ied by checking if the FAQs created using brand is visible.</text:p>
          </table:table-cell>
          <table:table-cell table:style-name="ce3" office:value-type="string" calcext:value-type="string">
            <text:p>Enter special characters in question</text:p>
            <text:p/>
            <text:p>Check: Validation handled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System should handle invalid input properl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ied by checking if the FAQs created using both brand and model are visible.</text:p>
          </table:table-cell>
          <table:table-cell table:style-name="ce3" office:value-type="string" calcext:value-type="string">
            <text:p>Send empty brand_id (API/backend)</text:p>
            <text:p/>
            <text:p> Check: Error handled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System should not accept empty brand_id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validation against unsupported or invalid characters in Question field.</text:p>
          </table:table-cell>
          <table:table-cell table:style-name="ce3" office:value-type="string" calcext:value-type="string">
            <text:p>Delete brand with FAQs</text:p>
            <text:p/>
            <text:p> Check: System handles safely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System should handle FAQs after brand deletion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and check when FAQ creation requests with empty or null brand_id.</text:p>
          </table:table-cell>
          <table:table-cell table:style-name="ce3" office:value-type="string" calcext:value-type="string">
            <text:p>Add multiple FAQs</text:p>
            <text:p/>
            <text:p> Check: All display correctly</text:p>
          </table:table-cell>
          <table:table-cell table:style-name="ce3" office:value-type="string" calcext:value-type="string">
            <text:p>FAQ validation testing</text:p>
          </table:table-cell>
          <table:table-cell table:style-name="ce3" office:value-type="string" calcext:value-type="string">
            <text:p>Multiple FAQs should display properly.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system behavior when a brand with associated FAQs is deleted.</text:p>
          </table:table-cell>
          <table:table-cell table:style-name="ce3" office:value-type="string" calcext:value-type="string">
            <text:p>Open FAQ section on mobile</text:p>
            <text:p/>
            <text:p> Check: UI is responsive</text:p>
          </table:table-cell>
          <table:table-cell table:style-name="ce3" office:value-type="string" calcext:value-type="string">
            <text:p>FAQ validation testing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ied by checking if multiple FAQs can be added and displayed.</text:p>
          </table:table-cell>
          <table:table-cell table:style-name="ce3" office:value-type="string" calcext:value-type="string">
            <text:p>open FAQ section and check </text:p>
          </table:table-cell>
          <table:table-cell table:style-name="ce3" office:value-type="string" calcext:value-type="string">
            <text:p>FAQ validation testing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FAQ Management &amp; Display Validation (Backend + Frontend)</text:p>
          </table:table-cell>
          <table:table-cell table:style-name="ce3" office:value-type="string" calcext:value-type="string">
            <text:p>Verify FAQ display section is responsive on mobile.</text:p>
          </table:table-cell>
          <table:table-cell table:style-name="ce3" office:value-type="string" calcext:value-type="string">
            <text:p>open FAQ section and check </text:p>
          </table:table-cell>
          <table:table-cell table:style-name="ce3" office:value-type="string" calcext:value-type="string">
            <text:p>FAQ validation testing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31" table:style-name="ta35">
        <table:table-column table:style-name="co8" table:number-columns-repeated="2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67" table:default-cell-style-name="Default"/>
        <table:table-column table:style-name="co60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the Arabic page of Contact Us is visible now.</text:p>
          </table:table-cell>
          <table:table-cell table:style-name="ce3" office:value-type="string" calcext:value-type="string">
            <text:p>Open website</text:p>
            <text:p>Switch language to Arabic</text:p>
            <text:p>Go to Contact Us page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Arabic version of Contact Us page should load properly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the user is able to navigate to Arabic page of Contact Us is visible now.</text:p>
          </table:table-cell>
          <table:table-cell table:style-name="ce3" office:value-type="string" calcext:value-type="string">
            <text:p>Switch to Arabic</text:p>
            <text:p>Click on Contact Us link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User should be able to navigate to Arabic Contact Us page without issu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the Arabic translation of About Us page is correct.</text:p>
          </table:table-cell>
          <table:table-cell table:style-name="ce3" office:value-type="string" calcext:value-type="string">
            <text:p>Switch to Arabic</text:p>
            <text:p>Open About Us page</text:p>
            <text:p>Read content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Content should be properly translated and meaningful in Arabic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all the text is properly aligned.</text:p>
          </table:table-cell>
          <table:table-cell table:style-name="ce3" office:value-type="string" calcext:value-type="string">
            <text:p>Open Arabic pages</text:p>
            <text:p>Observe text alignment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Text should be right-aligned and properly spaced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content is properly visible on web.</text:p>
          </table:table-cell>
          <table:table-cell table:style-name="ce3" office:value-type="string" calcext:value-type="string">
            <text:p>Open Arabic pages on desktop</text:p>
            <text:p>Scroll through content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All content should be fully visible on desktop without issue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content is properly visible on wap.</text:p>
          </table:table-cell>
          <table:table-cell table:style-name="ce3" office:value-type="string" calcext:value-type="string">
            <text:p>Open Arabic pages on mobile</text:p>
            <text:p>Scroll page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Content should be properly visible and readable on mobi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rabic Localization &amp; UI Validation</text:p>
          </table:table-cell>
          <table:table-cell table:style-name="ce3" office:value-type="string" calcext:value-type="string">
            <text:p>Verified by checking if content is not distorted and properly visible on wap and web.</text:p>
          </table:table-cell>
          <table:table-cell table:style-name="ce3" office:value-type="string" calcext:value-type="string">
            <text:p>Check layout on desktop and mobile</text:p>
            <text:p>Observe text, images, spacing</text:p>
          </table:table-cell>
          <table:table-cell table:style-name="ce3" office:value-type="string" calcext:value-type="string">
            <text:p>arabic page should be there</text:p>
          </table:table-cell>
          <table:table-cell table:style-name="ce3" office:value-type="string" calcext:value-type="string">
            <text:p>Layout should not break, overlap, or distort on any devic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613" table:style-name="ta36">
        <table:table-column table:style-name="co8" table:number-columns-repeated="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8" table:default-cell-style-name="Default"/>
        <table:table-column table:style-name="co132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Description Validation on Filter Pages</text:p>
          </table:table-cell>
          <table:table-cell table:style-name="ce9" office:value-type="string" calcext:value-type="string">
            <text:p>Verified by checking if the H1 description is correct on English filter pages using web.</text:p>
          </table:table-cell>
          <table:table-cell table:style-name="ce3" office:value-type="string" calcext:value-type="string">
            <text:p>Open website on desktop</text:p>
            <text:p>Go to any filter page (e.g., price/brand filter)</text:p>
            <text:p>Locate H1 heading</text:p>
          </table:table-cell>
          <table:table-cell table:style-name="ce3" office:value-type="string" calcext:value-type="string">
            <text:p>h1 is required</text:p>
          </table:table-cell>
          <table:table-cell table:style-name="ce3" office:value-type="string" calcext:value-type="string">
            <text:p>H1 should display correct English description based on applied filter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Description Validation on Filter Pages</text:p>
          </table:table-cell>
          <table:table-cell table:style-name="ce9" office:value-type="string" calcext:value-type="string">
            <text:p>Verified by checking if the H1 description is correct on Arabic filter pages using web.</text:p>
          </table:table-cell>
          <table:table-cell table:style-name="ce3" office:value-type="string" calcext:value-type="string">
            <text:p>Switch language to Arabic</text:p>
            <text:p>Open filter page</text:p>
            <text:p>Check H1</text:p>
          </table:table-cell>
          <table:table-cell table:style-name="ce3" office:value-type="string" calcext:value-type="string">
            <text:p>h1 is required</text:p>
          </table:table-cell>
          <table:table-cell table:style-name="ce3" office:value-type="string" calcext:value-type="string">
            <text:p>H1 should display correct Arabic translation of filter descriptio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Description Validation on Filter Pages</text:p>
          </table:table-cell>
          <table:table-cell table:style-name="ce9" office:value-type="string" calcext:value-type="string">
            <text:p>Verified by checking if the H1 description is correct on English filter pages using wap.</text:p>
          </table:table-cell>
          <table:table-cell table:style-name="ce3" office:value-type="string" calcext:value-type="string">
            <text:p>Open site on mobile</text:p>
            <text:p>Go to filter page</text:p>
            <text:p>Check H1</text:p>
          </table:table-cell>
          <table:table-cell table:style-name="ce3" office:value-type="string" calcext:value-type="string">
            <text:p>h1 is required</text:p>
          </table:table-cell>
          <table:table-cell table:style-name="ce3" office:value-type="string" calcext:value-type="string">
            <text:p>H1 should be correct and clearly visible on mobi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1 Description Validation on Filter Pages</text:p>
          </table:table-cell>
          <table:table-cell table:style-name="ce9" office:value-type="string" calcext:value-type="string">
            <text:p>Verified by checking if the H1 description is correct on Arabic filter pages using wap.</text:p>
          </table:table-cell>
          <table:table-cell table:style-name="ce3" office:value-type="string" calcext:value-type="string">
            <text:p>Open site in Arabic on mobile</text:p>
            <text:p>Navigate to filter page</text:p>
            <text:p>Check H1</text:p>
          </table:table-cell>
          <table:table-cell table:style-name="ce3" office:value-type="string" calcext:value-type="string">
            <text:p>h1 is required</text:p>
          </table:table-cell>
          <table:table-cell table:style-name="ce3" office:value-type="string" calcext:value-type="string">
            <text:p>H1 should be correctly translated and aligned in RTL format on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48" table:style-name="ta37">
        <table:table-column table:style-name="co8" table:number-columns-repeated="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6" table:default-cell-style-name="Default"/>
        <table:table-column table:style-name="co135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User review page (Desktop).</text:p>
          </table:table-cell>
          <table:table-cell table:style-name="ce3" office:value-type="string" calcext:value-type="string">
            <text:p>Open Model → User Review page on desktop</text:p>
            <text:p>Observe section blocks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user review page (Mobile).</text:p>
          </table:table-cell>
          <table:table-cell table:style-name="ce3" office:value-type="string" calcext:value-type="string">
            <text:p>Open same page on mobile</text:p>
            <text:p>Check blocks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news page (Desktop).</text:p>
          </table:table-cell>
          <table:table-cell table:style-name="ce3" office:value-type="string" calcext:value-type="string">
            <text:p>Open Model → News page</text:p>
            <text:p>Check each section block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news page (Mobile).</text:p>
          </table:table-cell>
          <table:table-cell table:style-name="ce3" office:value-type="string" calcext:value-type="string">
            <text:p>open news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video page (Desktop).</text:p>
          </table:table-cell>
          <table:table-cell table:style-name="ce3" office:value-type="string" calcext:value-type="string">
            <text:p>open video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video page (Mobile).</text:p>
          </table:table-cell>
          <table:table-cell table:style-name="ce3" office:value-type="string" calcext:value-type="string">
            <text:p>oprn video page and check each sect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borchure page (Desktop).</text:p>
          </table:table-cell>
          <table:table-cell table:style-name="ce3" office:value-type="string" calcext:value-type="string">
            <text:p>open borchure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brochure page (Mobile).</text:p>
          </table:table-cell>
          <table:table-cell table:style-name="ce3" office:value-type="string" calcext:value-type="string">
            <text:p>open borchure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promo page (Desktop).</text:p>
          </table:table-cell>
          <table:table-cell table:style-name="ce3" office:value-type="string" calcext:value-type="string">
            <text:p>open model promo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promo page (Mobile).</text:p>
          </table:table-cell>
          <table:table-cell table:style-name="ce3" office:value-type="string" calcext:value-type="string">
            <text:p>open model promo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color page (Desktop).</text:p>
          </table:table-cell>
          <table:table-cell table:style-name="ce3" office:value-type="string" calcext:value-type="string">
            <text:p>open model color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color page (Mobile).</text:p>
          </table:table-cell>
          <table:table-cell table:style-name="ce3" office:value-type="string" calcext:value-type="string">
            <text:p>open model color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image page (Desktop).</text:p>
          </table:table-cell>
          <table:table-cell table:style-name="ce3" office:value-type="string" calcext:value-type="string">
            <text:p>open model image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image page (Mobile).</text:p>
          </table:table-cell>
          <table:table-cell table:style-name="ce3" office:value-type="string" calcext:value-type="string">
            <text:p>open model image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Overview page (Desktop).</text:p>
          </table:table-cell>
          <table:table-cell table:style-name="ce3" office:value-type="string" calcext:value-type="string">
            <text:p>open model overview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blocks on the Model Overview page (Mobile).</text:p>
          </table:table-cell>
          <table:table-cell table:style-name="ce3" office:value-type="string" calcext:value-type="string">
            <text:p>open model overview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blocks on the Model Price page (Desktop).</text:p>
          </table:table-cell>
          <table:table-cell table:style-name="ce3" office:value-type="string" calcext:value-type="string">
            <text:p>open model price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blocks on the Model Price page (Mobile).</text:p>
          </table:table-cell>
          <table:table-cell table:style-name="ce3" office:value-type="string" calcext:value-type="string">
            <text:p>open model price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groups on the Model Specs page (Desktop).</text:p>
          </table:table-cell>
          <table:table-cell table:style-name="ce3" office:value-type="string" calcext:value-type="string">
            <text:p>open model spec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border is applied to all section groups on the Model Spec page (Mobile).</text:p>
          </table:table-cell>
          <table:table-cell table:style-name="ce3" office:value-type="string" calcext:value-type="string">
            <text:p>open model spec page and check it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All section blocks should have 16px rounded border on both desktop and mobile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shadows or elevations follow the rounded corner shape.</text:p>
          </table:table-cell>
          <table:table-cell table:style-name="ce3" office:value-type="string" calcext:value-type="string">
            <text:p>Open the website and go to any model page (Overview / Price / Specs etc.).</text:p>
            <text:p>Look at the section blocks/cards that have rounded corners (16px).</text:p>
            <text:p>Carefully observe the shadow around the block.</text:p>
            <text:p>Check the edges and corners of the shadow.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Shadow should match the rounded shape of the block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16px radius appears correctly on Arabic (RTL) versions of all pages.</text:p>
          </table:table-cell>
          <table:table-cell table:style-name="ce3" office:value-type="string" calcext:value-type="string">
            <text:p>open arabic page and check each section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Rounded corners should work properly in Arabic layou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y content alignment is not impacted after adding rounded borders.</text:p>
          </table:table-cell>
          <table:table-cell table:style-name="ce3" office:value-type="string" calcext:value-type="string">
            <text:p>Open the website and go to any model page (Overview / Price / Specs / etc.).</text:p>
            <text:p>Look at section blocks/cards that now have rounded borders (16px).</text:p>
            <text:p>Check the content inside the blocks (text, images, buttons).</text:p>
            <text:p>Observe alignment carefully:</text:p>
            <text:p>Text should be properly aligned</text:p>
            <text:p>Images should be centered or correctly placed</text:p>
            <text:p>Buttons should be in proper position</text:p>
            <text:p>Scroll through the page and check multiple sections.</text:p>
            <text:p>Repeat the same on mobile (WAP).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Content should remain properly aligned inside block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ied by checking if the CTA button on the top of every widget is removed using web.</text:p>
          </table:table-cell>
          <table:table-cell table:style-name="ce3" office:value-type="string" calcext:value-type="string">
            <text:p>Open the website on desktop (web).</text:p>
            <text:p>Navigate to any page with widgets (Overview, Price, etc.).</text:p>
            <text:p>Look at the top section of each widget.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CTA button should NOT appear at the top of widget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ied by checking if the CTA button on the top of every widget is moved down.</text:p>
          </table:table-cell>
          <table:table-cell table:style-name="ce3" office:value-type="string" calcext:value-type="string">
            <text:p>Open the same widget on web.</text:p>
            <text:p>Scroll inside the widget.</text:p>
            <text:p>Look at the bottom section of the widget.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CTA button should be placed at the bottom of widget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I Styling &amp; Layout Validation</text:p>
          </table:table-cell>
          <table:table-cell table:style-name="ce3" office:value-type="string" calcext:value-type="string">
            <text:p>Verified by checking if the spacing between tabs of a widget is reduced and are same for each.</text:p>
          </table:table-cell>
          <table:table-cell table:style-name="ce3" office:value-type="string" calcext:value-type="string">
            <text:p>Open a widget that has tabs (e.g., Specs, Images, etc.).</text:p>
            <text:p>Observe the spacing between tabs.</text:p>
            <text:p>Compare spacing between each tab.</text:p>
          </table:table-cell>
          <table:table-cell table:style-name="ce3" office:value-type="string" calcext:value-type="string">
            <text:p>UI layout validation</text:p>
          </table:table-cell>
          <table:table-cell table:style-name="ce3" office:value-type="string" calcext:value-type="string">
            <text:p>Space between tabs should be reduced as per desig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39" table:style-name="ta38">
        <table:table-column table:style-name="co8" table:number-columns-repeated="2" table:default-cell-style-name="Default"/>
        <table:table-column table:style-name="co136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Canonical Tag Validation</text:p>
          </table:table-cell>
          <table:table-cell table:style-name="ce9" office:value-type="string" calcext:value-type="string">
            <text:p>Verified by checking if the WAR from page is showing Canonical using web.</text:p>
          </table:table-cell>
          <table:table-cell table:style-name="ce3" office:value-type="string" calcext:value-type="string">
            <text:p>Open website on desktop (web).</text:p>
            <text:p>Navigate to a WAR From page.</text:p>
            <text:p>Right-click → click View Page Source.</text:p>
            <text:p>Press Ctrl + F and search: canonical.</text:p>
          </table:table-cell>
          <table:table-cell table:style-name="ce3"/>
          <table:table-cell table:style-name="ce3" office:value-type="string" calcext:value-type="string">
            <text:p>Canonical tag should be present in page source with correct URL.</text:p>
          </table:table-cell>
          <table:table-cell table:style-name="ce3" office:value-type="string" calcext:value-type="string">
            <text:p><text:s/>Canonical tag is present and URL is correct on web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Canonical Tag Validation</text:p>
          </table:table-cell>
          <table:table-cell table:style-name="ce9" office:value-type="string" calcext:value-type="string">
            <text:p>Verified by checking if the WAR from page is showing Canonical using wap.</text:p>
          </table:table-cell>
          <table:table-cell table:style-name="ce3" office:value-type="string" calcext:value-type="string">
            <text:p>Open website on mobile (or DevTools mobile view).</text:p>
            <text:p>Open a WAR From page.</text:p>
            <text:p>Open View Source / Inspect.</text:p>
            <text:p>Search for canonical.</text:p>
          </table:table-cell>
          <table:table-cell/>
          <table:table-cell table:style-name="ce3" office:value-type="string" calcext:value-type="string">
            <text:p>Canonical tag should be present and correct on mobile version.</text:p>
          </table:table-cell>
          <table:table-cell table:style-name="ce3" office:value-type="string" calcext:value-type="string">
            <text:p>Canonical tag is visible and correct on WAP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Canonical Tag Validation</text:p>
          </table:table-cell>
          <table:table-cell table:style-name="ce9" office:value-type="string" calcext:value-type="string">
            <text:p>Verified by checking if the WAR page is showing Canonical using web.</text:p>
          </table:table-cell>
          <table:table-cell table:style-name="ce3" office:value-type="string" calcext:value-type="string">
            <text:p>Open WAR page on desktop.</text:p>
            <text:p>Right-click → View Page Source.</text:p>
            <text:p>Search for canonical.</text:p>
          </table:table-cell>
          <table:table-cell/>
          <table:table-cell table:style-name="ce3" office:value-type="string" calcext:value-type="string">
            <text:p>Canonical tag should exist and point to correct WAR page URL.</text:p>
          </table:table-cell>
          <table:table-cell table:style-name="ce3" office:value-type="string" calcext:value-type="string">
            <text:p>Canonical tag is correctly implemented on web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O Canonical Tag Validation</text:p>
          </table:table-cell>
          <table:table-cell table:style-name="ce9" office:value-type="string" calcext:value-type="string">
            <text:p>Verified by checking if the WAR page is showing Canonical using wap.</text:p>
          </table:table-cell>
          <table:table-cell table:style-name="ce3" office:value-type="string" calcext:value-type="string">
            <text:p>Open WAR page on mobile.</text:p>
            <text:p>Inspect or view source.</text:p>
            <text:p>Search canonical.</text:p>
          </table:table-cell>
          <table:table-cell/>
          <table:table-cell table:style-name="ce3" office:value-type="string" calcext:value-type="string">
            <text:p>Canonical tag should be present with correct URL on mobile.</text:p>
          </table:table-cell>
          <table:table-cell table:style-name="ce3" office:value-type="string" calcext:value-type="string">
            <text:p>Canonical tag is present and working correctly on WAP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33" table:style-name="ta39">
        <table:table-column table:style-name="co8" table:number-columns-repeated="2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22" table:default-cell-style-name="Default"/>
        <table:table-column table:style-name="co141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landing pages use the new logo.</text:p>
          </table:table-cell>
          <table:table-cell table:style-name="ce3" office:value-type="string" calcext:value-type="string">
            <text:p>Open website homepage / landing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model pages use the new logo.</text:p>
          </table:table-cell>
          <table:table-cell table:style-name="ce3" office:value-type="string" calcext:value-type="string">
            <text:p>Open any model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appear in header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listing pages use the new logo.</text:p>
          </table:table-cell>
          <table:table-cell table:style-name="ce3" office:value-type="string" calcext:value-type="string">
            <text:p>Open listing page (cars list, etc.)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show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news/article pages use the new logo.</text:p>
          </table:table-cell>
          <table:table-cell table:style-name="ce3" office:value-type="string" calcext:value-type="string">
            <text:p>Open any news/articl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present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expert review pages use the new logo.</text:p>
          </table:table-cell>
          <table:table-cell table:style-name="ce3" office:value-type="string" calcext:value-type="string">
            <text:p>Open expert review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comparison pages use the new logo.</text:p>
          </table:table-cell>
          <table:table-cell table:style-name="ce3" office:value-type="string" calcext:value-type="string">
            <text:p>Open compare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show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video pages use the new logo.</text:p>
          </table:table-cell>
          <table:table-cell table:style-name="ce3" office:value-type="string" calcext:value-type="string">
            <text:p>Open video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dealer pages use the new logo.</text:p>
          </table:table-cell>
          <table:table-cell table:style-name="ce3" office:value-type="string" calcext:value-type="string">
            <text:p>Open dealer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user reviews pages use the new logo.</text:p>
          </table:table-cell>
          <table:table-cell table:style-name="ce3" office:value-type="string" calcext:value-type="string">
            <text:p>Open user review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appear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search results pages use the new logo.</text:p>
          </table:table-cell>
          <table:table-cell table:style-name="ce3" office:value-type="string" calcext:value-type="string">
            <text:p>Perform a search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show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error pages (404 / 500) use the new logo.</text:p>
          </table:table-cell>
          <table:table-cell table:style-name="ce3" office:value-type="string" calcext:value-type="string">
            <text:p>Open invalid URL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sitemap and robots preview (if shown on-site) use the new logo.</text:p>
          </table:table-cell>
          <table:table-cell table:style-name="ce3" office:value-type="string" calcext:value-type="string">
            <text:p>Open sitemap/robots page (if UI shown)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New logo should be presen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loads correctly from the new method on all screen resolutions.</text:p>
          </table:table-cell>
          <table:table-cell table:style-name="ce3" office:value-type="string" calcext:value-type="string">
            <text:p>Resize browser (desktop → tablet → mobile)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be clear and responsiv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file size is optimized and does not increase page load.</text:p>
          </table:table-cell>
          <table:table-cell table:style-name="ce3" office:value-type="string" calcext:value-type="string">
            <text:p>Open DevTools → Network tab</text:p>
            <text:p>Reload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be optimized and lightweigh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displays correctly in dark backgrounds and light backgrounds.</text:p>
          </table:table-cell>
          <table:table-cell table:style-name="ce3" office:value-type="string" calcext:value-type="string">
            <text:p>Reload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be clearly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switching between brand variants (if multisite) returns correct logo per domain.</text:p>
          </table:table-cell>
          <table:table-cell table:style-name="ce3" office:value-type="string" calcext:value-type="string">
            <text:p>Check logo on different backgrounds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Correct logo should load per domain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does not flicker or shift layout during load.</text:p>
          </table:table-cell>
          <table:table-cell table:style-name="ce3" office:value-type="string" calcext:value-type="string">
            <text:p>Reload pa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load smoothly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loads correctly in all major browsers (Chrome, Safari, Firefox, Edge).</text:p>
          </table:table-cell>
          <table:table-cell table:style-name="ce3" office:value-type="string" calcext:value-type="string">
            <text:p>Open in Chrome, Safari, Firefox, Edge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work on all browser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loads correctly on iOS and Android devices.</text:p>
          </table:table-cell>
          <table:table-cell table:style-name="ce3" office:value-type="string" calcext:value-type="string">
            <text:p>Open on Android &amp; iOS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display properly on mobi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o Implementation &amp; UI Validation</text:p>
          </table:table-cell>
          <table:table-cell table:style-name="ce3" office:value-type="string" calcext:value-type="string">
            <text:p>Verify the logo is accessible (contrast, alt text, screen-reader friendly).</text:p>
          </table:table-cell>
          <table:table-cell table:style-name="ce3" office:value-type="string" calcext:value-type="string">
            <text:p>Inspect logo element</text:p>
          </table:table-cell>
          <table:table-cell table:style-name="ce3" office:value-type="string" calcext:value-type="string">
            <text:p>New logo verification</text:p>
          </table:table-cell>
          <table:table-cell table:style-name="ce3" office:value-type="string" calcext:value-type="string">
            <text:p>Logo should have alt text and proper contras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32" table:style-name="ta40">
        <table:table-column table:style-name="co8" table:number-columns-repeated="2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00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About Us Page</text:p>
          </table:table-cell>
          <table:table-cell table:style-name="ce3" office:value-type="string" calcext:value-type="string">
            <text:p>Open About Us page</text:p>
            <text:p>Press Ctrl + F and search: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Privacy policy Page</text:p>
          </table:table-cell>
          <table:table-cell table:style-name="ce3" office:value-type="string" calcext:value-type="string">
            <text:p>Open Privacy Policy page</text:p>
            <text:p>Search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Terms-and-conditions/Disclaimer Page</text:p>
          </table:table-cell>
          <table:table-cell table:style-name="ce3" office:value-type="string" calcext:value-type="string">
            <text:p>Open Terms page</text:p>
            <text:p>Search keyword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Contact us</text:p>
          </table:table-cell>
          <table:table-cell table:style-name="ce3" office:value-type="string" calcext:value-type="string">
            <text:p>Open Contact page</text:p>
            <text:p>Search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About Us Page using Arabic Language.</text:p>
          </table:table-cell>
          <table:table-cell table:style-name="ce3" office:value-type="string" calcext:value-type="string">
            <text:p>witch language to Arabic</text:p>
            <text:p>Open About page</text:p>
            <text:p>Search for old name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Privacy policy Page using Arabic Language.</text:p>
          </table:table-cell>
          <table:table-cell table:style-name="ce3" office:value-type="string" calcext:value-type="string">
            <text:p>Open page in Arabic</text:p>
            <text:p>Search text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Terms-and-conditions/Disclaimer Page using Arabic Language.</text:p>
          </table:table-cell>
          <table:table-cell table:style-name="ce3" office:value-type="string" calcext:value-type="string">
            <text:p>Open Arabic Terms page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word SayaraBay is replaced by ZigWheelsKsa on Contact us using Arabic Language.</text:p>
          </table:table-cell>
          <table:table-cell table:style-name="ce3" office:value-type="string" calcext:value-type="string">
            <text:p>Open Arabic Contact page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About Us Page</text:p>
          </table:table-cell>
          <table:table-cell table:style-name="ce12" office:value-type="string" calcext:value-type="string">
            <text:p><text:a xlink:href="http://sayarabay.com/" xlink:type="simple">Open About page
Search: sayarabay.com</text:a>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Privacy policy Page</text:p>
          </table:table-cell>
          <table:table-cell table:style-name="ce3" office:value-type="string" calcext:value-type="string">
            <text:p>open privacy Policy page</text:p>
            <text:p>Search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Terms-and-conditions/Disclaimer Page</text:p>
          </table:table-cell>
          <table:table-cell table:style-name="ce3" office:value-type="string" calcext:value-type="string">
            <text:p>Open Terms page</text:p>
            <text:p>Search keyword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Contact us</text:p>
          </table:table-cell>
          <table:table-cell table:style-name="ce3" office:value-type="string" calcext:value-type="string">
            <text:p>Open Contact page</text:p>
            <text:p>Search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About Us Page using Arabic Language.</text:p>
          </table:table-cell>
          <table:table-cell table:style-name="ce3" office:value-type="string" calcext:value-type="string">
            <text:p>Switch to Arabic</text:p>
            <text:p>Search old URL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Privacy policy Page using Arabic Language.</text:p>
          </table:table-cell>
          <table:table-cell table:style-name="ce3" office:value-type="string" calcext:value-type="string">
            <text:p>open privacy Policy page</text:p>
            <text:p>Search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Terms-and-conditions/Disclaimer Page using Arabic Language.</text:p>
          </table:table-cell>
          <table:table-cell table:style-name="ce3" office:value-type="string" calcext:value-type="string">
            <text:p>Open Terms page</text:p>
            <text:p>Search keyword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randing &amp; URL Replacement Validation</text:p>
          </table:table-cell>
          <table:table-cell table:style-name="ce9" office:value-type="string" calcext:value-type="string">
            <text:p>Verified by checking if the URL sayarabay.com by zigwheelsksa.com on Contact us using Arabic Language.</text:p>
          </table:table-cell>
          <table:table-cell table:style-name="ce3" office:value-type="string" calcext:value-type="string">
            <text:p>Open Contact page</text:p>
            <text:p>Search SayaraBay</text:p>
          </table:table-cell>
          <table:table-cell table:style-name="ce3" office:value-type="string" calcext:value-type="string">
            <text:p>Brand URL replacement</text:p>
          </table:table-cell>
          <table:table-cell table:style-name="ce3" office:value-type="string" calcext:value-type="string">
            <text:p>SayaraBay” should be replaced with “ZigWheelsKsa”.</text:p>
          </table:table-cell>
          <table:table-cell table:style-name="ce3" office:value-type="string" calcext:value-type="string">
            <text:p>Old name is removed and new name is visible.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B-557" table:style-name="ta41">
        <table:table-column table:style-name="co8" table:number-columns-repeated="2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8" table:default-cell-style-name="Default"/>
        <table:table-column table:style-name="co148" table:default-cell-style-name="Default"/>
        <table:table-column table:style-name="co8" table:number-columns-repeated="1018" table:default-cell-style-name="Default"/>
        <table:table-row table:style-name="ro1">
          <table:table-cell table:style-name="ce7" office:value-type="string" calcext:value-type="string">
            <text:p>TC_ID</text:p>
          </table:table-cell>
          <table:table-cell table:style-name="ce8" office:value-type="string" calcext:value-type="string">
            <text:p>Module/Sub Module</text:p>
          </table:table-cell>
          <table:table-cell table:style-name="ce8" office:value-type="string" calcext:value-type="string">
            <text:p>Test 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e Social Links section appears in the exact position as shown in the screenshot.</text:p>
          </table:table-cell>
          <table:table-cell table:style-name="ce3" office:value-type="string" calcext:value-type="string">
            <text:p>Open the page.</text:p>
            <text:p>Scroll to the Social Links section.</text:p>
            <text:p> Check it matches screenshot position.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Section appears exactly as per design/screenshot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all four social icons (Instagram, Twitter/X, Facebook, YouTube) are displayed.</text:p>
          </table:table-cell>
          <table:table-cell table:style-name="ce3" office:value-type="string" calcext:value-type="string">
            <text:p>Locate the section.</text:p>
            <text:p>Check icons: Instagram, Twitter/X, Facebook, YouTube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nstagram, Twitter/X, Facebook, YouTube icons are visi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e icons match the correct platform logos and are not distorted or blurry.</text:p>
          </table:table-cell>
          <table:table-cell table:style-name="ce3" office:value-type="string" calcext:value-type="string">
            <text:p>Observe icons closely.</text:p>
            <text:p>Check: Not blurry or distorted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are clear, not blurry or distorted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each social icon is clickable.</text:p>
          </table:table-cell>
          <table:table-cell table:style-name="ce3" office:value-type="string" calcext:value-type="string">
            <text:p>Click each icon.</text:p>
            <text:p> Check: It responds to click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Each icon should be clicka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clicking the Instagram icon opens https://www.instagram.com/zigwheels_uae/</text:p>
          </table:table-cell>
          <table:table-cell table:style-name="ce3" office:value-type="string" calcext:value-type="string">
            <text:p>Click Instagram icon.</text:p>
            <text:p>Check it opens correct Instagram page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Opens correct Instagram URL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clicking the Twitter/X icon opens https://x.com/ZigWheels_UAE</text:p>
          </table:table-cell>
          <table:table-cell table:style-name="ce3" office:value-type="string" calcext:value-type="string">
            <text:p>lick Twitter icon.</text:p>
            <text:p> Check correct URL opens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Opens correct Twitter/X URL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clicking the Facebook icon opens https://www.facebook.com/ZigWheelsUAE/</text:p>
          </table:table-cell>
          <table:table-cell table:style-name="ce3" office:value-type="string" calcext:value-type="string">
            <text:p>Click Facebook icon.</text:p>
            <text:p> Verify correct page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Opens correct Facebook URL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clicking the YouTube icon opens https://www.youtube.com/@ZigWheels_UAE</text:p>
          </table:table-cell>
          <table:table-cell table:style-name="ce3" office:value-type="string" calcext:value-type="string">
            <text:p>Click YouTube icon.</text:p>
            <text:p> Verify correct channel opens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Opens correct YouTube URL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all links open in a new tab (target="_blank").</text:p>
          </table:table-cell>
          <table:table-cell table:style-name="ce3" office:value-type="string" calcext:value-type="string">
            <text:p>Click any icon.</text:p>
            <text:p>Check it opens in new tab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All links open in a new tab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all social icons have correct hover effects (if specified).</text:p>
          </table:table-cell>
          <table:table-cell table:style-name="ce3" office:value-type="string" calcext:value-type="string">
            <text:p>Hover mouse over icons.</text:p>
            <text:p> Check for visual effect (color/scale)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show hover effect (color/animation)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at icons change cursor to pointer on hover.</text:p>
          </table:table-cell>
          <table:table-cell table:style-name="ce3" office:value-type="string" calcext:value-type="string">
            <text:p>Hover on icon.</text:p>
            <text:p>Cursor should change to pointer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Cursor changes to pointer on hover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social links section is fully responsive on desktop.</text:p>
          </table:table-cell>
          <table:table-cell table:style-name="ce3" office:value-type="string" calcext:value-type="string">
            <text:p>Open on desktop.</text:p>
            <text:p> Check alignment and spacing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Section displays properly on desktop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social links section is responsive on tablets (both orientations).</text:p>
          </table:table-cell>
          <table:table-cell table:style-name="ce3" office:value-type="string" calcext:value-type="string">
            <text:p>Use DevTools tablet view.</text:p>
            <text:p> Check layout in portrait &amp; landscape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Works properly on tablet (portrait &amp; landscape)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e social icons scale appropriately on mobile view.</text:p>
          </table:table-cell>
          <table:table-cell table:style-name="ce3" office:value-type="string" calcext:value-type="string">
            <text:p>Open on mobile view.</text:p>
            <text:p> Check icon size adjusts properly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scale properly on mobi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icons do not overlap or break alignment on smaller screens.</text:p>
          </table:table-cell>
          <table:table-cell table:style-name="ce3" office:value-type="string" calcext:value-type="string">
            <text:p>Reduce screen size.</text:p>
            <text:p> Check icons don’t overlap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do not overlap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icons are aligned based on design (as per screenshot).</text:p>
          </table:table-cell>
          <table:table-cell table:style-name="ce3" office:value-type="string" calcext:value-type="string">
            <text:p>Compare with screenshot/design.</text:p>
            <text:p> Check proper alignment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aligned as per UI desig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no broken icons appear due to missing assets or CDN issues.</text:p>
          </table:table-cell>
          <table:table-cell table:style-name="ce3" office:value-type="string" calcext:value-type="string">
            <text:p>Observe icons.</text:p>
            <text:p>Check no missing images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No missing or broken image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keyboard navigation (Tab key) highlights each social icon.</text:p>
          </table:table-cell>
          <table:table-cell table:style-name="ce3" office:value-type="string" calcext:value-type="string">
            <text:p>Press Tab key</text:p>
            <text:p> Focus should move to each icon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Tab key highlights each icon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Enter/Space key triggers link navigation for accessibility.</text:p>
          </table:table-cell>
          <table:table-cell table:style-name="ce3" office:value-type="string" calcext:value-type="string">
            <text:p>Press Enter on focused icon</text:p>
            <text:p>Link should open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Enter/Space opens link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icons are readable and accessible in high-contrast mode.</text:p>
          </table:table-cell>
          <table:table-cell table:style-name="ce3" office:value-type="string" calcext:value-type="string">
            <text:p>Enable high contrast (OS/browser)</text:p>
            <text:p> Icons should remain visible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remain visible and readab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icons do not overlap with adjacent elements (header/footer/other).</text:p>
          </table:table-cell>
          <table:table-cell table:style-name="ce3" office:value-type="string" calcext:value-type="string">
            <text:p>Check header/footer areas</text:p>
            <text:p> Ensure no overlap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Section does not overlap header/footer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e links remain correct after page reload.</text:p>
          </table:table-cell>
          <table:table-cell table:style-name="ce3" office:value-type="string" calcext:value-type="string">
            <text:p>Refresh page</text:p>
            <text:p> Click icons again → should work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Links work after page reload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no Console errors appear related to icon rendering or links.</text:p>
          </table:table-cell>
          <table:table-cell table:style-name="ce3" office:value-type="string" calcext:value-type="string">
            <text:p>Open DevTools → Console</text:p>
            <text:p>Click icons</text:p>
            <text:p> No errors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No errors in consol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all links resolve successfully (no 404 errors).</text:p>
          </table:table-cell>
          <table:table-cell table:style-name="ce3" office:value-type="string" calcext:value-type="string">
            <text:p>Open links</text:p>
            <text:p> Pages should load successfully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All links load successfully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hovering each icon shows correct tooltip name (if required).</text:p>
          </table:table-cell>
          <table:table-cell table:style-name="ce3" office:value-type="string" calcext:value-type="string">
            <text:p>Hover icon</text:p>
            <text:p> Check tooltip text (e.g., “Instagram”)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Correct tooltip appears on hover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no duplicated social icons appear on the page.</text:p>
          </table:table-cell>
          <table:table-cell table:style-name="ce3" office:value-type="string" calcext:value-type="string">
            <text:p>Scan entire page</text:p>
            <text:p> Only one set of icons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Icons appear only once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e section order is consistent across pages where it appears.</text:p>
          </table:table-cell>
          <table:table-cell table:style-name="ce3" office:value-type="string" calcext:value-type="string">
            <text:p>Open multiple pages</text:p>
            <text:p> Check same placement/order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Same section appears consistently across page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the section works correctly on all major browsers (Chrome, Safari, Firefox, Edge).</text:p>
          </table:table-cell>
          <table:table-cell table:style-name="ce3" office:value-type="string" calcext:value-type="string">
            <text:p>Test on Chrome, Firefox, Edge, Safari</text:p>
            <text:p> Check behavior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Works on Chrome, Firefox, Edge, Safari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mobile browsers (Chrome Mobile, Safari iOS) properly load and open links.</text:p>
          </table:table-cell>
          <table:table-cell table:style-name="ce3" office:value-type="string" calcext:value-type="string">
            <text:p>Test on Chrome mobile / Safari iOS</text:p>
            <text:p>Open links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Works on mobile browser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opening social links does not cause mixed-content issues (HTTP vs HTTPS).</text:p>
          </table:table-cell>
          <table:table-cell table:style-name="ce3" office:value-type="string" calcext:value-type="string">
            <text:p>Click links</text:p>
            <text:p> Ensure HTTPS (no warning)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No HTTP/HTTPS warning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ocial Links Section UI, Functionality &amp; Accessibility Validation</text:p>
          </table:table-cell>
          <table:table-cell table:style-name="ce3" office:value-type="string" calcext:value-type="string">
            <text:p>Verify no unwanted underline or text appears if icons are inside anchor tags.</text:p>
          </table:table-cell>
          <table:table-cell table:style-name="ce3" office:value-type="string" calcext:value-type="string">
            <text:p>Observe icons</text:p>
            <text:p> No extra text/underline</text:p>
          </table:table-cell>
          <table:table-cell table:style-name="ce3" office:value-type="string" calcext:value-type="string">
            <text:p>link is required</text:p>
          </table:table-cell>
          <table:table-cell table:style-name="ce3" office:value-type="string" calcext:value-type="string">
            <text:p>No HTTP/HTTPS warnings.</text:p>
          </table:table-cell>
          <table:table-cell table:style-name="ce3" office:value-type="string" calcext:value-type="string">
            <text:p>works correctly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31" style:display-name="PageStyle_MEB-7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53" style:display-name="PageStyle_MEB-7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55" style:display-name="PageStyle_MEB-7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56" style:display-name="PageStyle_MEB-7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63" style:display-name="PageStyle_MEB-7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68" style:display-name="PageStyle_MEB-7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05" style:display-name="PageStyle_MEB-7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49" style:display-name="PageStyle_MEB-7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785" style:display-name="PageStyle_MEB-78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06" style:display-name="PageStyle_MEB-5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27" style:display-name="PageStyle_MEB-6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28" style:display-name="PageStyle_MEB-6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47" style:display-name="PageStyle_MEB-6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48" style:display-name="PageStyle_MEB-6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52" style:display-name="PageStyle_MEB-6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53" style:display-name="PageStyle_MEB-6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63" style:display-name="PageStyle_MEB-6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75" style:display-name="PageStyle_MEB-67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83" style:display-name="PageStyle_MEB-6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81" style:display-name="PageStyle_MEB-68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92" style:display-name="PageStyle_MEB-6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16" style:display-name="PageStyle_MEB-6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63" style:display-name="PageStyle_MEB-5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62" style:display-name="PageStyle_MEB-5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60" style:display-name="PageStyle_MEB-5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30" style:display-name="PageStyle_MEB-6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35" style:display-name="PageStyle_MEB-5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18" style:display-name="PageStyle_MEB-5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13" style:display-name="PageStyle_MEB-5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08" style:display-name="PageStyle_MEB-5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02" style:display-name="PageStyle_MEB-5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01" style:display-name="PageStyle_MEB-5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472" style:display-name="PageStyle_MEB-4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31" style:display-name="PageStyle_MEB-6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613" style:display-name="PageStyle_MEB-6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48" style:display-name="PageStyle_MEB-5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39" style:display-name="PageStyle_MEB-5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33" style:display-name="PageStyle_MEB-5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32" style:display-name="PageStyle_MEB-5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B-557" style:display-name="PageStyle_MEB-55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1" meta:cell-count="3691" meta:object-count="0"/>
    <meta:generator>LibreOfficeDev/6.0.5.2$Linux_X86_64 LibreOffice_project/</meta:generator>
  </office:meta>
</office:document-meta>
</file>